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337.svg"/>
  <manifest:file-entry manifest:media-type="image/svg+xml" manifest:full-path="Pictures/336.svg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16383*"/>
    </style:style>
    <style:style style:name="Table2.C" style:family="table-column">
      <style:table-column-properties style:rel-column-width="16383*"/>
    </style:style>
    <style:style style:name="Table2.D" style:family="table-column">
      <style:table-column-properties style:rel-column-width="16383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<text:span text:style-name="T1">ABShow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83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6" office:name=""><text:span text:style-name="Definition">Measure</text:span></text:a></text:p>
          </table:table-cell>
          <table:table-cell table:style-name="TableRowCell" office:value-type="string">
            <text:p text:style-name="Table_20_Contents">show measu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<text:span text:style-name="T1">ABShowWpButton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77" office:name=""><text:span text:style-name="Definition">gui/NavPage.tsx</text:span></text:a></text:p>
          </table:table-cell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09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3" office:name=""><text:span text:style-name="Definition">Wp</text:span></text:a></text:p>
          </table:table-cell>
          <table:table-cell table:style-name="TableRowCell" office:value-type="string">
            <text:p text:style-name="Table_20_Contents">show wp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</text:span></text:a></text:p>
          </table:table-cell>
          <table:table-cell table:style-name="TableRowCell" office:value-type="string">
            <text:p text:style-name="Table_20_Contents">configure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image/icon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6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42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5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upda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3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7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5" office:name=""><text:span text:style-name="Definition">Browser</text:span></text:a></text:p>
          </table:table-cell>
          <table:table-cell table:style-name="TableRowCell" office:value-type="string">
            <text:p text:style-name="Table_20_Contents">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go 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ancel</text:span></text:a></text:p>
          </table:table-cell>
          <table:table-cell table:style-name="TableRowCell" office:value-type="string">
            <text:p text:style-name="Table_20_Contents">leave / canc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9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44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Action</text:span></text:a></text:p>
          </table:table-cell>
          <table:table-cell table:style-name="TableRowCell" office:value-type="string">
            <text:p text:style-name="Table_20_Contents">map 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list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8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3" office:name=""><text:span text:style-name="Definition">Conn</text:span></text:a></text:p>
          </table:table-cell>
          <table:table-cell table:style-name="TableRowCell" office:value-type="string">
            <text:p text:style-name="Table_20_Contents">connected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42" office:name=""><text:span text:style-name="Definition">gui/NavPage.tsx</text:span></text:a></text:p>
          </table:table-cell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Course</text:span></text:a></text:p>
          </table:table-cell>
          <table:table-cell table:style-name="TableRowCell" office:value-type="string">
            <text:p text:style-name="Table_20_Contents">course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5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3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9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4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1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52" office:name=""><text:span text:style-name="Definition">gui/NavPage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2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6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8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0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9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2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7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6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0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5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3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6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6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4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6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3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1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6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74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1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4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22" office:name=""><text:span text:style-name="Definition">gui/NavPage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4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5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3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5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4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5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9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4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1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9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9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3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5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22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0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0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0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7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7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6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7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9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33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1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9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5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0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95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0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0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81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1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7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8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2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535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8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2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0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3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4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4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8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7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16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74" office:name=""><text:span text:style-name="Definition">Ignore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8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7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4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2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1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8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7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5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0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6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6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6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5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3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5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10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1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7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3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0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6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9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6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0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8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8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3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2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1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9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5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9" office:name=""><text:span text:style-name="Definition">Open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7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5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7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1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2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1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22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3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1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4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0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9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9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13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4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1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0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1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1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1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2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6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1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5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3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9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9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6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3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6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3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2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9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1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0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1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4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4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62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9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8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3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8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5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7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0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5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3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2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3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9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5" office:name=""><text:span text:style-name="Definition">En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5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7" office:name=""><text:span text:style-name="Definition">Remo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7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7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4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0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39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6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0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4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2" office:name=""><text:span text:style-name="Definition"/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0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9" office:name=""><text:span text:style-name="Definition"/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8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5" office:name=""><text:span text:style-name="Definition"/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2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8" office:name=""><text:span text:style-name="Definition"/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6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1" office:name=""><text:span text:style-name="Definition"/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0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/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4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/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8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/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2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/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6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/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62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GPS</text:span></text:a></text:p>
          </table:table-cell>
          <table:table-cell table:style-name="TableRowCell" office:value-type="string">
            <text:p text:style-name="Table_20_Contents">center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3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4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s</text:span></text:a></text:p>
          </table:table-cell>
          <table:table-cell table:style-name="TableRowCell" office:value-type="string">
            <text:p text:style-name="Table_20_Contents">chart impo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2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8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7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0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Layout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<text:span text:style-name="T1">LockMark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4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LockMark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02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Lock</text:span></text:a></text:p>
          </table:table-cell>
          <table:table-cell table:style-name="TableRowCell" office:value-type="string">
            <text:p text:style-name="Table_20_Contents">lock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9" office:name=""><text:span text:style-name="Definition">components/Mob.ts</text:span></text:a></text:p>
          </table:table-cell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ma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7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0" office:name=""><text:span text:style-name="Definition">Info</text:span></text:a></text:p>
          </table:table-cell>
          <table:table-cell table:style-name="TableRowCell" office:value-type="string">
            <text:p text:style-name="Table_20_Contents">version and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5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26" office:name=""><text:span text:style-name="Definition">gui/MainNav.tsx</text:span></text:a></text:p>
          </table:table-cell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3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8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9" office:name=""><text:span text:style-name="Definition">Start</text:span></text:a></text:p>
          </table:table-cell>
          <table:table-cell table:style-name="TableRowCell" office:value-type="string">
            <text:p text:style-name="Table_20_Contents">Start Measu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gui/NavPage.tsx#L85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<text:span text:style-name="T1">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65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2" office:name=""><text:span text:style-name="Definition">Add</text:span></text:a></text:p>
          </table:table-cell>
          <table:table-cell table:style-name="TableRowCell" office:value-type="string">
            <text:p text:style-name="Table_20_Contents">Add Measu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MeasureAdd</text:span></text:a></text:p>
          </table:table-cell>
          <table:table-cell table:style-name="TableRowCell" office:value-type="string">
            <text:p text:style-name="Table_20_Contents"><text:a xlink:type="simple" xlink:href="../../viewer/gui/NavPage.tsx#L85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<text:span text:style-name="T1">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1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5" office:name=""><text:span text:style-name="Definition">Off</text:span></text:a></text:p>
          </table:table-cell>
          <table:table-cell table:style-name="TableRowCell" office:value-type="string">
            <text:p text:style-name="Table_20_Contents">Measure 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MeasureOff</text:span></text:a></text:p>
          </table:table-cell>
          <table:table-cell table:style-name="TableRowCell" office:value-type="string">
            <text:p text:style-name="Table_20_Contents"><text:a xlink:type="simple" xlink:href="../../viewer/gui/NavPage.tsx#L86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<text:span text:style-name="T1">NavAction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73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igatio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navigation.svg</text:span></text:a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0" office:name=""><text:span text:style-name="Definition">Actions</text:span></text:a></text:p>
          </table:table-cell>
          <table:table-cell table:style-name="TableRowCell" office:value-type="string">
            <text:p text:style-name="Table_20_Contents">show nav acti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7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+ Before</text:span></text:a></text:p>
          </table:table-cell>
          <table:table-cell table:style-name="TableRowCell" office:value-type="string">
            <text:p text:style-name="Table_20_Contents">add befor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3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8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+ After</text:span></text:a></text:p>
          </table:table-cell>
          <table:table-cell table:style-name="TableRowCell" office:value-type="string">
            <text:p text:style-name="Table_20_Contents">add after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3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5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75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4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8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86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9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41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Next</text:span></text:a></text:p>
          </table:table-cell>
          <table:table-cell table:style-name="TableRowCell" office:value-type="string">
            <text:p text:style-name="Table_20_Contents">goto 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Overlay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charts/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.tsx#L95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1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58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9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Center</text:span></text:a></text:p>
          </table:table-cell>
          <table:table-cell table:style-name="TableRowCell" office:value-type="string">
            <text:p text:style-name="Table_20_Contents">wp to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44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9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AvNav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4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0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7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7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Menu</text:span></text:a></text:p>
          </table:table-cell>
          <table:table-cell table:style-name="TableRowCell" office:value-type="string">
            <text:p text:style-name="Table_20_Contents">route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8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1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6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Defaults</text:span></text:a></text:p>
          </table:table-cell>
          <table:table-cell table:style-name="TableRowCell" office:value-type="string">
            <text:p text:style-name="Table_20_Contents">reset to defaul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2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4" office:name=""><text:span text:style-name="Definition">List</text:span></text:a></text:p>
          </table:table-cell>
          <table:table-cell table:style-name="TableRowCell" office:value-type="string">
            <text:p text:style-name="Table_20_Contents">store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2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4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Rem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0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4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8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49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Route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3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displ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9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9" office:name=""><text:span text:style-name="Definition">Net</text:span></text:a></text:p>
          </table:table-cell>
          <table:table-cell table:style-name="TableRowCell" office:value-type="string">
            <text:p text:style-name="Table_20_Contents">own network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1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3" office:name=""><text:span text:style-name="Definition">Expand</text:span></text:a></text:p>
          </table:table-cell>
          <table:table-cell table:style-name="TableRowCell" office:value-type="string">
            <text:p text:style-name="Table_20_Contents">show 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3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2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3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7" office:name=""><text:span text:style-name="Definition">Debug</text:span></text:a></text:p>
          </table:table-cell>
          <table:table-cell table:style-name="TableRowCell" office:value-type="string">
            <text:p text:style-name="Table_20_Contents">enable 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9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4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5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1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1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8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5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6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End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anchor-end.svg</text:span></text:a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Stop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65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74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93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2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6" office:name=""><text:span text:style-name="Definition">List</text:span></text:a></text:p>
          </table:table-cell>
          <table:table-cell table:style-name="TableRowCell" office:value-type="string">
            <text:p text:style-name="Table_20_Contents">lis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4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0" office:name=""><text:span text:style-name="Definition">Sync</text:span></text:a></text:p>
          </table:table-cell>
          <table:table-cell table:style-name="TableRowCell" office:value-type="string">
            <text:p text:style-name="Table_20_Contents">sync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<text:span text:style-name="T1">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72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8" office:name=""><text:span text:style-name="Definition">Route</text:span></text:a></text:p>
          </table:table-cell>
          <table:table-cell table:style-name="TableRowCell" office:value-type="string">
            <text:p text:style-name="Table_20_Contents">To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53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8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1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7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3" office:name=""><text:span text:style-name="Definition">List</text:span></text:a></text:p>
          </table:table-cell>
          <table:table-cell table:style-name="TableRowCell" office:value-type="string">
            <text:p text:style-name="Table_20_Contents">lis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import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298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1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8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31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7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7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4" office:name=""><text:span text:style-name="Definition">Start</text:span></text:a></text:p>
          </table:table-cell>
          <table:table-cell table:style-name="TableRowCell" office:value-type="string">
            <text:p text:style-name="Table_20_Contents">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7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30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7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0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8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 +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89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0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 -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89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201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1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7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26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5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<text:span text:style-name="T1">Empt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Non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3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7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6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6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1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0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4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4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4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13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1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4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4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7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6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06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6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6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0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06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0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0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52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7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7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3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3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7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68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3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0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4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9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9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36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4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3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9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9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9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AnchorEnd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anchor-end.svg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DBAnchorBoat,code</text:p>
          </table:table-cell>
        </table:table-row>
        <table:table-row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</text:p>
          </table:table-cell>
        </table:table-row>
        <table:table-row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3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Checked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Empty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None</text:span></text:a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ITDirectory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Html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Other</text:p>
          </table:table-cell>
          <table:table-cell table:style-name="TableRowCell" office:value-type="string">
            <text:p text:style-name="Table_20_Contents"><text:a xlink:type="simple" xlink:href="../../viewer/style/icons.less#L396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Server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Text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UserSpecial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10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JSChanged</text:p>
          </table:table-cell>
          <table:table-cell table:style-name="TableRowCell" office:value-type="string">
            <text:p text:style-name="Table_20_Contents"><text:a xlink:type="simple" xlink:href="../../viewer/style/icons.less#L414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Layout,LayoutFinished,DBEditLayout,code</text:p>
          </table:table-cell>
        </table:table-row>
        <table:table-row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Left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LockMarker</text:p>
          </table:table-cell>
        </table:table-row>
        <table:table-row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MNCatNav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atSet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ollapsed</text:p>
          </table:table-cell>
          <table:table-cell table:style-name="TableRowCell" office:value-type="string">
            <text:p text:style-name="Table_20_Contents"><text:a xlink:type="simple" xlink:href="../../viewer/style/icons.less#L366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Expanded</text:p>
          </table:table-cell>
          <table:table-cell table:style-name="TableRowCell" office:value-type="string">
            <text:p text:style-name="Table_20_Contents"><text:a xlink:type="simple" xlink:href="../../viewer/style/icons.less#L370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ABShowMeasure,Measure,MeasureAdd,code</text:p>
          </table:table-cell>
        </table:table-row>
        <table:table-row>
          <table:table-cell table:style-name="TableRowCell" office:value-type="string">
            <text:p text:style-name="Table_20_Contents">MeasureFlag</text:p>
          </table:table-cell>
          <table:table-cell table:style-name="TableRowCell" office:value-type="string">
            <text:p text:style-name="Table_20_Contents"><text:a xlink:type="simple" xlink:href="../../viewer/style/icons.less#L343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MeasureOff</text:p>
          </table:table-cell>
        </table:table-row>
        <table:table-row>
          <table:table-cell table:style-name="TableRowCell" office:value-type="string">
            <text:p text:style-name="Table_20_Contents">More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NavGoto,DBStartRoute</text:p>
          </table:table-cell>
        </table:table-row>
        <table:table-row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Navigatio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navigation.svg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NavActions</text:p>
          </table:table-cell>
        </table:table-row>
        <table:table-row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</text:p>
          </table:table-cell>
        </table:table-row>
        <table:table-row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Plugins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,StatusAdd,RouteAdd,CreateFile,DBAdd,DBNew,DBNewRoute,DBAddSub</text:p>
          </table:table-cell>
        </table:table-row>
        <table:table-row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22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RadioChecked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adioUnchecked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ReloadUI,StatusRestart,DBReload,DBRestart,DBAutoReload</text:p>
          </table:table-cell>
        </table:table-row>
        <table:table-row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13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Right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ToRoute,DBRoutePoints,DBFeatureNewRoute,DBEditRoute,code</text:p>
          </table:table-cell>
        </table:table-row>
        <table:table-row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Satellite</text:p>
          </table:table-cell>
          <table:table-cell table:style-name="TableRowCell" office:value-type="string">
            <text:p text:style-name="Table_20_Contents"><text:a xlink:type="simple" xlink:href="../../viewer/style/icons.less#L419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NavOverlays</text:p>
          </table:table-cell>
        </table:table-row>
        <table:table-row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Track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Checked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code</text:p>
          </table:table-cell>
        </table:table-row>
        <table:table-row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09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ABShowWpButtons,code</text:p>
          </table:table-cell>
        </table:table-row>
        <table:table-row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WpGoto,NavRestart</text:p>
          </table:table-cell>
        </table:table-row>
        <table:table-row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WpLocate,NavToCenter</text:p>
          </table:table-cell>
        </table:table-row>
        <table:table-row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337" svg:width="0.41667in" svg:height="0.4166666666666667in"><draw:image xlink:href="Pictures/336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338" svg:width="0.41667in" svg:height="0.4166666666666667in"><draw:image xlink:href="Pictures/337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5-15T08:46:07Z</meta:creation-date>
    <dc:date>2026-05-15T08:46:07Z</dc:date>
  </office:meta>
</office:document-meta>
</file>