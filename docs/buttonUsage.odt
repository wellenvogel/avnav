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83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77" office:name=""><text:span text:style-name="Definition">gui/NavPage.tsx</text:span></text:a></text:p>
          </table:table-cell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12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</text:span></text:a></text:p>
          </table:table-cell>
          <table:table-cell table:style-name="TableRowCell" office:value-type="string">
            <text:p text:style-name="Table_20_Contents">configure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image/icon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upda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Browser</text:span></text:a></text:p>
          </table:table-cell>
          <table:table-cell table:style-name="TableRowCell" office:value-type="string">
            <text:p text:style-name="Table_20_Contents">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go 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ancel</text:span></text:a></text:p>
          </table:table-cell>
          <table:table-cell table:style-name="TableRowCell" office:value-type="string">
            <text:p text:style-name="Table_20_Contents">leave / canc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9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4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Action</text:span></text:a></text:p>
          </table:table-cell>
          <table:table-cell table:style-name="TableRowCell" office:value-type="string">
            <text:p text:style-name="Table_20_Contents">map 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list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8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Conn</text:span></text:a></text:p>
          </table:table-cell>
          <table:table-cell table:style-name="TableRowCell" office:value-type="string">
            <text:p text:style-name="Table_20_Contents">connected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42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Course</text:span></text:a></text:p>
          </table:table-cell>
          <table:table-cell table:style-name="TableRowCell" office:value-type="string">
            <text:p text:style-name="Table_20_Contents">course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5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8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3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8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5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8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2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1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2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5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3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2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7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6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0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7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1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0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4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5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1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4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5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9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22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8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5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5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6" office:name=""><text:span text:style-name="Definition"><text:span text:style-name="T1">DBColorUn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21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9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9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4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2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9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6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5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4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5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1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7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1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1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4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3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5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4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5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5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81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1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7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8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7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3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2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4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3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4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4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8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7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16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1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9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6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7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5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6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0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5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7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5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10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1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1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3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1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3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1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6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2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9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2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6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6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25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7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9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13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0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7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0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9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8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6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6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9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1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0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1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4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9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62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3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3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7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3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9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2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8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0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7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7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6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0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4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2" office:name=""><text:span text:style-name="Definition"/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/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8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5" office:name=""><text:span text:style-name="Definition"/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2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/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/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/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/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/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/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/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62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GPS</text:span></text:a></text:p>
          </table:table-cell>
          <table:table-cell table:style-name="TableRowCell" office:value-type="string">
            <text:p text:style-name="Table_20_Contents">center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3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4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s</text:span></text:a></text:p>
          </table:table-cell>
          <table:table-cell table:style-name="TableRowCell" office:value-type="string">
            <text:p text:style-name="Table_20_Contents">chart impo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7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0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4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02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Lock</text:span></text:a></text:p>
          </table:table-cell>
          <table:table-cell table:style-name="TableRowCell" office:value-type="string">
            <text:p text:style-name="Table_20_Contents">lock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ma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7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0" office:name=""><text:span text:style-name="Definition">Info</text:span></text:a></text:p>
          </table:table-cell>
          <table:table-cell table:style-name="TableRowCell" office:value-type="string">
            <text:p text:style-name="Table_20_Contents">version and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5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26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3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8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gui/NavPage.tsx#L85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5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Add</text:span></text:a></text:p>
          </table:table-cell>
          <table:table-cell table:style-name="TableRowCell" office:value-type="string">
            <text:p text:style-name="Table_20_Contents">Add Measu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MeasureAdd</text:span></text:a></text:p>
          </table:table-cell>
          <table:table-cell table:style-name="TableRowCell" office:value-type="string">
            <text:p text:style-name="Table_20_Contents"><text:a xlink:type="simple" xlink:href="../../viewer/gui/NavPage.tsx#L85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1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3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Off</text:span></text:a></text:p>
          </table:table-cell>
          <table:table-cell table:style-name="TableRowCell" office:value-type="string">
            <text:p text:style-name="Table_20_Contents">Measure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MeasureOff</text:span></text:a></text:p>
          </table:table-cell>
          <table:table-cell table:style-name="TableRowCell" office:value-type="string">
            <text:p text:style-name="Table_20_Contents"><text:a xlink:type="simple" xlink:href="../../viewer/gui/NavPage.tsx#L86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73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Actions</text:span></text:a></text:p>
          </table:table-cell>
          <table:table-cell table:style-name="TableRowCell" office:value-type="string">
            <text:p text:style-name="Table_20_Contents">show nav 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+ Before</text:span></text:a></text:p>
          </table:table-cell>
          <table:table-cell table:style-name="TableRowCell" office:value-type="string">
            <text:p text:style-name="Table_20_Contents">add befor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8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+ After</text:span></text:a></text:p>
          </table:table-cell>
          <table:table-cell table:style-name="TableRowCell" office:value-type="string">
            <text:p text:style-name="Table_20_Contents">add after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75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4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86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1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Next</text:span></text:a></text:p>
          </table:table-cell>
          <table:table-cell table:style-name="TableRowCell" office:value-type="string">
            <text:p text:style-name="Table_20_Contents">goto 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Overlay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charts/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.tsx#L95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1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58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Center</text:span></text:a></text:p>
          </table:table-cell>
          <table:table-cell table:style-name="TableRowCell" office:value-type="string">
            <text:p text:style-name="Table_20_Contents">wp to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4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AvNav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0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7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Menu</text:span></text:a></text:p>
          </table:table-cell>
          <table:table-cell table:style-name="TableRowCell" office:value-type="string">
            <text:p text:style-name="Table_20_Contents">route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8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1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6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Defaults</text:span></text:a></text:p>
          </table:table-cell>
          <table:table-cell table:style-name="TableRowCell" office:value-type="string">
            <text:p text:style-name="Table_20_Contents">reset to defaul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2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4" office:name=""><text:span text:style-name="Definition">List</text:span></text:a></text:p>
          </table:table-cell>
          <table:table-cell table:style-name="TableRowCell" office:value-type="string">
            <text:p text:style-name="Table_20_Contents">store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Rem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49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Route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displ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Net</text:span></text:a></text:p>
          </table:table-cell>
          <table:table-cell table:style-name="TableRowCell" office:value-type="string">
            <text:p text:style-name="Table_20_Contents">own network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1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3" office:name=""><text:span text:style-name="Definition">Expand</text:span></text:a></text:p>
          </table:table-cell>
          <table:table-cell table:style-name="TableRowCell" office:value-type="string">
            <text:p text:style-name="Table_20_Contents">show 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Debug</text:span></text:a></text:p>
          </table:table-cell>
          <table:table-cell table:style-name="TableRowCell" office:value-type="string">
            <text:p text:style-name="Table_20_Contents">enable 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5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Stop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4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3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List</text:span></text:a></text:p>
          </table:table-cell>
          <table:table-cell table:style-name="TableRowCell" office:value-type="string">
            <text:p text:style-name="Table_20_Contents">lis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4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0" office:name=""><text:span text:style-name="Definition">Sync</text:span></text:a></text:p>
          </table:table-cell>
          <table:table-cell table:style-name="TableRowCell" office:value-type="string">
            <text:p text:style-name="Table_20_Contents">sync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72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3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8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7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3" office:name=""><text:span text:style-name="Definition">List</text:span></text:a></text:p>
          </table:table-cell>
          <table:table-cell table:style-name="TableRowCell" office:value-type="string">
            <text:p text:style-name="Table_20_Contents">lis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import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9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8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31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7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7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4" office:name=""><text:span text:style-name="Definition">Start</text:span></text:a></text:p>
          </table:table-cell>
          <table:table-cell table:style-name="TableRowCell" office:value-type="string">
            <text:p text:style-name="Table_20_Contents">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30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0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 +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9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 -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9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7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9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6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9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9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7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7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3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4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0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9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9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9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3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3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5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0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0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6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4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7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6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7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22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22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6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2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2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2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6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21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DBColorUnset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399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10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17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LockMarker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69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7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3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NavGoto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25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13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tellite</text:p>
          </table:table-cell>
          <table:table-cell table:style-name="TableRowCell" office:value-type="string">
            <text:p text:style-name="Table_20_Contents"><text:a xlink:type="simple" xlink:href="../../viewer/style/icons.less#L422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NavOverlays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12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WpGoto,NavRestart</text:p>
      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WpLocate,NavToCenter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4T16:32:25Z</meta:creation-date>
    <dc:date>2026-05-14T16:32:25Z</dc:date>
  </office:meta>
</office:document-meta>
</file>