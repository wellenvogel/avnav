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337.svg"/>
  <manifest:file-entry manifest:media-type="image/svg+xml" manifest:full-path="Pictures/336.svg"/>
  <manifest:file-entry manifest:media-type="image/svg+xml" manifest:full-path="Pictures/335.svg"/>
  <manifest:file-entry manifest:media-type="image/svg+xml" manifest:full-path="Pictures/334.svg"/>
  <manifest:file-entry manifest:media-type="image/svg+xml" manifest:full-path="Pictures/333.svg"/>
  <manifest:file-entry manifest:media-type="image/svg+xml" manifest:full-path="Pictures/332.svg"/>
  <manifest:file-entry manifest:media-type="image/svg+xml" manifest:full-path="Pictures/331.svg"/>
  <manifest:file-entry manifest:media-type="image/svg+xml" manifest:full-path="Pictures/330.svg"/>
  <manifest:file-entry manifest:media-type="image/svg+xml" manifest:full-path="Pictures/329.svg"/>
  <manifest:file-entry manifest:media-type="image/svg+xml" manifest:full-path="Pictures/328.svg"/>
  <manifest:file-entry manifest:media-type="image/svg+xml" manifest:full-path="Pictures/327.svg"/>
  <manifest:file-entry manifest:media-type="image/svg+xml" manifest:full-path="Pictures/326.svg"/>
  <manifest:file-entry manifest:media-type="image/svg+xml" manifest:full-path="Pictures/325.svg"/>
  <manifest:file-entry manifest:media-type="image/svg+xml" manifest:full-path="Pictures/324.svg"/>
  <manifest:file-entry manifest:media-type="image/svg+xml" manifest:full-path="Pictures/323.svg"/>
  <manifest:file-entry manifest:media-type="image/svg+xml" manifest:full-path="Pictures/322.svg"/>
  <manifest:file-entry manifest:media-type="image/svg+xml" manifest:full-path="Pictures/321.svg"/>
  <manifest:file-entry manifest:media-type="image/svg+xml" manifest:full-path="Pictures/320.svg"/>
  <manifest:file-entry manifest:media-type="image/svg+xml" manifest:full-path="Pictures/319.svg"/>
  <manifest:file-entry manifest:media-type="image/svg+xml" manifest:full-path="Pictures/318.svg"/>
  <manifest:file-entry manifest:media-type="image/svg+xml" manifest:full-path="Pictures/317.svg"/>
  <manifest:file-entry manifest:media-type="image/svg+xml" manifest:full-path="Pictures/316.svg"/>
  <manifest:file-entry manifest:media-type="image/svg+xml" manifest:full-path="Pictures/315.svg"/>
  <manifest:file-entry manifest:media-type="image/svg+xml" manifest:full-path="Pictures/314.svg"/>
  <manifest:file-entry manifest:media-type="image/svg+xml" manifest:full-path="Pictures/313.svg"/>
  <manifest:file-entry manifest:media-type="image/svg+xml" manifest:full-path="Pictures/312.svg"/>
  <manifest:file-entry manifest:media-type="image/svg+xml" manifest:full-path="Pictures/311.svg"/>
  <manifest:file-entry manifest:media-type="image/svg+xml" manifest:full-path="Pictures/310.svg"/>
  <manifest:file-entry manifest:media-type="image/svg+xml" manifest:full-path="Pictures/309.svg"/>
  <manifest:file-entry manifest:media-type="image/svg+xml" manifest:full-path="Pictures/308.svg"/>
  <manifest:file-entry manifest:media-type="image/svg+xml" manifest:full-path="Pictures/307.svg"/>
  <manifest:file-entry manifest:media-type="image/svg+xml" manifest:full-path="Pictures/306.svg"/>
  <manifest:file-entry manifest:media-type="image/svg+xml" manifest:full-path="Pictures/305.svg"/>
  <manifest:file-entry manifest:media-type="image/svg+xml" manifest:full-path="Pictures/304.svg"/>
  <manifest:file-entry manifest:media-type="image/svg+xml" manifest:full-path="Pictures/303.svg"/>
  <manifest:file-entry manifest:media-type="image/svg+xml" manifest:full-path="Pictures/302.svg"/>
  <manifest:file-entry manifest:media-type="image/svg+xml" manifest:full-path="Pictures/301.svg"/>
  <manifest:file-entry manifest:media-type="image/svg+xml" manifest:full-path="Pictures/300.svg"/>
  <manifest:file-entry manifest:media-type="image/svg+xml" manifest:full-path="Pictures/299.svg"/>
  <manifest:file-entry manifest:media-type="image/svg+xml" manifest:full-path="Pictures/298.svg"/>
  <manifest:file-entry manifest:media-type="image/svg+xml" manifest:full-path="Pictures/297.svg"/>
  <manifest:file-entry manifest:media-type="image/svg+xml" manifest:full-path="Pictures/296.svg"/>
  <manifest:file-entry manifest:media-type="image/svg+xml" manifest:full-path="Pictures/295.svg"/>
  <manifest:file-entry manifest:media-type="image/svg+xml" manifest:full-path="Pictures/294.svg"/>
  <manifest:file-entry manifest:media-type="image/svg+xml" manifest:full-path="Pictures/293.svg"/>
  <manifest:file-entry manifest:media-type="image/svg+xml" manifest:full-path="Pictures/292.svg"/>
  <manifest:file-entry manifest:media-type="image/svg+xml" manifest:full-path="Pictures/291.svg"/>
  <manifest:file-entry manifest:media-type="image/svg+xml" manifest:full-path="Pictures/290.svg"/>
  <manifest:file-entry manifest:media-type="image/svg+xml" manifest:full-path="Pictures/289.svg"/>
  <manifest:file-entry manifest:media-type="image/svg+xml" manifest:full-path="Pictures/288.svg"/>
  <manifest:file-entry manifest:media-type="image/svg+xml" manifest:full-path="Pictures/287.svg"/>
  <manifest:file-entry manifest:media-type="image/svg+xml" manifest:full-path="Pictures/286.svg"/>
  <manifest:file-entry manifest:media-type="image/svg+xml" manifest:full-path="Pictures/285.svg"/>
  <manifest:file-entry manifest:media-type="image/svg+xml" manifest:full-path="Pictures/284.svg"/>
  <manifest:file-entry manifest:media-type="image/svg+xml" manifest:full-path="Pictures/283.svg"/>
  <manifest:file-entry manifest:media-type="image/svg+xml" manifest:full-path="Pictures/282.svg"/>
  <manifest:file-entry manifest:media-type="image/svg+xml" manifest:full-path="Pictures/281.svg"/>
  <manifest:file-entry manifest:media-type="image/svg+xml" manifest:full-path="Pictures/280.svg"/>
  <manifest:file-entry manifest:media-type="image/svg+xml" manifest:full-path="Pictures/279.svg"/>
  <manifest:file-entry manifest:media-type="image/svg+xml" manifest:full-path="Pictures/278.svg"/>
  <manifest:file-entry manifest:media-type="image/svg+xml" manifest:full-path="Pictures/277.svg"/>
  <manifest:file-entry manifest:media-type="image/svg+xml" manifest:full-path="Pictures/276.svg"/>
  <manifest:file-entry manifest:media-type="image/svg+xml" manifest:full-path="Pictures/275.svg"/>
  <manifest:file-entry manifest:media-type="image/svg+xml" manifest:full-path="Pictures/274.svg"/>
  <manifest:file-entry manifest:media-type="image/svg+xml" manifest:full-path="Pictures/273.svg"/>
  <manifest:file-entry manifest:media-type="image/svg+xml" manifest:full-path="Pictures/272.svg"/>
  <manifest:file-entry manifest:media-type="image/svg+xml" manifest:full-path="Pictures/271.svg"/>
  <manifest:file-entry manifest:media-type="image/svg+xml" manifest:full-path="Pictures/270.svg"/>
  <manifest:file-entry manifest:media-type="image/svg+xml" manifest:full-path="Pictures/269.svg"/>
  <manifest:file-entry manifest:media-type="image/svg+xml" manifest:full-path="Pictures/268.svg"/>
  <manifest:file-entry manifest:media-type="image/svg+xml" manifest:full-path="Pictures/267.svg"/>
  <manifest:file-entry manifest:media-type="image/svg+xml" manifest:full-path="Pictures/266.svg"/>
  <manifest:file-entry manifest:media-type="image/svg+xml" manifest:full-path="Pictures/265.svg"/>
  <manifest:file-entry manifest:media-type="image/svg+xml" manifest:full-path="Pictures/264.svg"/>
  <manifest:file-entry manifest:media-type="image/svg+xml" manifest:full-path="Pictures/263.svg"/>
  <manifest:file-entry manifest:media-type="image/svg+xml" manifest:full-path="Pictures/262.svg"/>
  <manifest:file-entry manifest:media-type="image/svg+xml" manifest:full-path="Pictures/261.svg"/>
  <manifest:file-entry manifest:media-type="image/svg+xml" manifest:full-path="Pictures/260.svg"/>
  <manifest:file-entry manifest:media-type="image/svg+xml" manifest:full-path="Pictures/259.svg"/>
  <manifest:file-entry manifest:media-type="image/svg+xml" manifest:full-path="Pictures/258.svg"/>
  <manifest:file-entry manifest:media-type="image/svg+xml" manifest:full-path="Pictures/257.svg"/>
  <manifest:file-entry manifest:media-type="image/svg+xml" manifest:full-path="Pictures/256.svg"/>
  <manifest:file-entry manifest:media-type="image/svg+xml" manifest:full-path="Pictures/255.svg"/>
  <manifest:file-entry manifest:media-type="image/svg+xml" manifest:full-path="Pictures/254.svg"/>
  <manifest:file-entry manifest:media-type="image/svg+xml" manifest:full-path="Pictures/253.svg"/>
  <manifest:file-entry manifest:media-type="image/svg+xml" manifest:full-path="Pictures/252.svg"/>
  <manifest:file-entry manifest:media-type="image/svg+xml" manifest:full-path="Pictures/251.svg"/>
  <manifest:file-entry manifest:media-type="image/svg+xml" manifest:full-path="Pictures/250.svg"/>
  <manifest:file-entry manifest:media-type="image/svg+xml" manifest:full-path="Pictures/249.svg"/>
  <manifest:file-entry manifest:media-type="image/svg+xml" manifest:full-path="Pictures/248.svg"/>
  <manifest:file-entry manifest:media-type="image/svg+xml" manifest:full-path="Pictures/247.svg"/>
  <manifest:file-entry manifest:media-type="image/svg+xml" manifest:full-path="Pictures/246.svg"/>
  <manifest:file-entry manifest:media-type="image/svg+xml" manifest:full-path="Pictures/245.svg"/>
  <manifest:file-entry manifest:media-type="image/svg+xml" manifest:full-path="Pictures/244.svg"/>
  <manifest:file-entry manifest:media-type="image/svg+xml" manifest:full-path="Pictures/243.svg"/>
  <manifest:file-entry manifest:media-type="image/svg+xml" manifest:full-path="Pictures/242.svg"/>
  <manifest:file-entry manifest:media-type="image/svg+xml" manifest:full-path="Pictures/241.svg"/>
  <manifest:file-entry manifest:media-type="image/svg+xml" manifest:full-path="Pictures/240.svg"/>
  <manifest:file-entry manifest:media-type="image/svg+xml" manifest:full-path="Pictures/239.svg"/>
  <manifest:file-entry manifest:media-type="image/svg+xml" manifest:full-path="Pictures/238.svg"/>
  <manifest:file-entry manifest:media-type="image/svg+xml" manifest:full-path="Pictures/237.svg"/>
  <manifest:file-entry manifest:media-type="image/svg+xml" manifest:full-path="Pictures/236.svg"/>
  <manifest:file-entry manifest:media-type="image/svg+xml" manifest:full-path="Pictures/235.svg"/>
  <manifest:file-entry manifest:media-type="image/svg+xml" manifest:full-path="Pictures/234.svg"/>
  <manifest:file-entry manifest:media-type="image/svg+xml" manifest:full-path="Pictures/233.svg"/>
  <manifest:file-entry manifest:media-type="image/svg+xml" manifest:full-path="Pictures/232.svg"/>
  <manifest:file-entry manifest:media-type="image/svg+xml" manifest:full-path="Pictures/231.svg"/>
  <manifest:file-entry manifest:media-type="image/svg+xml" manifest:full-path="Pictures/230.svg"/>
  <manifest:file-entry manifest:media-type="image/svg+xml" manifest:full-path="Pictures/229.svg"/>
  <manifest:file-entry manifest:media-type="image/svg+xml" manifest:full-path="Pictures/228.svg"/>
  <manifest:file-entry manifest:media-type="image/svg+xml" manifest:full-path="Pictures/227.svg"/>
  <manifest:file-entry manifest:media-type="image/svg+xml" manifest:full-path="Pictures/226.svg"/>
  <manifest:file-entry manifest:media-type="image/svg+xml" manifest:full-path="Pictures/225.svg"/>
  <manifest:file-entry manifest:media-type="image/svg+xml" manifest:full-path="Pictures/224.svg"/>
  <manifest:file-entry manifest:media-type="image/svg+xml" manifest:full-path="Pictures/223.svg"/>
  <manifest:file-entry manifest:media-type="image/svg+xml" manifest:full-path="Pictures/222.svg"/>
  <manifest:file-entry manifest:media-type="image/svg+xml" manifest:full-path="Pictures/221.svg"/>
  <manifest:file-entry manifest:media-type="image/svg+xml" manifest:full-path="Pictures/220.svg"/>
  <manifest:file-entry manifest:media-type="image/svg+xml" manifest:full-path="Pictures/219.svg"/>
  <manifest:file-entry manifest:media-type="image/svg+xml" manifest:full-path="Pictures/218.svg"/>
  <manifest:file-entry manifest:media-type="image/svg+xml" manifest:full-path="Pictures/217.svg"/>
  <manifest:file-entry manifest:media-type="image/svg+xml" manifest:full-path="Pictures/216.svg"/>
  <manifest:file-entry manifest:media-type="image/svg+xml" manifest:full-path="Pictures/215.svg"/>
  <manifest:file-entry manifest:media-type="image/svg+xml" manifest:full-path="Pictures/214.svg"/>
  <manifest:file-entry manifest:media-type="image/svg+xml" manifest:full-path="Pictures/213.svg"/>
  <manifest:file-entry manifest:media-type="image/svg+xml" manifest:full-path="Pictures/212.svg"/>
  <manifest:file-entry manifest:media-type="image/svg+xml" manifest:full-path="Pictures/211.svg"/>
  <manifest:file-entry manifest:media-type="image/svg+xml" manifest:full-path="Pictures/210.svg"/>
  <manifest:file-entry manifest:media-type="image/svg+xml" manifest:full-path="Pictures/209.svg"/>
  <manifest:file-entry manifest:media-type="image/svg+xml" manifest:full-path="Pictures/208.svg"/>
  <manifest:file-entry manifest:media-type="image/svg+xml" manifest:full-path="Pictures/207.svg"/>
  <manifest:file-entry manifest:media-type="image/svg+xml" manifest:full-path="Pictures/206.svg"/>
  <manifest:file-entry manifest:media-type="image/svg+xml" manifest:full-path="Pictures/205.svg"/>
  <manifest:file-entry manifest:media-type="image/svg+xml" manifest:full-path="Pictures/204.svg"/>
  <manifest:file-entry manifest:media-type="image/svg+xml" manifest:full-path="Pictures/203.svg"/>
  <manifest:file-entry manifest:media-type="image/svg+xml" manifest:full-path="Pictures/202.svg"/>
  <manifest:file-entry manifest:media-type="image/svg+xml" manifest:full-path="Pictures/201.svg"/>
  <manifest:file-entry manifest:media-type="image/svg+xml" manifest:full-path="Pictures/200.svg"/>
  <manifest:file-entry manifest:media-type="image/svg+xml" manifest:full-path="Pictures/199.svg"/>
  <manifest:file-entry manifest:media-type="image/svg+xml" manifest:full-path="Pictures/198.svg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6383*"/>
    </style:style>
    <style:style style:name="Table2.B" style:family="table-column">
      <style:table-column-properties style:rel-column-width="16383*"/>
    </style:style>
    <style:style style:name="Table2.C" style:family="table-column">
      <style:table-column-properties style:rel-column-width="16383*"/>
    </style:style>
    <style:style style:name="Table2.D" style:family="table-column">
      <style:table-column-properties style:rel-column-width="16383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<text:span text:style-name="T1">ABShow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63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6" office:name=""><text:span text:style-name="Definition">Measure</text:span></text:a></text:p>
          </table:table-cell>
          <table:table-cell table:style-name="TableRowCell" office:value-type="string">
            <text:p text:style-name="Table_20_Contents">Show measu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<text:span text:style-name="T1">ABShowWpButt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0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aypoint</text:p>
          </table:table-cell>
          <table:table-cell table:style-name="TableRowCell" office:value-type="string">
            <text:p text:style-name="Table_20_Contents"><text:a xlink:type="simple" xlink:href="../../viewer/style/icons.less#L409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3" office:name=""><text:span text:style-name="Definition">Wp</text:span></text:a></text:p>
          </table:table-cell>
          <table:table-cell table:style-name="TableRowCell" office:value-type="string">
            <text:p text:style-name="Table_20_Contents">Show wp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ABShowWpButtons</text:span></text:a></text:p>
          </table:table-cell>
          <table:table-cell table:style-name="TableRowCell" office:value-type="string">
            <text:p text:style-name="Table_20_Contents"><text:a xlink:type="simple" xlink:href="../../viewer/gui/NavPage.tsx#L94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1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ig</text:span></text:a></text:p>
          </table:table-cell>
          <table:table-cell table:style-name="TableRowCell" office:value-type="string">
            <text:p text:style-name="Table_20_Contents">Configure user ap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7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Edit image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" office:name=""><text:span text:style-name="Definition"><text:span text:style-name="T1">AddonConfigPlu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40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" office:name=""><text:span text:style-name="Definition">Add</text:span></text:a></text:p>
          </table:table-cell>
          <table:table-cell table:style-name="TableRowCell" office:value-type="string">
            <text:p text:style-name="Table_20_Contents">Add user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4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Edit 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6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Hide</text:span></text:a></text:p>
          </table:table-cell>
          <table:table-cell table:style-name="TableRowCell" office:value-type="string">
            <text:p text:style-name="Table_20_Contents">Hide target 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42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Targets</text:span></text:a></text:p>
          </table:table-cell>
          <table:table-cell table:style-name="TableRowCell" office:value-type="string">
            <text:p text:style-name="Table_20_Contents">Lis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5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Pause</text:span></text:a></text:p>
          </table:table-cell>
          <table:table-cell table:style-name="TableRowCell" office:value-type="string">
            <text:p text:style-name="Table_20_Contents">Pause lsiting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9" office:name=""><text:span text:style-name="Definition">Nearest</text:span></text:a></text:p>
          </table:table-cell>
          <table:table-cell table:style-name="TableRowCell" office:value-type="string">
            <text:p text:style-name="Table_20_Contents">Show 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3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Search</text:span></text:a></text:p>
          </table:table-cell>
          <table:table-cell table:style-name="TableRowCell" office:value-type="string">
            <text:p text:style-name="Table_20_Contents">Search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Sort</text:span></text:a></text:p>
          </table:table-cell>
          <table:table-cell table:style-name="TableRowCell" office:value-type="string">
            <text:p text:style-name="Table_20_Contents">Sor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7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7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5" office:name=""><text:span text:style-name="Definition">Browser</text:span></text:a></text:p>
          </table:table-cell>
          <table:table-cell table:style-name="TableRowCell" office:value-type="string">
            <text:p text:style-name="Table_20_Contents">Start 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30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" office:name=""><text:span text:style-name="Definition">Back</text:span></text:a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lose</text:span></text:a></text:p>
          </table:table-cell>
          <table:table-cell table:style-name="TableRowCell" office:value-type="string">
            <text:p text:style-name="Table_20_Contents">Close 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97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7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42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15" office:name=""><text:span text:style-name="Definition">components/AnchorWatch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3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88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Info</text:span></text:a></text:p>
          </table:table-cell>
          <table:table-cell table:style-name="TableRowCell" office:value-type="string">
            <text:p text:style-name="Table_20_Contents">Info at Crosshai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2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5" office:name=""><text:span text:style-name="Definition">Charts</text:span></text:a></text:p>
          </table:table-cell>
          <table:table-cell table:style-name="TableRowCell" office:value-type="string">
            <text:p text:style-name="Table_20_Contents">Select &amp; upload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8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3" office:name=""><text:span text:style-name="Definition">Connect</text:span></text:a></text:p>
          </table:table-cell>
          <table:table-cell table:style-name="TableRowCell" office:value-type="string">
            <text:p text:style-name="Table_20_Contents">Connect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3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24" office:name=""><text:span text:style-name="Definition">gui/NavPage.tsx</text:span></text:a></text:p>
          </table:table-cell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Course</text:span></text:a></text:p>
          </table:table-cell>
          <table:table-cell table:style-name="TableRowCell" office:value-type="string">
            <text:p text:style-name="Table_20_Contents">Course up / north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3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5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77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3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9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4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1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19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51" office:name=""><text:span text:style-name="Definition">gui/NavPage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2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6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7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8" office:name=""><text:span text:style-name="Definition">+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0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0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9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2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7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6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0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5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3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6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8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6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2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4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6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4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9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6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4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6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3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5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1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2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9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25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8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7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6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56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1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4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04" office:name=""><text:span text:style-name="Definition">gui/NavPage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4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5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3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5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23" office:name=""><text:span text:style-name="Definition">components/ItemNam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4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300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5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9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8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4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29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1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1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9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9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8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3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53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5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2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22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6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6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4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0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1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0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0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7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5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7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2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6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7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9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33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1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9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5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0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77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0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0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9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1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8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07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8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2" office:name=""><text:span text:style-name="Definition"><text:span text:style-name="T1">DBFeature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516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8" office:name=""><text:span text:style-name="Definition">New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2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46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303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0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3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4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4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90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7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8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716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74" office:name=""><text:span text:style-name="Definition">Ignore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8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8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64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7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4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2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1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8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7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0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5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0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6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6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7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3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5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9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10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1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7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4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0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6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9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6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0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8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6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88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3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3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7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2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1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9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4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8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9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5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9" office:name=""><text:span text:style-name="Definition">Open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7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9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5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7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3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1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79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2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1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38" office:name=""><text:span text:style-name="Definition">components/ItemNameDialog.jsx</text:span></text:a></text:p>
          </table:table-cell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22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3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15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1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5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0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9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20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13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4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1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70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1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1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1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2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6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1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3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9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0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6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3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6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33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2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9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7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1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0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3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4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4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44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9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8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83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3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8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5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7" office:name=""><text:span text:style-name="Definition"><text:span text:style-name="T1">DBUserAp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0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4" office:name=""><text:span text:style-name="Definition">User Ap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5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3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2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7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1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3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4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9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5" office:name=""><text:span text:style-name="Definition">En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5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7" office:name=""><text:span text:style-name="Definition">Remo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7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7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4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1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5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0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1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1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8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1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39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1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8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6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17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0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4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2" office:name=""><text:span text:style-name="Definition">Dash 1</text:span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0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9" office:name=""><text:span text:style-name="Definition">Dash 10</text:span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8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5" office:name=""><text:span text:style-name="Definition">Dash 2</text:span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2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8" office:name=""><text:span text:style-name="Definition">Dash 3</text:span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6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1" office:name=""><text:span text:style-name="Definition">Dash 4</text:span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0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4" office:name=""><text:span text:style-name="Definition">Dash 5</text:span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4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>Dash 6</text:span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8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>Dash 7</text:span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2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>Dash 8</text:span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6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6" office:name=""><text:span text:style-name="Definition">Dash 9</text:span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1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7" office:name=""><text:span text:style-name="Definition">GPS</text:span></text:a></text:p>
          </table:table-cell>
          <table:table-cell table:style-name="TableRowCell" office:value-type="string">
            <text:p text:style-name="Table_20_Contents">Center chart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.tsx#L95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3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4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Import</text:span></text:a></text:p>
          </table:table-cell>
          <table:table-cell table:style-name="TableRowCell" office:value-type="string">
            <text:p text:style-name="Table_20_Contents">Impor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2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86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7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0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Finished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9" office:name=""><text:span text:style-name="Definition"><text:span text:style-name="T1">LockMark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06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9" office:name=""><text:span text:style-name="Definition">LockMarker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5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84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Follow</text:span></text:a></text:p>
          </table:table-cell>
          <table:table-cell table:style-name="TableRowCell" office:value-type="string">
            <text:p text:style-name="Table_20_Contents">Chart follows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5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59" office:name=""><text:span text:style-name="Definition">components/Mob.ts</text:span></text:a></text:p>
          </table:table-cell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" office:name=""><text:span text:style-name="Definition">MOB</text:span></text:a></text:p>
          </table:table-cell>
          <table:table-cell table:style-name="TableRowCell" office:value-type="string">
            <text:p text:style-name="Table_20_Contents">Person over boar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2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7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0" office:name=""><text:span text:style-name="Definition">Info</text:span></text:a></text:p>
          </table:table-cell>
          <table:table-cell table:style-name="TableRowCell" office:value-type="string">
            <text:p text:style-name="Table_20_Contents">App version &amp;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5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426" office:name=""><text:span text:style-name="Definition">gui/MainNav.tsx</text:span></text:a></text:p>
          </table:table-cell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3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39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9" office:name=""><text:span text:style-name="Definition">Start</text:span></text:a></text:p>
          </table:table-cell>
          <table:table-cell table:style-name="TableRowCell" office:value-type="string">
            <text:p text:style-name="Table_20_Contents">Start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gui/NavPage.tsx#L83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<text:span text:style-name="T1">Measure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46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2" office:name=""><text:span text:style-name="Definition">Add</text:span></text:a></text:p>
          </table:table-cell>
          <table:table-cell table:style-name="TableRowCell" office:value-type="string">
            <text:p text:style-name="Table_20_Contents">Add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MeasureAdd</text:span></text:a></text:p>
          </table:table-cell>
          <table:table-cell table:style-name="TableRowCell" office:value-type="string">
            <text:p text:style-name="Table_20_Contents"><text:a xlink:type="simple" xlink:href="../../viewer/gui/NavPage.tsx#L83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5" office:name=""><text:span text:style-name="Definition"><text:span text:style-name="T1">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32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5" office:name=""><text:span text:style-name="Definition">Off</text:span></text:a></text:p>
          </table:table-cell>
          <table:table-cell table:style-name="TableRowCell" office:value-type="string">
            <text:p text:style-name="Table_20_Contents">Measurement 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5" office:name=""><text:span text:style-name="Definition">MeasureOff</text:span></text:a></text:p>
          </table:table-cell>
          <table:table-cell table:style-name="TableRowCell" office:value-type="string">
            <text:p text:style-name="Table_20_Contents"><text:a xlink:type="simple" xlink:href="../../viewer/gui/NavPage.tsx#L84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<text:span text:style-name="T1">NavActi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9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igation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navigation.svg</text:span></text:a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0" office:name=""><text:span text:style-name="Definition">Actions</text:span></text:a></text:p>
          </table:table-cell>
          <table:table-cell table:style-name="TableRowCell" office:value-type="string">
            <text:p text:style-name="Table_20_Contents">Show nav acti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.tsx#L94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98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Before</text:span></text:a></text:p>
          </table:table-cell>
          <table:table-cell table:style-name="TableRowCell" office:value-type="string">
            <text:p text:style-name="Table_20_Contents">Add wp before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38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1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After</text:span></text:a></text:p>
          </table:table-cell>
          <table:table-cell table:style-name="TableRowCell" office:value-type="string">
            <text:p text:style-name="Table_20_Contents">Add wp after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21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5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1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Delete</text:span></text:a></text:p>
          </table:table-cell>
          <table:table-cell table:style-name="TableRowCell" office:value-type="string">
            <text:p text:style-name="Table_20_Contents">Delete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8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73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82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9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17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8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68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9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3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37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Skip</text:span></text:a></text:p>
          </table:table-cell>
          <table:table-cell table:style-name="TableRowCell" office:value-type="string">
            <text:p text:style-name="Table_20_Contents">Skip curren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1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25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NavSelectChar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0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Charts</text:span></text:a></text:p>
          </table:table-cell>
          <table:table-cell table:style-name="TableRowCell" office:value-type="string">
            <text:p text:style-name="Table_20_Contents">Selec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.tsx#L94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0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2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Shift</text:span></text:a></text:p>
          </table:table-cell>
          <table:table-cell table:style-name="TableRowCell" office:value-type="string">
            <text:p text:style-name="Table_20_Contents">Shift wp to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69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3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/D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9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7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Overlays</text:span></text:a></text:p>
          </table:table-cell>
          <table:table-cell table:style-name="TableRowCell" office:value-type="string">
            <text:p text:style-name="Table_20_Contents">Edit 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4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33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6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0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7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9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18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Edit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8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1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6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Default</text:span></text:a></text:p>
          </table:table-cell>
          <table:table-cell table:style-name="TableRowCell" office:value-type="string">
            <text:p text:style-name="Table_20_Contents">Reset to default valu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2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4" office:name=""><text:span text:style-name="Definition">List</text:span></text:a></text:p>
          </table:table-cell>
          <table:table-cell table:style-name="TableRowCell" office:value-type="string">
            <text:p text:style-name="Table_20_Contents">Lis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2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04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9" office:name=""><text:span text:style-name="Definition">Remove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0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4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8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7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31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Route</text:span></text:a></text:p>
          </table:table-cell>
          <table:table-cell table:style-name="TableRowCell" office:value-type="string">
            <text:p text:style-name="Table_20_Contents">Open route edito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7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3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3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1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97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9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9" office:name=""><text:span text:style-name="Definition">Net</text:span></text:a></text:p>
          </table:table-cell>
          <table:table-cell table:style-name="TableRowCell" office:value-type="string">
            <text:p text:style-name="Table_20_Contents">Network 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1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3" office:name=""><text:span text:style-name="Definition">Expand</text:span></text:a></text:p>
          </table:table-cell>
          <table:table-cell table:style-name="TableRowCell" office:value-type="string">
            <text:p text:style-name="Table_20_Contents">List all handler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3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2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3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7" office:name=""><text:span text:style-name="Definition">Debug</text:span></text:a></text:p>
          </table:table-cell>
          <table:table-cell table:style-name="TableRowCell" office:value-type="string">
            <text:p text:style-name="Table_20_Contents">Enable debugg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9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4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5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1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1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8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 compu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5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6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1" office:name=""><text:span text:style-name="Definition"><text:span text:style-name="T1">Stop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02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AnchorEnd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anchor-end.svg</text:span></text:a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Stop</text:span></text:a></text:p>
          </table:table-cell>
          <table:table-cell table:style-name="TableRowCell" office:value-type="string">
            <text:p text:style-name="Table_20_Contents">Stop 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7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25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72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91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2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6" office:name=""><text:span text:style-name="Definition">List</text:span></text:a></text:p>
          </table:table-cell>
          <table:table-cell table:style-name="TableRowCell" office:value-type="string">
            <text:p text:style-name="Table_20_Contents">Edi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4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0" office:name=""><text:span text:style-name="Definition">Sync</text:span></text:a></text:p>
          </table:table-cell>
          <table:table-cell table:style-name="TableRowCell" office:value-type="string">
            <text:p text:style-name="Table_20_Contents">Sync routes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<text:span text:style-name="T1">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53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8" office:name=""><text:span text:style-name="Definition">Route</text:span></text:a></text:p>
          </table:table-cell>
          <table:table-cell table:style-name="TableRowCell" office:value-type="string">
            <text:p text:style-name="Table_20_Contents">To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51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6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1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7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3" office:name=""><text:span text:style-name="Definition">List</text:span></text:a></text:p>
          </table:table-cell>
          <table:table-cell table:style-name="TableRowCell" office:value-type="string">
            <text:p text:style-name="Table_20_Contents">Edi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Upload</text:span></text:a></text:p>
          </table:table-cell>
          <table:table-cell table:style-name="TableRowCell" office:value-type="string">
            <text:p text:style-name="Table_20_Contents">Upload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306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3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19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1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29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7" office:name=""><text:span text:style-name="Definition"><text:span text:style-name="T1">WpGoto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12" office:name=""><text:span text:style-name="Definition">gui/NavPage.tsx</text:span></text:a></text:p>
          </table:table-cell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4" office:name=""><text:span text:style-name="Definition">Start</text:span></text:a></text:p>
          </table:table-cell>
          <table:table-cell table:style-name="TableRowCell" office:value-type="string">
            <text:p text:style-name="Table_20_Contents">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0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5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28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2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5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4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6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0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Zoom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87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0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1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88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201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1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07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6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7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26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5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<text:span text:style-name="T1">Empt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8" office:name=""><text:span text:style-name="Definition">Non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8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3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7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6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6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1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0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4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4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4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13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1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4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4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7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6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206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6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6" office:name=""><text:span text:style-name="Definition">MNCollapsed</text:span></text:a></text:p>
          </table:table-cell>
          <table:table-cell table:style-name="TableRowCell" office:value-type="string">
            <text:p text:style-name="Table_20_Contents"><text:a xlink:type="simple" xlink:href="../../viewer/gui/MainNav.tsx#L344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0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206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0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0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352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7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7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3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3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1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1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7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7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68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3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0" office:name=""><text:span text:style-name="Definition"><text:span text:style-name="T1">Radio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4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4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99" svg:width="0.41667in" svg:height="0.4166666666666667in"><draw:image xlink:href="Pictures/19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200" svg:width="0.41667in" svg:height="0.4166666666666667in"><draw:image xlink:href="Pictures/19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9" office:name=""><text:span text:style-name="Definition"><text:span text:style-name="T1">Satelli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meStatusWidget.tsx#L58" office:name=""><text:span text:style-name="Definition">components/TimeStatusWidge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9" office:name=""><text:span text:style-name="Definition">satellite-alt-200.svg</text:span></text:a></text:p>
          </table:table-cell>
          <table:table-cell table:style-name="TableRowCell" office:value-type="string">
            <text:p text:style-name="Table_20_Contents"><draw:frame draw:name="img201" svg:width="0.41667in" svg:height="0.4166666666666667in"><draw:image xlink:href="Pictures/20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36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202" svg:width="0.41667in" svg:height="0.4166666666666667in"><draw:image xlink:href="Pictures/20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203" svg:width="0.41667in" svg:height="0.4166666666666667in"><draw:image xlink:href="Pictures/20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4" office:name=""><text:span text:style-name="Definition"><text:span text:style-name="T1">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4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204" svg:width="0.41667in" svg:height="0.4166666666666667in"><draw:image xlink:href="Pictures/20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7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05" svg:width="0.41667in" svg:height="0.4166666666666667in"><draw:image xlink:href="Pictures/20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3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206" svg:width="0.41667in" svg:height="0.4166666666666667in"><draw:image xlink:href="Pictures/20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9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9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07" svg:width="0.41667in" svg:height="0.4166666666666667in"><draw:image xlink:href="Pictures/20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9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Usage</text:p>
            </table:table-cell>
          </table:table-row>
        </table:table-header-rows>
        <table:table-row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208" svg:width="0.41667in" svg:height="0.4166666666666667in"><draw:image xlink:href="Pictures/207.svg" xlink:type="simple" xlink:show="embed" xlink:actuate="onLoad"/></draw:frame></text:p>
          </table:table-cell>
          <table:table-cell table:style-name="TableRowCell" office:value-type="string">
            <text:p text:style-name="Table_20_Contents">AddonConfigAddOns,DBUserApp</text:p>
          </table:table-cell>
        </table:table-row>
        <table:table-row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09" svg:width="0.41667in" svg:height="0.4166666666666667in"><draw:image xlink:href="Pictures/208.svg" xlink:type="simple" xlink:show="embed" xlink:actuate="onLoad"/></draw:frame></text:p>
          </table:table-cell>
          <table:table-cell table:style-name="TableRowCell" office:value-type="string">
            <text:p text:style-name="Table_20_Contents">DBInsertAfter,DBAfter,DBInsert</text:p>
          </table:table-cell>
        </table:table-row>
        <table:table-row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10" svg:width="0.41667in" svg:height="0.4166666666666667in"><draw:image xlink:href="Pictures/209.svg" xlink:type="simple" xlink:show="embed" xlink:actuate="onLoad"/></draw:frame></text:p>
          </table:table-cell>
          <table:table-cell table:style-name="TableRowCell" office:value-type="string">
            <text:p text:style-name="Table_20_Contents">AisInfoHide</text:p>
          </table:table-cell>
        </table:table-row>
        <table:table-row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211" svg:width="0.41667in" svg:height="0.4166666666666667in"><draw:image xlink:href="Pictures/210.svg" xlink:type="simple" xlink:show="embed" xlink:actuate="onLoad"/></draw:frame></text:p>
          </table:table-cell>
          <table:table-cell table:style-name="TableRowCell" office:value-type="string">
            <text:p text:style-name="Table_20_Contents">AisNearest</text:p>
          </table:table-cell>
        </table:table-row>
        <table:table-row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212" svg:width="0.41667in" svg:height="0.4166666666666667in"><draw:image xlink:href="Pictures/211.svg" xlink:type="simple" xlink:show="embed" xlink:actuate="onLoad"/></draw:frame></text:p>
          </table:table-cell>
          <table:table-cell table:style-name="TableRowCell" office:value-type="string">
            <text:p text:style-name="Table_20_Contents">AnchorWatch,code</text:p>
          </table:table-cell>
        </table:table-row>
        <table:table-row>
          <table:table-cell table:style-name="TableRowCell" office:value-type="string">
            <text:p text:style-name="Table_20_Contents">AnchorEnd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anchor-end.svg</text:span></text:a></text:p>
          </table:table-cell>
          <table:table-cell table:style-name="TableRowCell" office:value-type="string">
            <text:p text:style-name="Table_20_Contents"><draw:frame draw:name="img213" svg:width="0.41667in" svg:height="0.4166666666666667in"><draw:image xlink:href="Pictures/212.svg" xlink:type="simple" xlink:show="embed" xlink:actuate="onLoad"/></draw:frame></text:p>
          </table:table-cell>
          <table:table-cell table:style-name="TableRowCell" office:value-type="string">
            <text:p text:style-name="Table_20_Contents">StopAnchorWatch</text:p>
          </table:table-cell>
        </table:table-row>
        <table:table-row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214" svg:width="0.41667in" svg:height="0.4166666666666667in"><draw:image xlink:href="Pictures/213.svg" xlink:type="simple" xlink:show="embed" xlink:actuate="onLoad"/></draw:frame></text:p>
          </table:table-cell>
          <table:table-cell table:style-name="TableRowCell" office:value-type="string">
            <text:p text:style-name="Table_20_Contents">StatusAndroid</text:p>
          </table:table-cell>
        </table:table-row>
        <table:table-row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215" svg:width="0.41667in" svg:height="0.4166666666666667in"><draw:image xlink:href="Pictures/214.svg" xlink:type="simple" xlink:show="embed" xlink:actuate="onLoad"/></draw:frame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16" svg:width="0.41667in" svg:height="0.4166666666666667in"><draw:image xlink:href="Pictures/215.svg" xlink:type="simple" xlink:show="embed" xlink:actuate="onLoad"/></draw:frame></text:p>
          </table:table-cell>
          <table:table-cell table:style-name="TableRowCell" office:value-type="string">
            <text:p text:style-name="Table_20_Contents">DBInsertBefore,DBBefore</text:p>
          </table:table-cell>
        </table:table-row>
        <table:table-row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17" svg:width="0.41667in" svg:height="0.4166666666666667in"><draw:image xlink:href="Pictures/216.svg" xlink:type="simple" xlink:show="embed" xlink:actuate="onLoad"/></draw:frame></text:p>
          </table:table-cell>
          <table:table-cell table:style-name="TableRowCell" office:value-type="string">
            <text:p text:style-name="Table_20_Contents">DBAnchorBoat,code</text:p>
          </table:table-cell>
        </table:table-row>
        <table:table-row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18" svg:width="0.41667in" svg:height="0.4166666666666667in"><draw:image xlink:href="Pictures/217.svg" xlink:type="simple" xlink:show="embed" xlink:actuate="onLoad"/></draw:frame></text:p>
          </table:table-cell>
          <table:table-cell table:style-name="TableRowCell" office:value-type="string">
            <text:p text:style-name="Table_20_Contents">AndroidBrowser,code</text:p>
          </table:table-cell>
        </table:table-row>
        <table:table-row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219" svg:width="0.41667in" svg:height="0.4166666666666667in"><draw:image xlink:href="Pictures/218.svg" xlink:type="simple" xlink:show="embed" xlink:actuate="onLoad"/></draw:frame></text:p>
          </table:table-cell>
          <table:table-cell table:style-name="TableRowCell" office:value-type="string">
            <text:p text:style-name="Table_20_Contents">Cancel,MainExit,DBCancel</text:p>
          </table:table-cell>
        </table:table-row>
        <table:table-row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20" svg:width="0.41667in" svg:height="0.4166666666666667in"><draw:image xlink:href="Pictures/219.svg" xlink:type="simple" xlink:show="embed" xlink:actuate="onLoad"/></draw:frame></text:p>
          </table:table-cell>
          <table:table-cell table:style-name="TableRowCell" office:value-type="string">
            <text:p text:style-name="Table_20_Contents">AisInfoLocate,GpsCenter,DBAnchorCenter,DBCenter</text:p>
          </table:table-cell>
        </table:table-row>
        <table:table-row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221" svg:width="0.41667in" svg:height="0.4166666666666667in"><draw:image xlink:href="Pictures/220.svg" xlink:type="simple" xlink:show="embed" xlink:actuate="onLoad"/></draw:frame></text:p>
          </table:table-cell>
          <table:table-cell table:style-name="TableRowCell" office:value-type="string">
            <text:p text:style-name="Table_20_Contents">CenterAction</text:p>
          </table:table-cell>
        </table:table-row>
        <table:table-row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33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222" svg:width="0.41667in" svg:height="0.4166666666666667in"><draw:image xlink:href="Pictures/221.svg" xlink:type="simple" xlink:show="embed" xlink:actuate="onLoad"/></draw:frame></text:p>
          </table:table-cell>
          <table:table-cell table:style-name="TableRowCell" office:value-type="string">
            <text:p text:style-name="Table_20_Contents">DBScheme</text:p>
          </table:table-cell>
        </table:table-row>
        <table:table-row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223" svg:width="0.41667in" svg:height="0.4166666666666667in"><draw:image xlink:href="Pictures/222.svg" xlink:type="simple" xlink:show="embed" xlink:actuate="onLoad"/></draw:frame></text:p>
          </table:table-cell>
          <table:table-cell table:style-name="TableRowCell" office:value-type="string">
            <text:p text:style-name="Table_20_Contents">ChartsView,DBOpenChart,code</text:p>
          </table:table-cell>
        </table:table-row>
        <table:table-row>
          <table:table-cell table:style-name="TableRowCell" office:value-type="string">
            <text:p text:style-name="Table_20_Contents">Checked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224" svg:width="0.41667in" svg:height="0.4166666666666667in"><draw:image xlink:href="Pictures/22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29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25" svg:width="0.41667in" svg:height="0.4166666666666667in"><draw:image xlink:href="Pictures/224.svg" xlink:type="simple" xlink:show="embed" xlink:actuate="onLoad"/></draw:frame></text:p>
          </table:table-cell>
          <table:table-cell table:style-name="TableRowCell" office:value-type="string">
            <text:p text:style-name="Table_20_Contents">DBConnect</text:p>
          </table:table-cell>
        </table:table-row>
        <table:table-row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26" svg:width="0.41667in" svg:height="0.4166666666666667in"><draw:image xlink:href="Pictures/225.svg" xlink:type="simple" xlink:show="embed" xlink:actuate="onLoad"/></draw:frame></text:p>
          </table:table-cell>
          <table:table-cell table:style-name="TableRowCell" office:value-type="string">
            <text:p text:style-name="Table_20_Contents">Connected</text:p>
          </table:table-cell>
        </table:table-row>
        <table:table-row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227" svg:width="0.41667in" svg:height="0.4166666666666667in"><draw:image xlink:href="Pictures/226.svg" xlink:type="simple" xlink:show="embed" xlink:actuate="onLoad"/></draw:frame></text:p>
          </table:table-cell>
          <table:table-cell table:style-name="TableRowCell" office:value-type="string">
            <text:p text:style-name="Table_20_Contents">DBCopy</text:p>
          </table:table-cell>
        </table:table-row>
        <table:table-row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228" svg:width="0.41667in" svg:height="0.4166666666666667in"><draw:image xlink:href="Pictures/227.svg" xlink:type="simple" xlink:show="embed" xlink:actuate="onLoad"/></draw:frame></text:p>
          </table:table-cell>
          <table:table-cell table:style-name="TableRowCell" office:value-type="string">
            <text:p text:style-name="Table_20_Contents">CourseUp</text:p>
          </table:table-cell>
        </table:table-row>
        <table:table-row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229" svg:width="0.41667in" svg:height="0.4166666666666667in"><draw:image xlink:href="Pictures/228.svg" xlink:type="simple" xlink:show="embed" xlink:actuate="onLoad"/></draw:frame></text:p>
          </table:table-cell>
          <table:table-cell table:style-name="TableRowCell" office:value-type="string">
            <text:p text:style-name="Table_20_Contents">StatusDebug</text:p>
          </table:table-cell>
        </table:table-row>
        <table:table-row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230" svg:width="0.41667in" svg:height="0.4166666666666667in"><draw:image xlink:href="Pictures/229.svg" xlink:type="simple" xlink:show="embed" xlink:actuate="onLoad"/></draw:frame></text:p>
          </table:table-cell>
          <table:table-cell table:style-name="TableRowCell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231" svg:width="0.41667in" svg:height="0.4166666666666667in"><draw:image xlink:href="Pictures/230.svg" xlink:type="simple" xlink:show="embed" xlink:actuate="onLoad"/></draw:frame></text:p>
          </table:table-cell>
          <table:table-cell table:style-name="TableRowCell" office:value-type="string">
            <text:p text:style-name="Table_20_Contents">Dim</text:p>
          </table:table-cell>
        </table:table-row>
        <table:table-row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32" svg:width="0.41667in" svg:height="0.4166666666666667in"><draw:image xlink:href="Pictures/231.svg" xlink:type="simple" xlink:show="embed" xlink:actuate="onLoad"/></draw:frame></text:p>
          </table:table-cell>
          <table:table-cell table:style-name="TableRowCell" office:value-type="string">
            <text:p text:style-name="Table_20_Contents">DBDisable</text:p>
          </table:table-cell>
        </table:table-row>
        <table:table-row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233" svg:width="0.41667in" svg:height="0.4166666666666667in"><draw:image xlink:href="Pictures/232.svg" xlink:type="simple" xlink:show="embed" xlink:actuate="onLoad"/></draw:frame></text:p>
          </table:table-cell>
          <table:table-cell table:style-name="TableRowCell" office:value-type="string">
            <text:p text:style-name="Table_20_Contents">DBDisconnect,code</text:p>
          </table:table-cell>
        </table:table-row>
        <table:table-row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234" svg:width="0.41667in" svg:height="0.4166666666666667in"><draw:image xlink:href="Pictures/233.svg" xlink:type="simple" xlink:show="embed" xlink:actuate="onLoad"/></draw:frame></text:p>
          </table:table-cell>
          <table:table-cell table:style-name="TableRowCell" office:value-type="string">
            <text:p text:style-name="Table_20_Contents">DBDownload</text:p>
          </table:table-cell>
        </table:table-row>
        <table:table-row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235" svg:width="0.41667in" svg:height="0.4166666666666667in"><draw:image xlink:href="Pictures/234.svg" xlink:type="simple" xlink:show="embed" xlink:actuate="onLoad"/></draw:frame></text:p>
          </table:table-cell>
          <table:table-cell table:style-name="TableRowCell" office:value-type="string">
            <text:p text:style-name="Table_20_Contents">WpEdit,Edit,DBRename,DBEditCss,DBConfig,code</text:p>
          </table:table-cell>
        </table:table-row>
        <table:table-row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236" svg:width="0.41667in" svg:height="0.4166666666666667in"><draw:image xlink:href="Pictures/235.svg" xlink:type="simple" xlink:show="embed" xlink:actuate="onLoad"/></draw:frame></text:p>
          </table:table-cell>
          <table:table-cell table:style-name="TableRowCell" office:value-type="string">
            <text:p text:style-name="Table_20_Contents">EditPage</text:p>
          </table:table-cell>
        </table:table-row>
        <table:table-row>
          <table:table-cell table:style-name="TableRowCell" office:value-type="string">
            <text:p text:style-name="Table_20_Contents">Empty</text:p>
          </table:table-cell>
          <table:table-cell table:style-name="TableRowCell" office:value-type="string">
            <text:p text:style-name="Table_20_Contents"><text:a xlink:type="simple" xlink:href="../../viewer/style/icons.less#L348" office:name=""><text:span text:style-name="Definition">None</text:span></text:a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07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237" svg:width="0.41667in" svg:height="0.4166666666666667in"><draw:image xlink:href="Pictures/236.svg" xlink:type="simple" xlink:show="embed" xlink:actuate="onLoad"/></draw:frame></text:p>
          </table:table-cell>
          <table:table-cell table:style-name="TableRowCell" office:value-type="string">
            <text:p text:style-name="Table_20_Contents">DBEmptyRoute</text:p>
          </table:table-cell>
        </table:table-row>
        <table:table-row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238" svg:width="0.41667in" svg:height="0.4166666666666667in"><draw:image xlink:href="Pictures/237.svg" xlink:type="simple" xlink:show="embed" xlink:actuate="onLoad"/></draw:frame></text:p>
          </table:table-cell>
          <table:table-cell table:style-name="TableRowCell" office:value-type="string">
            <text:p text:style-name="Table_20_Contents">StatusAll</text:p>
          </table:table-cell>
        </table:table-row>
        <table:table-row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239" svg:width="0.41667in" svg:height="0.4166666666666667in"><draw:image xlink:href="Pictures/238.svg" xlink:type="simple" xlink:show="embed" xlink:actuate="onLoad"/></draw:frame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240" svg:width="0.41667in" svg:height="0.4166666666666667in"><draw:image xlink:href="Pictures/239.svg" xlink:type="simple" xlink:show="embed" xlink:actuate="onLoad"/></draw:frame></text:p>
          </table:table-cell>
          <table:table-cell table:style-name="TableRowCell" office:value-type="string">
            <text:p text:style-name="Table_20_Contents">Help</text:p>
          </table:table-cell>
        </table:table-row>
        <table:table-row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303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241" svg:width="0.41667in" svg:height="0.4166666666666667in"><draw:image xlink:href="Pictures/240.svg" xlink:type="simple" xlink:show="embed" xlink:actuate="onLoad"/></draw:frame></text:p>
          </table:table-cell>
          <table:table-cell table:style-name="TableRowCell" office:value-type="string">
            <text:p text:style-name="Table_20_Contents">DBHide</text:p>
          </table:table-cell>
        </table:table-row>
        <table:table-row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242" svg:width="0.41667in" svg:height="0.4166666666666667in"><draw:image xlink:href="Pictures/241.svg" xlink:type="simple" xlink:show="embed" xlink:actuate="onLoad"/></draw:frame></text:p>
          </table:table-cell>
          <table:table-cell table:style-name="TableRowCell" office:value-type="string">
            <text:p text:style-name="Table_20_Contents">DBHideOverlays,DBHideAllOverlays</text:p>
          </table:table-cell>
        </table:table-row>
        <table:table-row>
          <table:table-cell table:style-name="TableRowCell" office:value-type="string">
            <text:p text:style-name="Table_20_Contents">ITDirectory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43" svg:width="0.41667in" svg:height="0.4166666666666667in"><draw:image xlink:href="Pictures/24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Html</text:p>
          </table:table-cell>
          <table:table-cell table:style-name="TableRowCell" office:value-type="string">
            <text:p text:style-name="Table_20_Contents"><text:a xlink:type="simple" xlink:href="../../viewer/style/icons.less#L387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44" svg:width="0.41667in" svg:height="0.4166666666666667in"><draw:image xlink:href="Pictures/24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Other</text:p>
          </table:table-cell>
          <table:table-cell table:style-name="TableRowCell" office:value-type="string">
            <text:p text:style-name="Table_20_Contents"><text:a xlink:type="simple" xlink:href="../../viewer/style/icons.less#L396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245" svg:width="0.41667in" svg:height="0.4166666666666667in"><draw:image xlink:href="Pictures/24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Server</text:p>
          </table:table-cell>
          <table:table-cell table:style-name="TableRowCell" office:value-type="string">
            <text:p text:style-name="Table_20_Contents"><text:a xlink:type="simple" xlink:href="../../viewer/style/icons.less#L38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46" svg:width="0.41667in" svg:height="0.4166666666666667in"><draw:image xlink:href="Pictures/24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Text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47" svg:width="0.41667in" svg:height="0.4166666666666667in"><draw:image xlink:href="Pictures/24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UserSpecial</text:p>
          </table:table-cell>
          <table:table-cell table:style-name="TableRowCell" office:value-type="string">
            <text:p text:style-name="Table_20_Contents"><text:a xlink:type="simple" xlink:href="../../viewer/style/icons.less#L384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248" svg:width="0.41667in" svg:height="0.4166666666666667in"><draw:image xlink:href="Pictures/24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249" svg:width="0.41667in" svg:height="0.4166666666666667in"><draw:image xlink:href="Pictures/248.svg" xlink:type="simple" xlink:show="embed" xlink:actuate="onLoad"/></draw:frame></text:p>
          </table:table-cell>
          <table:table-cell table:style-name="TableRowCell" office:value-type="string">
            <text:p text:style-name="Table_20_Contents">AddonConfigImages,code</text:p>
          </table:table-cell>
        </table:table-row>
        <table:table-row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250" svg:width="0.41667in" svg:height="0.4166666666666667in"><draw:image xlink:href="Pictures/249.svg" xlink:type="simple" xlink:show="embed" xlink:actuate="onLoad"/></draw:frame></text:p>
          </table:table-cell>
          <table:table-cell table:style-name="TableRowCell" office:value-type="string">
            <text:p text:style-name="Table_20_Contents">ImportsView</text:p>
          </table:table-cell>
        </table:table-row>
        <table:table-row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251" svg:width="0.41667in" svg:height="0.4166666666666667in"><draw:image xlink:href="Pictures/250.svg" xlink:type="simple" xlink:show="embed" xlink:actuate="onLoad"/></draw:frame></text:p>
          </table:table-cell>
          <table:table-cell table:style-name="TableRowCell" office:value-type="string">
            <text:p text:style-name="Table_20_Contents">MainInfo,DBInfo</text:p>
          </table:table-cell>
        </table:table-row>
        <table:table-row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10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252" svg:width="0.41667in" svg:height="0.4166666666666667in"><draw:image xlink:href="Pictures/251.svg" xlink:type="simple" xlink:show="embed" xlink:actuate="onLoad"/></draw:frame></text:p>
          </table:table-cell>
          <table:table-cell table:style-name="TableRowCell" office:value-type="string">
            <text:p text:style-name="Table_20_Contents">DBInvertRoute</text:p>
          </table:table-cell>
        </table:table-row>
        <table:table-row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253" svg:width="0.41667in" svg:height="0.4166666666666667in"><draw:image xlink:href="Pictures/252.svg" xlink:type="simple" xlink:show="embed" xlink:actuate="onLoad"/></draw:frame></text:p>
          </table:table-cell>
          <table:table-cell table:style-name="TableRowCell" office:value-type="string">
            <text:p text:style-name="Table_20_Contents">AisItems,StoredRoutes,SettingsItems,TrackItems</text:p>
          </table:table-cell>
        </table:table-row>
        <table:table-row>
          <table:table-cell table:style-name="TableRowCell" office:value-type="string">
            <text:p text:style-name="Table_20_Contents">JSChanged</text:p>
          </table:table-cell>
          <table:table-cell table:style-name="TableRowCell" office:value-type="string">
            <text:p text:style-name="Table_20_Contents"><text:a xlink:type="simple" xlink:href="../../viewer/style/icons.less#L414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254" svg:width="0.41667in" svg:height="0.4166666666666667in"><draw:image xlink:href="Pictures/25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255" svg:width="0.41667in" svg:height="0.4166666666666667in"><draw:image xlink:href="Pictures/254.svg" xlink:type="simple" xlink:show="embed" xlink:actuate="onLoad"/></draw:frame></text:p>
          </table:table-cell>
          <table:table-cell table:style-name="TableRowCell" office:value-type="string">
            <text:p text:style-name="Table_20_Contents">Layout,LayoutFinished,DBEditLayout,code</text:p>
          </table:table-cell>
        </table:table-row>
        <table:table-row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256" svg:width="0.41667in" svg:height="0.4166666666666667in"><draw:image xlink:href="Pictures/255.svg" xlink:type="simple" xlink:show="embed" xlink:actuate="onLoad"/></draw:frame></text:p>
          </table:table-cell>
          <table:table-cell table:style-name="TableRowCell" office:value-type="string">
            <text:p text:style-name="Table_20_Contents">SettingsLayoutOff</text:p>
          </table:table-cell>
        </table:table-row>
        <table:table-row>
          <table:table-cell table:style-name="TableRowCell" office:value-type="string">
            <text:p text:style-name="Table_20_Contents">Left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57" svg:width="0.41667in" svg:height="0.4166666666666667in"><draw:image xlink:href="Pictures/25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258" svg:width="0.41667in" svg:height="0.4166666666666667in"><draw:image xlink:href="Pictures/257.svg" xlink:type="simple" xlink:show="embed" xlink:actuate="onLoad"/></draw:frame></text:p>
          </table:table-cell>
          <table:table-cell table:style-name="TableRowCell" office:value-type="string">
            <text:p text:style-name="Table_20_Contents">AisLock</text:p>
          </table:table-cell>
        </table:table-row>
        <table:table-row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59" svg:width="0.41667in" svg:height="0.4166666666666667in"><draw:image xlink:href="Pictures/258.svg" xlink:type="simple" xlink:show="embed" xlink:actuate="onLoad"/></draw:frame></text:p>
          </table:table-cell>
          <table:table-cell table:style-name="TableRowCell" office:value-type="string">
            <text:p text:style-name="Table_20_Contents">LockMarker</text:p>
          </table:table-cell>
        </table:table-row>
        <table:table-row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60" svg:width="0.41667in" svg:height="0.4166666666666667in"><draw:image xlink:href="Pictures/259.svg" xlink:type="simple" xlink:show="embed" xlink:actuate="onLoad"/></draw:frame></text:p>
          </table:table-cell>
          <table:table-cell table:style-name="TableRowCell" office:value-type="string">
            <text:p text:style-name="Table_20_Contents">LockPos</text:p>
          </table:table-cell>
        </table:table-row>
        <table:table-row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61" svg:width="0.41667in" svg:height="0.4166666666666667in"><draw:image xlink:href="Pictures/260.svg" xlink:type="simple" xlink:show="embed" xlink:actuate="onLoad"/></draw:frame></text:p>
          </table:table-cell>
          <table:table-cell table:style-name="TableRowCell" office:value-type="string">
            <text:p text:style-name="Table_20_Contents">StatusLog,DBLog</text:p>
          </table:table-cell>
        </table:table-row>
        <table:table-row>
          <table:table-cell table:style-name="TableRowCell" office:value-type="string">
            <text:p text:style-name="Table_20_Contents">MNCatNav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62" svg:width="0.41667in" svg:height="0.4166666666666667in"><draw:image xlink:href="Pictures/26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atSet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263" svg:width="0.41667in" svg:height="0.4166666666666667in"><draw:image xlink:href="Pictures/26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ollapsed</text:p>
          </table:table-cell>
          <table:table-cell table:style-name="TableRowCell" office:value-type="string">
            <text:p text:style-name="Table_20_Contents"><text:a xlink:type="simple" xlink:href="../../viewer/style/icons.less#L366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4" svg:width="0.41667in" svg:height="0.4166666666666667in"><draw:image xlink:href="Pictures/26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Expanded</text:p>
          </table:table-cell>
          <table:table-cell table:style-name="TableRowCell" office:value-type="string">
            <text:p text:style-name="Table_20_Contents"><text:a xlink:type="simple" xlink:href="../../viewer/style/icons.less#L370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5" svg:width="0.41667in" svg:height="0.4166666666666667in"><draw:image xlink:href="Pictures/26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266" svg:width="0.41667in" svg:height="0.4166666666666667in"><draw:image xlink:href="Pictures/265.svg" xlink:type="simple" xlink:show="embed" xlink:actuate="onLoad"/></draw:frame></text:p>
          </table:table-cell>
          <table:table-cell table:style-name="TableRowCell" office:value-type="string">
            <text:p text:style-name="Table_20_Contents">MOB</text:p>
          </table:table-cell>
        </table:table-row>
        <table:table-row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267" svg:width="0.41667in" svg:height="0.4166666666666667in"><draw:image xlink:href="Pictures/266.svg" xlink:type="simple" xlink:show="embed" xlink:actuate="onLoad"/></draw:frame></text:p>
          </table:table-cell>
          <table:table-cell table:style-name="TableRowCell" office:value-type="string">
            <text:p text:style-name="Table_20_Contents">MainNav</text:p>
          </table:table-cell>
        </table:table-row>
        <table:table-row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37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268" svg:width="0.41667in" svg:height="0.4166666666666667in"><draw:image xlink:href="Pictures/267.svg" xlink:type="simple" xlink:show="embed" xlink:actuate="onLoad"/></draw:frame></text:p>
          </table:table-cell>
          <table:table-cell table:style-name="TableRowCell" office:value-type="string">
            <text:p text:style-name="Table_20_Contents">ABShowMeasure,Measure,MeasureAdd,code</text:p>
          </table:table-cell>
        </table:table-row>
        <table:table-row>
          <table:table-cell table:style-name="TableRowCell" office:value-type="string">
            <text:p text:style-name="Table_20_Contents">MeasureFlag</text:p>
          </table:table-cell>
          <table:table-cell table:style-name="TableRowCell" office:value-type="string">
            <text:p text:style-name="Table_20_Contents"><text:a xlink:type="simple" xlink:href="../../viewer/style/icons.less#L343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269" svg:width="0.41667in" svg:height="0.4166666666666667in"><draw:image xlink:href="Pictures/26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40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270" svg:width="0.41667in" svg:height="0.4166666666666667in"><draw:image xlink:href="Pictures/269.svg" xlink:type="simple" xlink:show="embed" xlink:actuate="onLoad"/></draw:frame></text:p>
          </table:table-cell>
          <table:table-cell table:style-name="TableRowCell" office:value-type="string">
            <text:p text:style-name="Table_20_Contents">MeasureOff</text:p>
          </table:table-cell>
        </table:table-row>
        <table:table-row>
          <table:table-cell table:style-name="TableRowCell" office:value-type="string">
            <text:p text:style-name="Table_20_Contents">More</text:p>
          </table:table-cell>
          <table:table-cell table:style-name="TableRowCell" office:value-type="string">
            <text:p text:style-name="Table_20_Contents"><text:a xlink:type="simple" xlink:href="../../viewer/style/icons.less#L351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271" svg:width="0.41667in" svg:height="0.4166666666666667in"><draw:image xlink:href="Pictures/27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72" svg:width="0.41667in" svg:height="0.4166666666666667in"><draw:image xlink:href="Pictures/271.svg" xlink:type="simple" xlink:show="embed" xlink:actuate="onLoad"/></draw:frame></text:p>
          </table:table-cell>
          <table:table-cell table:style-name="TableRowCell" office:value-type="string">
            <text:p text:style-name="Table_20_Contents">NavAdd,DBInsertRouteBefore</text:p>
          </table:table-cell>
        </table:table-row>
        <table:table-row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73" svg:width="0.41667in" svg:height="0.4166666666666667in"><draw:image xlink:href="Pictures/272.svg" xlink:type="simple" xlink:show="embed" xlink:actuate="onLoad"/></draw:frame></text:p>
          </table:table-cell>
          <table:table-cell table:style-name="TableRowCell" office:value-type="string">
            <text:p text:style-name="Table_20_Contents">NavAddAfter,DBInsertRouteAfter</text:p>
          </table:table-cell>
        </table:table-row>
        <table:table-row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1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274" svg:width="0.41667in" svg:height="0.4166666666666667in"><draw:image xlink:href="Pictures/273.svg" xlink:type="simple" xlink:show="embed" xlink:actuate="onLoad"/></draw:frame></text:p>
          </table:table-cell>
          <table:table-cell table:style-name="TableRowCell" office:value-type="string">
            <text:p text:style-name="Table_20_Contents">NavDelete</text:p>
          </table:table-cell>
        </table:table-row>
        <table:table-row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74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275" svg:width="0.41667in" svg:height="0.4166666666666667in"><draw:image xlink:href="Pictures/274.svg" xlink:type="simple" xlink:show="embed" xlink:actuate="onLoad"/></draw:frame></text:p>
          </table:table-cell>
          <table:table-cell table:style-name="TableRowCell" office:value-type="string">
            <text:p text:style-name="Table_20_Contents">NavGoto,DBStartRoute</text:p>
          </table:table-cell>
        </table:table-row>
        <table:table-row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276" svg:width="0.41667in" svg:height="0.4166666666666667in"><draw:image xlink:href="Pictures/275.svg" xlink:type="simple" xlink:show="embed" xlink:actuate="onLoad"/></draw:frame></text:p>
          </table:table-cell>
          <table:table-cell table:style-name="TableRowCell" office:value-type="string">
            <text:p text:style-name="Table_20_Contents">NavMapWidgets</text:p>
          </table:table-cell>
        </table:table-row>
        <table:table-row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277" svg:width="0.41667in" svg:height="0.4166666666666667in"><draw:image xlink:href="Pictures/276.svg" xlink:type="simple" xlink:show="embed" xlink:actuate="onLoad"/></draw:frame></text:p>
          </table:table-cell>
          <table:table-cell table:style-name="TableRowCell" office:value-type="string">
            <text:p text:style-name="Table_20_Contents">NavNext</text:p>
          </table:table-cell>
        </table:table-row>
        <table:table-row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278" svg:width="0.41667in" svg:height="0.4166666666666667in"><draw:image xlink:href="Pictures/277.svg" xlink:type="simple" xlink:show="embed" xlink:actuate="onLoad"/></draw:frame></text:p>
          </table:table-cell>
          <table:table-cell table:style-name="TableRowCell" office:value-type="string">
            <text:p text:style-name="Table_20_Contents">StopNav,code</text:p>
          </table:table-cell>
        </table:table-row>
        <table:table-row>
          <table:table-cell table:style-name="TableRowCell" office:value-type="string">
            <text:p text:style-name="Table_20_Contents">Navigation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navigation.svg</text:span></text:a></text:p>
          </table:table-cell>
          <table:table-cell table:style-name="TableRowCell" office:value-type="string">
            <text:p text:style-name="Table_20_Contents"><draw:frame draw:name="img279" svg:width="0.41667in" svg:height="0.4166666666666667in"><draw:image xlink:href="Pictures/278.svg" xlink:type="simple" xlink:show="embed" xlink:actuate="onLoad"/></draw:frame></text:p>
          </table:table-cell>
          <table:table-cell table:style-name="TableRowCell" office:value-type="string">
            <text:p text:style-name="Table_20_Contents">NavActions</text:p>
          </table:table-cell>
        </table:table-row>
        <table:table-row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280" svg:width="0.41667in" svg:height="0.4166666666666667in"><draw:image xlink:href="Pictures/279.svg" xlink:type="simple" xlink:show="embed" xlink:actuate="onLoad"/></draw:frame></text:p>
          </table:table-cell>
          <table:table-cell table:style-name="TableRowCell" office:value-type="string">
            <text:p text:style-name="Table_20_Contents">Night</text:p>
          </table:table-cell>
        </table:table-row>
        <table:table-row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281" svg:width="0.41667in" svg:height="0.4166666666666667in"><draw:image xlink:href="Pictures/280.svg" xlink:type="simple" xlink:show="embed" xlink:actuate="onLoad"/></draw:frame></text:p>
          </table:table-cell>
          <table:table-cell table:style-name="TableRowCell" office:value-type="string">
            <text:p text:style-name="Table_20_Contents">Gps1</text:p>
          </table:table-cell>
        </table:table-row>
        <table:table-row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282" svg:width="0.41667in" svg:height="0.4166666666666667in"><draw:image xlink:href="Pictures/281.svg" xlink:type="simple" xlink:show="embed" xlink:actuate="onLoad"/></draw:frame></text:p>
          </table:table-cell>
          <table:table-cell table:style-name="TableRowCell" office:value-type="string">
            <text:p text:style-name="Table_20_Contents">Gps10</text:p>
          </table:table-cell>
        </table:table-row>
        <table:table-row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283" svg:width="0.41667in" svg:height="0.4166666666666667in"><draw:image xlink:href="Pictures/282.svg" xlink:type="simple" xlink:show="embed" xlink:actuate="onLoad"/></draw:frame></text:p>
          </table:table-cell>
          <table:table-cell table:style-name="TableRowCell" office:value-type="string">
            <text:p text:style-name="Table_20_Contents">Gps2</text:p>
          </table:table-cell>
        </table:table-row>
        <table:table-row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284" svg:width="0.41667in" svg:height="0.4166666666666667in"><draw:image xlink:href="Pictures/283.svg" xlink:type="simple" xlink:show="embed" xlink:actuate="onLoad"/></draw:frame></text:p>
          </table:table-cell>
          <table:table-cell table:style-name="TableRowCell" office:value-type="string">
            <text:p text:style-name="Table_20_Contents">Gps3</text:p>
          </table:table-cell>
        </table:table-row>
        <table:table-row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285" svg:width="0.41667in" svg:height="0.4166666666666667in"><draw:image xlink:href="Pictures/284.svg" xlink:type="simple" xlink:show="embed" xlink:actuate="onLoad"/></draw:frame></text:p>
          </table:table-cell>
          <table:table-cell table:style-name="TableRowCell" office:value-type="string">
            <text:p text:style-name="Table_20_Contents">Gps4</text:p>
          </table:table-cell>
        </table:table-row>
        <table:table-row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286" svg:width="0.41667in" svg:height="0.4166666666666667in"><draw:image xlink:href="Pictures/285.svg" xlink:type="simple" xlink:show="embed" xlink:actuate="onLoad"/></draw:frame></text:p>
          </table:table-cell>
          <table:table-cell table:style-name="TableRowCell" office:value-type="string">
            <text:p text:style-name="Table_20_Contents">Gps5</text:p>
          </table:table-cell>
        </table:table-row>
        <table:table-row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287" svg:width="0.41667in" svg:height="0.4166666666666667in"><draw:image xlink:href="Pictures/286.svg" xlink:type="simple" xlink:show="embed" xlink:actuate="onLoad"/></draw:frame></text:p>
          </table:table-cell>
          <table:table-cell table:style-name="TableRowCell" office:value-type="string">
            <text:p text:style-name="Table_20_Contents">Gps6</text:p>
          </table:table-cell>
        </table:table-row>
        <table:table-row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288" svg:width="0.41667in" svg:height="0.4166666666666667in"><draw:image xlink:href="Pictures/287.svg" xlink:type="simple" xlink:show="embed" xlink:actuate="onLoad"/></draw:frame></text:p>
          </table:table-cell>
          <table:table-cell table:style-name="TableRowCell" office:value-type="string">
            <text:p text:style-name="Table_20_Contents">Gps7</text:p>
          </table:table-cell>
        </table:table-row>
        <table:table-row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289" svg:width="0.41667in" svg:height="0.4166666666666667in"><draw:image xlink:href="Pictures/288.svg" xlink:type="simple" xlink:show="embed" xlink:actuate="onLoad"/></draw:frame></text:p>
          </table:table-cell>
          <table:table-cell table:style-name="TableRowCell" office:value-type="string">
            <text:p text:style-name="Table_20_Contents">Gps8</text:p>
          </table:table-cell>
        </table:table-row>
        <table:table-row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290" svg:width="0.41667in" svg:height="0.4166666666666667in"><draw:image xlink:href="Pictures/289.svg" xlink:type="simple" xlink:show="embed" xlink:actuate="onLoad"/></draw:frame></text:p>
          </table:table-cell>
          <table:table-cell table:style-name="TableRowCell" office:value-type="string">
            <text:p text:style-name="Table_20_Contents">Gps9</text:p>
          </table:table-cell>
        </table:table-row>
        <table:table-row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91" svg:width="0.41667in" svg:height="0.4166666666666667in"><draw:image xlink:href="Pictures/290.svg" xlink:type="simple" xlink:show="embed" xlink:actuate="onLoad"/></draw:frame></text:p>
          </table:table-cell>
          <table:table-cell table:style-name="TableRowCell" office:value-type="string">
            <text:p text:style-name="Table_20_Contents">DBOk,DBUpdate,DBAccept</text:p>
          </table:table-cell>
        </table:table-row>
        <table:table-row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92" svg:width="0.41667in" svg:height="0.4166666666666667in"><draw:image xlink:href="Pictures/291.svg" xlink:type="simple" xlink:show="embed" xlink:actuate="onLoad"/></draw:frame></text:p>
          </table:table-cell>
          <table:table-cell table:style-name="TableRowCell" office:value-type="string">
            <text:p text:style-name="Table_20_Contents">SettingsLoad,DBLoadRoute,DBActivate</text:p>
          </table:table-cell>
        </table:table-row>
        <table:table-row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293" svg:width="0.41667in" svg:height="0.4166666666666667in"><draw:image xlink:href="Pictures/292.svg" xlink:type="simple" xlink:show="embed" xlink:actuate="onLoad"/></draw:frame></text:p>
          </table:table-cell>
          <table:table-cell table:style-name="TableRowCell" office:value-type="string">
            <text:p text:style-name="Table_20_Contents">Overflow</text:p>
          </table:table-cell>
        </table:table-row>
        <table:table-row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294" svg:width="0.41667in" svg:height="0.4166666666666667in"><draw:image xlink:href="Pictures/293.svg" xlink:type="simple" xlink:show="embed" xlink:actuate="onLoad"/></draw:frame></text:p>
          </table:table-cell>
          <table:table-cell table:style-name="TableRowCell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RowCell" office:value-type="string">
            <text:p text:style-name="Table_20_Contents">Plugins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295" svg:width="0.41667in" svg:height="0.4166666666666667in"><draw:image xlink:href="Pictures/29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96" svg:width="0.41667in" svg:height="0.4166666666666667in"><draw:image xlink:href="Pictures/295.svg" xlink:type="simple" xlink:show="embed" xlink:actuate="onLoad"/></draw:frame></text:p>
          </table:table-cell>
          <table:table-cell table:style-name="TableRowCell" office:value-type="string">
            <text:p text:style-name="Table_20_Contents">AddonConfigPlus,StatusAdd,RouteAdd,CreateFile,DBAdd,DBNew,DBNewRoute,DBAddSub</text:p>
          </table:table-cell>
        </table:table-row>
        <table:table-row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22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297" svg:width="0.41667in" svg:height="0.4166666666666667in"><draw:image xlink:href="Pictures/296.svg" xlink:type="simple" xlink:show="embed" xlink:actuate="onLoad"/></draw:frame></text:p>
          </table:table-cell>
          <table:table-cell table:style-name="TableRowCell" office:value-type="string">
            <text:p text:style-name="Table_20_Contents">DBPropose</text:p>
          </table:table-cell>
        </table:table-row>
        <table:table-row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298" svg:width="0.41667in" svg:height="0.4166666666666667in"><draw:image xlink:href="Pictures/297.svg" xlink:type="simple" xlink:show="embed" xlink:actuate="onLoad"/></draw:frame></text:p>
          </table:table-cell>
          <table:table-cell table:style-name="TableRowCell" office:value-type="string">
            <text:p text:style-name="Table_20_Contents">StatusAddresses</text:p>
          </table:table-cell>
        </table:table-row>
        <table:table-row>
          <table:table-cell table:style-name="TableRowCell" office:value-type="string">
            <text:p text:style-name="Table_20_Contents">RadioChecked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299" svg:width="0.41667in" svg:height="0.4166666666666667in"><draw:image xlink:href="Pictures/29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adioUnchecked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300" svg:width="0.41667in" svg:height="0.4166666666666667in"><draw:image xlink:href="Pictures/29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301" svg:width="0.41667in" svg:height="0.4166666666666667in"><draw:image xlink:href="Pictures/300.svg" xlink:type="simple" xlink:show="embed" xlink:actuate="onLoad"/></draw:frame></text:p>
          </table:table-cell>
          <table:table-cell table:style-name="TableRowCell" office:value-type="string">
            <text:p text:style-name="Table_20_Contents">ReloadUI,StatusRestart,DBReload,DBRestart,DBAutoReload</text:p>
          </table:table-cell>
        </table:table-row>
        <table:table-row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302" svg:width="0.41667in" svg:height="0.4166666666666667in"><draw:image xlink:href="Pictures/301.svg" xlink:type="simple" xlink:show="embed" xlink:actuate="onLoad"/></draw:frame></text:p>
          </table:table-cell>
          <table:table-cell table:style-name="TableRowCell" office:value-type="string">
            <text:p text:style-name="Table_20_Contents">RemoteChannel</text:p>
          </table:table-cell>
        </table:table-row>
        <table:table-row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13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303" svg:width="0.41667in" svg:height="0.4166666666666667in"><draw:image xlink:href="Pictures/302.svg" xlink:type="simple" xlink:show="embed" xlink:actuate="onLoad"/></draw:frame></text:p>
          </table:table-cell>
          <table:table-cell table:style-name="TableRowCell" office:value-type="string">
            <text:p text:style-name="Table_20_Contents">DBRenumberRoute</text:p>
          </table:table-cell>
        </table:table-row>
        <table:table-row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04" svg:width="0.41667in" svg:height="0.4166666666666667in"><draw:image xlink:href="Pictures/303.svg" xlink:type="simple" xlink:show="embed" xlink:actuate="onLoad"/></draw:frame></text:p>
          </table:table-cell>
          <table:table-cell table:style-name="TableRowCell" office:value-type="string">
            <text:p text:style-name="Table_20_Contents">SettingsDefaults,DefaultValue,DBReset</text:p>
          </table:table-cell>
        </table:table-row>
        <table:table-row>
          <table:table-cell table:style-name="TableRowCell" office:value-type="string">
            <text:p text:style-name="Table_20_Contents">Right</text:p>
          </table:table-cell>
          <table:table-cell table:style-name="TableRowCell" office:value-type="string">
            <text:p text:style-name="Table_20_Contents"><text:a xlink:type="simple" xlink:href="../../viewer/style/icons.less#L404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305" svg:width="0.41667in" svg:height="0.4166666666666667in"><draw:image xlink:href="Pictures/30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306" svg:width="0.41667in" svg:height="0.4166666666666667in"><draw:image xlink:href="Pictures/305.svg" xlink:type="simple" xlink:show="embed" xlink:actuate="onLoad"/></draw:frame></text:p>
          </table:table-cell>
          <table:table-cell table:style-name="TableRowCell" office:value-type="string">
            <text:p text:style-name="Table_20_Contents">ShowRoutePanel,ToRoute,DBRoutePoints,DBFeatureNewRoute,DBEditRoute,code</text:p>
          </table:table-cell>
        </table:table-row>
        <table:table-row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307" svg:width="0.41667in" svg:height="0.4166666666666667in"><draw:image xlink:href="Pictures/306.svg" xlink:type="simple" xlink:show="embed" xlink:actuate="onLoad"/></draw:frame></text:p>
          </table:table-cell>
          <table:table-cell table:style-name="TableRowCell" office:value-type="string">
            <text:p text:style-name="Table_20_Contents">RouteMenu</text:p>
          </table:table-cell>
        </table:table-row>
        <table:table-row>
          <table:table-cell table:style-name="TableRowCell" office:value-type="string">
            <text:p text:style-name="Table_20_Contents">Satellite</text:p>
          </table:table-cell>
          <table:table-cell table:style-name="TableRowCell" office:value-type="string">
            <text:p text:style-name="Table_20_Contents"><text:a xlink:type="simple" xlink:href="../../viewer/style/icons.less#L419" office:name=""><text:span text:style-name="Definition">satellite-alt-200.svg</text:span></text:a></text:p>
          </table:table-cell>
          <table:table-cell table:style-name="TableRowCell" office:value-type="string">
            <text:p text:style-name="Table_20_Contents"><draw:frame draw:name="img308" svg:width="0.41667in" svg:height="0.4166666666666667in"><draw:image xlink:href="Pictures/30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309" svg:width="0.41667in" svg:height="0.4166666666666667in"><draw:image xlink:href="Pictures/308.svg" xlink:type="simple" xlink:show="embed" xlink:actuate="onLoad"/></draw:frame></text:p>
          </table:table-cell>
          <table:table-cell table:style-name="TableRowCell" office:value-type="string">
            <text:p text:style-name="Table_20_Contents">SettingsSave,DBSave</text:p>
          </table:table-cell>
        </table:table-row>
        <table:table-row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10" svg:width="0.41667in" svg:height="0.4166666666666667in"><draw:image xlink:href="Pictures/309.svg" xlink:type="simple" xlink:show="embed" xlink:actuate="onLoad"/></draw:frame></text:p>
          </table:table-cell>
          <table:table-cell table:style-name="TableRowCell" office:value-type="string">
            <text:p text:style-name="Table_20_Contents">DBSaveAs</text:p>
          </table:table-cell>
        </table:table-row>
        <table:table-row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311" svg:width="0.41667in" svg:height="0.4166666666666667in"><draw:image xlink:href="Pictures/310.svg" xlink:type="simple" xlink:show="embed" xlink:actuate="onLoad"/></draw:frame></text:p>
          </table:table-cell>
          <table:table-cell table:style-name="TableRowCell" office:value-type="string">
            <text:p text:style-name="Table_20_Contents">AisSearch</text:p>
          </table:table-cell>
        </table:table-row>
        <table:table-row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312" svg:width="0.41667in" svg:height="0.4166666666666667in"><draw:image xlink:href="Pictures/311.svg" xlink:type="simple" xlink:show="embed" xlink:actuate="onLoad"/></draw:frame></text:p>
          </table:table-cell>
          <table:table-cell table:style-name="TableRowCell" office:value-type="string">
            <text:p text:style-name="Table_20_Contents">SectionView</text:p>
          </table:table-cell>
        </table:table-row>
        <table:table-row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313" svg:width="0.41667in" svg:height="0.4166666666666667in"><draw:image xlink:href="Pictures/312.svg" xlink:type="simple" xlink:show="embed" xlink:actuate="onLoad"/></draw:frame></text:p>
          </table:table-cell>
          <table:table-cell table:style-name="TableRowCell" office:value-type="string">
            <text:p text:style-name="Table_20_Contents">NavSelectChart</text:p>
          </table:table-cell>
        </table:table-row>
        <table:table-row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314" svg:width="0.41667in" svg:height="0.4166666666666667in"><draw:image xlink:href="Pictures/313.svg" xlink:type="simple" xlink:show="embed" xlink:actuate="onLoad"/></draw:frame></text:p>
          </table:table-cell>
          <table:table-cell table:style-name="TableRowCell" office:value-type="string">
            <text:p text:style-name="Table_20_Contents">ServerView</text:p>
          </table:table-cell>
        </table:table-row>
        <table:table-row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315" svg:width="0.41667in" svg:height="0.4166666666666667in"><draw:image xlink:href="Pictures/314.svg" xlink:type="simple" xlink:show="embed" xlink:actuate="onLoad"/></draw:frame></text:p>
          </table:table-cell>
          <table:table-cell table:style-name="TableRowCell" office:value-type="string">
            <text:p text:style-name="Table_20_Contents">ShowSettings,code</text:p>
          </table:table-cell>
        </table:table-row>
        <table:table-row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316" svg:width="0.41667in" svg:height="0.4166666666666667in"><draw:image xlink:href="Pictures/315.svg" xlink:type="simple" xlink:show="embed" xlink:actuate="onLoad"/></draw:frame></text:p>
          </table:table-cell>
          <table:table-cell table:style-name="TableRowCell" office:value-type="string">
            <text:p text:style-name="Table_20_Contents">StatusShutdown</text:p>
          </table:table-cell>
        </table:table-row>
        <table:table-row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317" svg:width="0.41667in" svg:height="0.4166666666666667in"><draw:image xlink:href="Pictures/316.svg" xlink:type="simple" xlink:show="embed" xlink:actuate="onLoad"/></draw:frame></text:p>
          </table:table-cell>
          <table:table-cell table:style-name="TableRowCell" office:value-type="string">
            <text:p text:style-name="Table_20_Contents">AisSort</text:p>
          </table:table-cell>
        </table:table-row>
        <table:table-row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318" svg:width="0.41667in" svg:height="0.4166666666666667in"><draw:image xlink:href="Pictures/317.svg" xlink:type="simple" xlink:show="embed" xlink:actuate="onLoad"/></draw:frame></text:p>
          </table:table-cell>
          <table:table-cell table:style-name="TableRowCell" office:value-type="string">
            <text:p text:style-name="Table_20_Contents">Split</text:p>
          </table:table-cell>
        </table:table-row>
        <table:table-row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319" svg:width="0.41667in" svg:height="0.4166666666666667in"><draw:image xlink:href="Pictures/318.svg" xlink:type="simple" xlink:show="embed" xlink:actuate="onLoad"/></draw:frame></text:p>
          </table:table-cell>
          <table:table-cell table:style-name="TableRowCell" office:value-type="string">
            <text:p text:style-name="Table_20_Contents">SettingsSplitReset</text:p>
          </table:table-cell>
        </table:table-row>
        <table:table-row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300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20" svg:width="0.41667in" svg:height="0.4166666666666667in"><draw:image xlink:href="Pictures/319.svg" xlink:type="simple" xlink:show="embed" xlink:actuate="onLoad"/></draw:frame></text:p>
          </table:table-cell>
          <table:table-cell table:style-name="TableRowCell" office:value-type="string">
            <text:p text:style-name="Table_20_Contents">DBCompute</text:p>
          </table:table-cell>
        </table:table-row>
        <table:table-row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321" svg:width="0.41667in" svg:height="0.4166666666666667in"><draw:image xlink:href="Pictures/320.svg" xlink:type="simple" xlink:show="embed" xlink:actuate="onLoad"/></draw:frame></text:p>
          </table:table-cell>
          <table:table-cell table:style-name="TableRowCell" office:value-type="string">
            <text:p text:style-name="Table_20_Contents">DBStop</text:p>
          </table:table-cell>
        </table:table-row>
        <table:table-row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322" svg:width="0.41667in" svg:height="0.4166666666666667in"><draw:image xlink:href="Pictures/321.svg" xlink:type="simple" xlink:show="embed" xlink:actuate="onLoad"/></draw:frame></text:p>
          </table:table-cell>
          <table:table-cell table:style-name="TableRowCell" office:value-type="string">
            <text:p text:style-name="Table_20_Contents">SyncRoutes</text:p>
          </table:table-cell>
        </table:table-row>
        <table:table-row>
          <table:table-cell table:style-name="TableRowCell" office:value-type="string">
            <text:p text:style-name="Table_20_Contents">Track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323" svg:width="0.41667in" svg:height="0.4166666666666667in"><draw:image xlink:href="Pictures/32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Checked</text:p>
          </table:table-cell>
          <table:table-cell table:style-name="TableRowCell" office:value-type="string">
            <text:p text:style-name="Table_20_Contents"><text:a xlink:type="simple" xlink:href="../../viewer/style/icons.less#L354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324" svg:width="0.41667in" svg:height="0.4166666666666667in"><draw:image xlink:href="Pictures/32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325" svg:width="0.41667in" svg:height="0.4166666666666667in"><draw:image xlink:href="Pictures/324.svg" xlink:type="simple" xlink:show="embed" xlink:actuate="onLoad"/></draw:frame></text:p>
          </table:table-cell>
          <table:table-cell table:style-name="TableRowCell" office:value-type="string">
            <text:p text:style-name="Table_20_Contents">RevertLayout</text:p>
          </table:table-cell>
        </table:table-row>
        <table:table-row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326" svg:width="0.41667in" svg:height="0.4166666666666667in"><draw:image xlink:href="Pictures/325.svg" xlink:type="simple" xlink:show="embed" xlink:actuate="onLoad"/></draw:frame></text:p>
          </table:table-cell>
          <table:table-cell table:style-name="TableRowCell" office:value-type="string">
            <text:p text:style-name="Table_20_Contents">Upload</text:p>
          </table:table-cell>
        </table:table-row>
        <table:table-row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327" svg:width="0.41667in" svg:height="0.4166666666666667in"><draw:image xlink:href="Pictures/326.svg" xlink:type="simple" xlink:show="embed" xlink:actuate="onLoad"/></draw:frame></text:p>
          </table:table-cell>
          <table:table-cell table:style-name="TableRowCell" office:value-type="string">
            <text:p text:style-name="Table_20_Contents">AddonConfigUser,code</text:p>
          </table:table-cell>
        </table:table-row>
        <table:table-row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328" svg:width="0.41667in" svg:height="0.4166666666666667in"><draw:image xlink:href="Pictures/327.svg" xlink:type="simple" xlink:show="embed" xlink:actuate="onLoad"/></draw:frame></text:p>
          </table:table-cell>
          <table:table-cell table:style-name="TableRowCell" office:value-type="string">
            <text:p text:style-name="Table_20_Contents">DBPreview,DBView,code</text:p>
          </table:table-cell>
        </table:table-row>
        <table:table-row>
          <table:table-cell table:style-name="TableRowCell" office:value-type="string">
            <text:p text:style-name="Table_20_Contents">Waypoint</text:p>
          </table:table-cell>
          <table:table-cell table:style-name="TableRowCell" office:value-type="string">
            <text:p text:style-name="Table_20_Contents"><text:a xlink:type="simple" xlink:href="../../viewer/style/icons.less#L409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329" svg:width="0.41667in" svg:height="0.4166666666666667in"><draw:image xlink:href="Pictures/328.svg" xlink:type="simple" xlink:show="embed" xlink:actuate="onLoad"/></draw:frame></text:p>
          </table:table-cell>
          <table:table-cell table:style-name="TableRowCell" office:value-type="string">
            <text:p text:style-name="Table_20_Contents">ABShowWpButtons,code</text:p>
          </table:table-cell>
        </table:table-row>
        <table:table-row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330" svg:width="0.41667in" svg:height="0.4166666666666667in"><draw:image xlink:href="Pictures/329.svg" xlink:type="simple" xlink:show="embed" xlink:actuate="onLoad"/></draw:frame></text:p>
          </table:table-cell>
          <table:table-cell table:style-name="TableRowCell" office:value-type="string">
            <text:p text:style-name="Table_20_Contents">StatusWpa,DBWpaEnable</text:p>
          </table:table-cell>
        </table:table-row>
        <table:table-row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331" svg:width="0.41667in" svg:height="0.4166666666666667in"><draw:image xlink:href="Pictures/330.svg" xlink:type="simple" xlink:show="embed" xlink:actuate="onLoad"/></draw:frame></text:p>
          </table:table-cell>
          <table:table-cell table:style-name="TableRowCell" office:value-type="string">
            <text:p text:style-name="Table_20_Contents">DBWpaDisable</text:p>
          </table:table-cell>
        </table:table-row>
        <table:table-row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332" svg:width="0.41667in" svg:height="0.4166666666666667in"><draw:image xlink:href="Pictures/331.svg" xlink:type="simple" xlink:show="embed" xlink:actuate="onLoad"/></draw:frame></text:p>
          </table:table-cell>
          <table:table-cell table:style-name="TableRowCell" office:value-type="string">
            <text:p text:style-name="Table_20_Contents">WpGoto,NavRestart</text:p>
          </table:table-cell>
        </table:table-row>
        <table:table-row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33" svg:width="0.41667in" svg:height="0.4166666666666667in"><draw:image xlink:href="Pictures/332.svg" xlink:type="simple" xlink:show="embed" xlink:actuate="onLoad"/></draw:frame></text:p>
          </table:table-cell>
          <table:table-cell table:style-name="TableRowCell" office:value-type="string">
            <text:p text:style-name="Table_20_Contents">WpLocate,NavToCenter</text:p>
          </table:table-cell>
        </table:table-row>
        <table:table-row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334" svg:width="0.41667in" svg:height="0.4166666666666667in"><draw:image xlink:href="Pictures/333.svg" xlink:type="simple" xlink:show="embed" xlink:actuate="onLoad"/></draw:frame></text:p>
          </table:table-cell>
          <table:table-cell table:style-name="TableRowCell" office:value-type="string">
            <text:p text:style-name="Table_20_Contents">WpNext</text:p>
          </table:table-cell>
        </table:table-row>
        <table:table-row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335" svg:width="0.41667in" svg:height="0.4166666666666667in"><draw:image xlink:href="Pictures/334.svg" xlink:type="simple" xlink:show="embed" xlink:actuate="onLoad"/></draw:frame></text:p>
          </table:table-cell>
          <table:table-cell table:style-name="TableRowCell" office:value-type="string">
            <text:p text:style-name="Table_20_Contents">WpPrevious</text:p>
          </table:table-cell>
        </table:table-row>
        <table:table-row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36" svg:width="0.41667in" svg:height="0.4166666666666667in"><draw:image xlink:href="Pictures/335.svg" xlink:type="simple" xlink:show="embed" xlink:actuate="onLoad"/></draw:frame></text:p>
          </table:table-cell>
          <table:table-cell table:style-name="TableRowCell" office:value-type="string">
            <text:p text:style-name="Table_20_Contents">DBWpaConnect</text:p>
          </table:table-cell>
        </table:table-row>
        <table:table-row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337" svg:width="0.41667in" svg:height="0.4166666666666667in"><draw:image xlink:href="Pictures/336.svg" xlink:type="simple" xlink:show="embed" xlink:actuate="onLoad"/></draw:frame></text:p>
          </table:table-cell>
          <table:table-cell table:style-name="TableRowCell" office:value-type="string">
            <text:p text:style-name="Table_20_Contents">ZoomIn</text:p>
          </table:table-cell>
        </table:table-row>
        <table:table-row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338" svg:width="0.41667in" svg:height="0.4166666666666667in"><draw:image xlink:href="Pictures/337.svg" xlink:type="simple" xlink:show="embed" xlink:actuate="onLoad"/></draw:frame></text:p>
          </table:table-cell>
          <table:table-cell table:style-name="TableRowCell" office:value-type="string">
            <text:p text:style-name="Table_20_Contents">ZoomOut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5-15T18:23:34Z</meta:creation-date>
    <dc:date>2026-05-15T18:23:34Z</dc:date>
  </office:meta>
</office:document-meta>
</file>