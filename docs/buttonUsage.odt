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695.svg"/>
  <manifest:file-entry manifest:media-type="image/svg+xml" manifest:full-path="Pictures/694.svg"/>
  <manifest:file-entry manifest:media-type="image/svg+xml" manifest:full-path="Pictures/693.svg"/>
  <manifest:file-entry manifest:media-type="image/svg+xml" manifest:full-path="Pictures/692.svg"/>
  <manifest:file-entry manifest:media-type="image/svg+xml" manifest:full-path="Pictures/691.svg"/>
  <manifest:file-entry manifest:media-type="image/svg+xml" manifest:full-path="Pictures/690.svg"/>
  <manifest:file-entry manifest:media-type="image/svg+xml" manifest:full-path="Pictures/689.svg"/>
  <manifest:file-entry manifest:media-type="image/svg+xml" manifest:full-path="Pictures/688.svg"/>
  <manifest:file-entry manifest:media-type="image/svg+xml" manifest:full-path="Pictures/687.svg"/>
  <manifest:file-entry manifest:media-type="image/svg+xml" manifest:full-path="Pictures/686.svg"/>
  <manifest:file-entry manifest:media-type="image/svg+xml" manifest:full-path="Pictures/685.svg"/>
  <manifest:file-entry manifest:media-type="image/svg+xml" manifest:full-path="Pictures/684.svg"/>
  <manifest:file-entry manifest:media-type="image/svg+xml" manifest:full-path="Pictures/683.svg"/>
  <manifest:file-entry manifest:media-type="image/svg+xml" manifest:full-path="Pictures/682.svg"/>
  <manifest:file-entry manifest:media-type="image/svg+xml" manifest:full-path="Pictures/681.svg"/>
  <manifest:file-entry manifest:media-type="image/svg+xml" manifest:full-path="Pictures/680.svg"/>
  <manifest:file-entry manifest:media-type="image/svg+xml" manifest:full-path="Pictures/679.svg"/>
  <manifest:file-entry manifest:media-type="image/svg+xml" manifest:full-path="Pictures/678.svg"/>
  <manifest:file-entry manifest:media-type="image/svg+xml" manifest:full-path="Pictures/677.svg"/>
  <manifest:file-entry manifest:media-type="image/svg+xml" manifest:full-path="Pictures/676.svg"/>
  <manifest:file-entry manifest:media-type="image/svg+xml" manifest:full-path="Pictures/675.svg"/>
  <manifest:file-entry manifest:media-type="image/svg+xml" manifest:full-path="Pictures/674.svg"/>
  <manifest:file-entry manifest:media-type="image/svg+xml" manifest:full-path="Pictures/673.svg"/>
  <manifest:file-entry manifest:media-type="image/svg+xml" manifest:full-path="Pictures/672.svg"/>
  <manifest:file-entry manifest:media-type="image/svg+xml" manifest:full-path="Pictures/671.svg"/>
  <manifest:file-entry manifest:media-type="image/svg+xml" manifest:full-path="Pictures/670.svg"/>
  <manifest:file-entry manifest:media-type="image/svg+xml" manifest:full-path="Pictures/669.svg"/>
  <manifest:file-entry manifest:media-type="image/svg+xml" manifest:full-path="Pictures/668.svg"/>
  <manifest:file-entry manifest:media-type="image/svg+xml" manifest:full-path="Pictures/667.svg"/>
  <manifest:file-entry manifest:media-type="image/svg+xml" manifest:full-path="Pictures/666.svg"/>
  <manifest:file-entry manifest:media-type="image/svg+xml" manifest:full-path="Pictures/665.svg"/>
  <manifest:file-entry manifest:media-type="image/svg+xml" manifest:full-path="Pictures/664.svg"/>
  <manifest:file-entry manifest:media-type="image/svg+xml" manifest:full-path="Pictures/663.svg"/>
  <manifest:file-entry manifest:media-type="image/svg+xml" manifest:full-path="Pictures/662.svg"/>
  <manifest:file-entry manifest:media-type="image/svg+xml" manifest:full-path="Pictures/661.svg"/>
  <manifest:file-entry manifest:media-type="image/svg+xml" manifest:full-path="Pictures/660.svg"/>
  <manifest:file-entry manifest:media-type="image/svg+xml" manifest:full-path="Pictures/659.svg"/>
  <manifest:file-entry manifest:media-type="image/svg+xml" manifest:full-path="Pictures/658.svg"/>
  <manifest:file-entry manifest:media-type="image/svg+xml" manifest:full-path="Pictures/657.svg"/>
  <manifest:file-entry manifest:media-type="image/svg+xml" manifest:full-path="Pictures/656.svg"/>
  <manifest:file-entry manifest:media-type="image/svg+xml" manifest:full-path="Pictures/655.svg"/>
  <manifest:file-entry manifest:media-type="image/svg+xml" manifest:full-path="Pictures/654.svg"/>
  <manifest:file-entry manifest:media-type="image/svg+xml" manifest:full-path="Pictures/653.svg"/>
  <manifest:file-entry manifest:media-type="image/svg+xml" manifest:full-path="Pictures/652.svg"/>
  <manifest:file-entry manifest:media-type="image/svg+xml" manifest:full-path="Pictures/651.svg"/>
  <manifest:file-entry manifest:media-type="image/svg+xml" manifest:full-path="Pictures/650.svg"/>
  <manifest:file-entry manifest:media-type="image/svg+xml" manifest:full-path="Pictures/649.svg"/>
  <manifest:file-entry manifest:media-type="image/svg+xml" manifest:full-path="Pictures/648.svg"/>
  <manifest:file-entry manifest:media-type="image/svg+xml" manifest:full-path="Pictures/647.svg"/>
  <manifest:file-entry manifest:media-type="image/svg+xml" manifest:full-path="Pictures/646.svg"/>
  <manifest:file-entry manifest:media-type="image/svg+xml" manifest:full-path="Pictures/645.svg"/>
  <manifest:file-entry manifest:media-type="image/svg+xml" manifest:full-path="Pictures/644.svg"/>
  <manifest:file-entry manifest:media-type="image/svg+xml" manifest:full-path="Pictures/643.svg"/>
  <manifest:file-entry manifest:media-type="image/svg+xml" manifest:full-path="Pictures/642.svg"/>
  <manifest:file-entry manifest:media-type="image/svg+xml" manifest:full-path="Pictures/641.svg"/>
  <manifest:file-entry manifest:media-type="image/svg+xml" manifest:full-path="Pictures/640.svg"/>
  <manifest:file-entry manifest:media-type="image/svg+xml" manifest:full-path="Pictures/639.svg"/>
  <manifest:file-entry manifest:media-type="image/svg+xml" manifest:full-path="Pictures/638.svg"/>
  <manifest:file-entry manifest:media-type="image/svg+xml" manifest:full-path="Pictures/637.svg"/>
  <manifest:file-entry manifest:media-type="image/svg+xml" manifest:full-path="Pictures/636.svg"/>
  <manifest:file-entry manifest:media-type="image/svg+xml" manifest:full-path="Pictures/635.svg"/>
  <manifest:file-entry manifest:media-type="image/svg+xml" manifest:full-path="Pictures/634.svg"/>
  <manifest:file-entry manifest:media-type="image/svg+xml" manifest:full-path="Pictures/633.svg"/>
  <manifest:file-entry manifest:media-type="image/svg+xml" manifest:full-path="Pictures/632.svg"/>
  <manifest:file-entry manifest:media-type="image/svg+xml" manifest:full-path="Pictures/631.svg"/>
  <manifest:file-entry manifest:media-type="image/svg+xml" manifest:full-path="Pictures/630.svg"/>
  <manifest:file-entry manifest:media-type="image/svg+xml" manifest:full-path="Pictures/629.svg"/>
  <manifest:file-entry manifest:media-type="image/svg+xml" manifest:full-path="Pictures/628.svg"/>
  <manifest:file-entry manifest:media-type="image/svg+xml" manifest:full-path="Pictures/627.svg"/>
  <manifest:file-entry manifest:media-type="image/svg+xml" manifest:full-path="Pictures/626.svg"/>
  <manifest:file-entry manifest:media-type="image/svg+xml" manifest:full-path="Pictures/625.svg"/>
  <manifest:file-entry manifest:media-type="image/svg+xml" manifest:full-path="Pictures/624.svg"/>
  <manifest:file-entry manifest:media-type="image/svg+xml" manifest:full-path="Pictures/623.svg"/>
  <manifest:file-entry manifest:media-type="image/svg+xml" manifest:full-path="Pictures/622.svg"/>
  <manifest:file-entry manifest:media-type="image/svg+xml" manifest:full-path="Pictures/621.svg"/>
  <manifest:file-entry manifest:media-type="image/svg+xml" manifest:full-path="Pictures/620.svg"/>
  <manifest:file-entry manifest:media-type="image/svg+xml" manifest:full-path="Pictures/619.svg"/>
  <manifest:file-entry manifest:media-type="image/svg+xml" manifest:full-path="Pictures/618.svg"/>
  <manifest:file-entry manifest:media-type="image/svg+xml" manifest:full-path="Pictures/617.svg"/>
  <manifest:file-entry manifest:media-type="image/svg+xml" manifest:full-path="Pictures/616.svg"/>
  <manifest:file-entry manifest:media-type="image/svg+xml" manifest:full-path="Pictures/615.svg"/>
  <manifest:file-entry manifest:media-type="image/svg+xml" manifest:full-path="Pictures/614.svg"/>
  <manifest:file-entry manifest:media-type="image/svg+xml" manifest:full-path="Pictures/613.svg"/>
  <manifest:file-entry manifest:media-type="image/svg+xml" manifest:full-path="Pictures/612.svg"/>
  <manifest:file-entry manifest:media-type="image/svg+xml" manifest:full-path="Pictures/611.svg"/>
  <manifest:file-entry manifest:media-type="image/svg+xml" manifest:full-path="Pictures/610.svg"/>
  <manifest:file-entry manifest:media-type="image/svg+xml" manifest:full-path="Pictures/609.svg"/>
  <manifest:file-entry manifest:media-type="image/svg+xml" manifest:full-path="Pictures/608.svg"/>
  <manifest:file-entry manifest:media-type="image/svg+xml" manifest:full-path="Pictures/607.svg"/>
  <manifest:file-entry manifest:media-type="image/svg+xml" manifest:full-path="Pictures/606.svg"/>
  <manifest:file-entry manifest:media-type="image/svg+xml" manifest:full-path="Pictures/605.svg"/>
  <manifest:file-entry manifest:media-type="image/svg+xml" manifest:full-path="Pictures/604.svg"/>
  <manifest:file-entry manifest:media-type="image/svg+xml" manifest:full-path="Pictures/603.svg"/>
  <manifest:file-entry manifest:media-type="image/svg+xml" manifest:full-path="Pictures/602.svg"/>
  <manifest:file-entry manifest:media-type="image/svg+xml" manifest:full-path="Pictures/601.svg"/>
  <manifest:file-entry manifest:media-type="image/svg+xml" manifest:full-path="Pictures/600.svg"/>
  <manifest:file-entry manifest:media-type="image/svg+xml" manifest:full-path="Pictures/599.svg"/>
  <manifest:file-entry manifest:media-type="image/svg+xml" manifest:full-path="Pictures/598.svg"/>
  <manifest:file-entry manifest:media-type="image/svg+xml" manifest:full-path="Pictures/597.svg"/>
  <manifest:file-entry manifest:media-type="image/svg+xml" manifest:full-path="Pictures/596.svg"/>
  <manifest:file-entry manifest:media-type="image/svg+xml" manifest:full-path="Pictures/595.svg"/>
  <manifest:file-entry manifest:media-type="image/svg+xml" manifest:full-path="Pictures/594.svg"/>
  <manifest:file-entry manifest:media-type="image/svg+xml" manifest:full-path="Pictures/593.svg"/>
  <manifest:file-entry manifest:media-type="image/svg+xml" manifest:full-path="Pictures/592.svg"/>
  <manifest:file-entry manifest:media-type="image/svg+xml" manifest:full-path="Pictures/591.svg"/>
  <manifest:file-entry manifest:media-type="image/svg+xml" manifest:full-path="Pictures/590.svg"/>
  <manifest:file-entry manifest:media-type="image/svg+xml" manifest:full-path="Pictures/589.svg"/>
  <manifest:file-entry manifest:media-type="image/svg+xml" manifest:full-path="Pictures/588.svg"/>
  <manifest:file-entry manifest:media-type="image/svg+xml" manifest:full-path="Pictures/587.svg"/>
  <manifest:file-entry manifest:media-type="image/svg+xml" manifest:full-path="Pictures/586.svg"/>
  <manifest:file-entry manifest:media-type="image/svg+xml" manifest:full-path="Pictures/585.svg"/>
  <manifest:file-entry manifest:media-type="image/svg+xml" manifest:full-path="Pictures/584.svg"/>
  <manifest:file-entry manifest:media-type="image/svg+xml" manifest:full-path="Pictures/583.svg"/>
  <manifest:file-entry manifest:media-type="image/svg+xml" manifest:full-path="Pictures/582.svg"/>
  <manifest:file-entry manifest:media-type="image/svg+xml" manifest:full-path="Pictures/581.svg"/>
  <manifest:file-entry manifest:media-type="image/svg+xml" manifest:full-path="Pictures/580.svg"/>
  <manifest:file-entry manifest:media-type="image/svg+xml" manifest:full-path="Pictures/579.svg"/>
  <manifest:file-entry manifest:media-type="image/svg+xml" manifest:full-path="Pictures/578.svg"/>
  <manifest:file-entry manifest:media-type="image/svg+xml" manifest:full-path="Pictures/577.svg"/>
  <manifest:file-entry manifest:media-type="image/svg+xml" manifest:full-path="Pictures/576.svg"/>
  <manifest:file-entry manifest:media-type="image/svg+xml" manifest:full-path="Pictures/575.svg"/>
  <manifest:file-entry manifest:media-type="image/svg+xml" manifest:full-path="Pictures/574.svg"/>
  <manifest:file-entry manifest:media-type="image/svg+xml" manifest:full-path="Pictures/573.svg"/>
  <manifest:file-entry manifest:media-type="image/svg+xml" manifest:full-path="Pictures/572.svg"/>
  <manifest:file-entry manifest:media-type="image/svg+xml" manifest:full-path="Pictures/571.svg"/>
  <manifest:file-entry manifest:media-type="image/svg+xml" manifest:full-path="Pictures/570.svg"/>
  <manifest:file-entry manifest:media-type="image/svg+xml" manifest:full-path="Pictures/569.svg"/>
  <manifest:file-entry manifest:media-type="image/svg+xml" manifest:full-path="Pictures/568.svg"/>
  <manifest:file-entry manifest:media-type="image/svg+xml" manifest:full-path="Pictures/567.svg"/>
  <manifest:file-entry manifest:media-type="image/svg+xml" manifest:full-path="Pictures/566.svg"/>
  <manifest:file-entry manifest:media-type="image/svg+xml" manifest:full-path="Pictures/565.svg"/>
  <manifest:file-entry manifest:media-type="image/svg+xml" manifest:full-path="Pictures/564.svg"/>
  <manifest:file-entry manifest:media-type="image/svg+xml" manifest:full-path="Pictures/563.svg"/>
  <manifest:file-entry manifest:media-type="image/svg+xml" manifest:full-path="Pictures/562.svg"/>
  <manifest:file-entry manifest:media-type="image/svg+xml" manifest:full-path="Pictures/561.svg"/>
  <manifest:file-entry manifest:media-type="image/svg+xml" manifest:full-path="Pictures/560.svg"/>
  <manifest:file-entry manifest:media-type="image/svg+xml" manifest:full-path="Pictures/559.svg"/>
  <manifest:file-entry manifest:media-type="image/svg+xml" manifest:full-path="Pictures/558.svg"/>
  <manifest:file-entry manifest:media-type="image/svg+xml" manifest:full-path="Pictures/557.svg"/>
  <manifest:file-entry manifest:media-type="image/svg+xml" manifest:full-path="Pictures/556.svg"/>
  <manifest:file-entry manifest:media-type="image/svg+xml" manifest:full-path="Pictures/555.svg"/>
  <manifest:file-entry manifest:media-type="image/svg+xml" manifest:full-path="Pictures/554.svg"/>
  <manifest:file-entry manifest:media-type="image/svg+xml" manifest:full-path="Pictures/553.svg"/>
  <manifest:file-entry manifest:media-type="image/svg+xml" manifest:full-path="Pictures/552.svg"/>
  <manifest:file-entry manifest:media-type="image/svg+xml" manifest:full-path="Pictures/551.svg"/>
  <manifest:file-entry manifest:media-type="image/svg+xml" manifest:full-path="Pictures/550.svg"/>
  <manifest:file-entry manifest:media-type="image/svg+xml" manifest:full-path="Pictures/549.svg"/>
  <manifest:file-entry manifest:media-type="image/svg+xml" manifest:full-path="Pictures/548.svg"/>
  <manifest:file-entry manifest:media-type="image/svg+xml" manifest:full-path="Pictures/547.svg"/>
  <manifest:file-entry manifest:media-type="image/svg+xml" manifest:full-path="Pictures/546.svg"/>
  <manifest:file-entry manifest:media-type="image/svg+xml" manifest:full-path="Pictures/545.svg"/>
  <manifest:file-entry manifest:media-type="image/svg+xml" manifest:full-path="Pictures/544.svg"/>
  <manifest:file-entry manifest:media-type="image/svg+xml" manifest:full-path="Pictures/543.svg"/>
  <manifest:file-entry manifest:media-type="image/svg+xml" manifest:full-path="Pictures/542.svg"/>
  <manifest:file-entry manifest:media-type="image/svg+xml" manifest:full-path="Pictures/541.svg"/>
  <manifest:file-entry manifest:media-type="image/svg+xml" manifest:full-path="Pictures/540.svg"/>
  <manifest:file-entry manifest:media-type="image/svg+xml" manifest:full-path="Pictures/539.svg"/>
  <manifest:file-entry manifest:media-type="image/svg+xml" manifest:full-path="Pictures/538.svg"/>
  <manifest:file-entry manifest:media-type="image/svg+xml" manifest:full-path="Pictures/537.svg"/>
  <manifest:file-entry manifest:media-type="image/svg+xml" manifest:full-path="Pictures/536.svg"/>
  <manifest:file-entry manifest:media-type="image/svg+xml" manifest:full-path="Pictures/535.svg"/>
  <manifest:file-entry manifest:media-type="image/svg+xml" manifest:full-path="Pictures/534.svg"/>
  <manifest:file-entry manifest:media-type="image/svg+xml" manifest:full-path="Pictures/533.svg"/>
  <manifest:file-entry manifest:media-type="image/svg+xml" manifest:full-path="Pictures/532.svg"/>
  <manifest:file-entry manifest:media-type="image/svg+xml" manifest:full-path="Pictures/531.svg"/>
  <manifest:file-entry manifest:media-type="image/svg+xml" manifest:full-path="Pictures/530.svg"/>
  <manifest:file-entry manifest:media-type="image/svg+xml" manifest:full-path="Pictures/529.svg"/>
  <manifest:file-entry manifest:media-type="image/svg+xml" manifest:full-path="Pictures/528.svg"/>
  <manifest:file-entry manifest:media-type="image/svg+xml" manifest:full-path="Pictures/527.svg"/>
  <manifest:file-entry manifest:media-type="image/svg+xml" manifest:full-path="Pictures/526.svg"/>
  <manifest:file-entry manifest:media-type="image/svg+xml" manifest:full-path="Pictures/525.svg"/>
  <manifest:file-entry manifest:media-type="image/svg+xml" manifest:full-path="Pictures/524.svg"/>
  <manifest:file-entry manifest:media-type="image/svg+xml" manifest:full-path="Pictures/523.svg"/>
  <manifest:file-entry manifest:media-type="image/svg+xml" manifest:full-path="Pictures/522.svg"/>
  <manifest:file-entry manifest:media-type="image/svg+xml" manifest:full-path="Pictures/521.svg"/>
  <manifest:file-entry manifest:media-type="image/svg+xml" manifest:full-path="Pictures/520.svg"/>
  <manifest:file-entry manifest:media-type="image/svg+xml" manifest:full-path="Pictures/519.svg"/>
  <manifest:file-entry manifest:media-type="image/svg+xml" manifest:full-path="Pictures/518.svg"/>
  <manifest:file-entry manifest:media-type="image/svg+xml" manifest:full-path="Pictures/517.svg"/>
  <manifest:file-entry manifest:media-type="image/svg+xml" manifest:full-path="Pictures/516.svg"/>
  <manifest:file-entry manifest:media-type="image/svg+xml" manifest:full-path="Pictures/515.svg"/>
  <manifest:file-entry manifest:media-type="image/svg+xml" manifest:full-path="Pictures/514.svg"/>
  <manifest:file-entry manifest:media-type="image/svg+xml" manifest:full-path="Pictures/513.svg"/>
  <manifest:file-entry manifest:media-type="image/svg+xml" manifest:full-path="Pictures/512.svg"/>
  <manifest:file-entry manifest:media-type="image/svg+xml" manifest:full-path="Pictures/511.svg"/>
  <manifest:file-entry manifest:media-type="image/svg+xml" manifest:full-path="Pictures/510.svg"/>
  <manifest:file-entry manifest:media-type="image/svg+xml" manifest:full-path="Pictures/509.svg"/>
  <manifest:file-entry manifest:media-type="image/svg+xml" manifest:full-path="Pictures/508.svg"/>
  <manifest:file-entry manifest:media-type="image/svg+xml" manifest:full-path="Pictures/507.svg"/>
  <manifest:file-entry manifest:media-type="image/svg+xml" manifest:full-path="Pictures/506.svg"/>
  <manifest:file-entry manifest:media-type="image/svg+xml" manifest:full-path="Pictures/505.svg"/>
  <manifest:file-entry manifest:media-type="image/svg+xml" manifest:full-path="Pictures/504.svg"/>
  <manifest:file-entry manifest:media-type="image/svg+xml" manifest:full-path="Pictures/503.svg"/>
  <manifest:file-entry manifest:media-type="image/svg+xml" manifest:full-path="Pictures/502.svg"/>
  <manifest:file-entry manifest:media-type="image/svg+xml" manifest:full-path="Pictures/501.svg"/>
  <manifest:file-entry manifest:media-type="image/svg+xml" manifest:full-path="Pictures/500.svg"/>
  <manifest:file-entry manifest:media-type="image/svg+xml" manifest:full-path="Pictures/499.svg"/>
  <manifest:file-entry manifest:media-type="image/svg+xml" manifest:full-path="Pictures/498.svg"/>
  <manifest:file-entry manifest:media-type="image/svg+xml" manifest:full-path="Pictures/497.svg"/>
  <manifest:file-entry manifest:media-type="image/svg+xml" manifest:full-path="Pictures/496.svg"/>
  <manifest:file-entry manifest:media-type="image/svg+xml" manifest:full-path="Pictures/495.svg"/>
  <manifest:file-entry manifest:media-type="image/svg+xml" manifest:full-path="Pictures/494.svg"/>
  <manifest:file-entry manifest:media-type="image/svg+xml" manifest:full-path="Pictures/493.svg"/>
  <manifest:file-entry manifest:media-type="image/svg+xml" manifest:full-path="Pictures/492.svg"/>
  <manifest:file-entry manifest:media-type="image/svg+xml" manifest:full-path="Pictures/491.svg"/>
  <manifest:file-entry manifest:media-type="image/svg+xml" manifest:full-path="Pictures/490.svg"/>
  <manifest:file-entry manifest:media-type="image/svg+xml" manifest:full-path="Pictures/489.svg"/>
  <manifest:file-entry manifest:media-type="image/svg+xml" manifest:full-path="Pictures/488.svg"/>
  <manifest:file-entry manifest:media-type="image/svg+xml" manifest:full-path="Pictures/487.svg"/>
  <manifest:file-entry manifest:media-type="image/svg+xml" manifest:full-path="Pictures/486.svg"/>
  <manifest:file-entry manifest:media-type="image/svg+xml" manifest:full-path="Pictures/485.svg"/>
  <manifest:file-entry manifest:media-type="image/svg+xml" manifest:full-path="Pictures/484.svg"/>
  <manifest:file-entry manifest:media-type="image/svg+xml" manifest:full-path="Pictures/483.svg"/>
  <manifest:file-entry manifest:media-type="image/svg+xml" manifest:full-path="Pictures/482.svg"/>
  <manifest:file-entry manifest:media-type="image/svg+xml" manifest:full-path="Pictures/481.svg"/>
  <manifest:file-entry manifest:media-type="image/svg+xml" manifest:full-path="Pictures/480.svg"/>
  <manifest:file-entry manifest:media-type="image/svg+xml" manifest:full-path="Pictures/479.svg"/>
  <manifest:file-entry manifest:media-type="image/svg+xml" manifest:full-path="Pictures/478.svg"/>
  <manifest:file-entry manifest:media-type="image/svg+xml" manifest:full-path="Pictures/477.svg"/>
  <manifest:file-entry manifest:media-type="image/svg+xml" manifest:full-path="Pictures/476.svg"/>
  <manifest:file-entry manifest:media-type="image/svg+xml" manifest:full-path="Pictures/475.svg"/>
  <manifest:file-entry manifest:media-type="image/svg+xml" manifest:full-path="Pictures/474.svg"/>
  <manifest:file-entry manifest:media-type="image/svg+xml" manifest:full-path="Pictures/473.svg"/>
  <manifest:file-entry manifest:media-type="image/svg+xml" manifest:full-path="Pictures/472.svg"/>
  <manifest:file-entry manifest:media-type="image/svg+xml" manifest:full-path="Pictures/471.svg"/>
  <manifest:file-entry manifest:media-type="image/svg+xml" manifest:full-path="Pictures/470.svg"/>
  <manifest:file-entry manifest:media-type="image/svg+xml" manifest:full-path="Pictures/469.svg"/>
  <manifest:file-entry manifest:media-type="image/svg+xml" manifest:full-path="Pictures/468.svg"/>
  <manifest:file-entry manifest:media-type="image/svg+xml" manifest:full-path="Pictures/467.svg"/>
  <manifest:file-entry manifest:media-type="image/svg+xml" manifest:full-path="Pictures/466.svg"/>
  <manifest:file-entry manifest:media-type="image/svg+xml" manifest:full-path="Pictures/465.svg"/>
  <manifest:file-entry manifest:media-type="image/svg+xml" manifest:full-path="Pictures/464.svg"/>
  <manifest:file-entry manifest:media-type="image/svg+xml" manifest:full-path="Pictures/463.svg"/>
  <manifest:file-entry manifest:media-type="image/svg+xml" manifest:full-path="Pictures/462.svg"/>
  <manifest:file-entry manifest:media-type="image/svg+xml" manifest:full-path="Pictures/461.svg"/>
  <manifest:file-entry manifest:media-type="image/svg+xml" manifest:full-path="Pictures/460.svg"/>
  <manifest:file-entry manifest:media-type="image/svg+xml" manifest:full-path="Pictures/459.svg"/>
  <manifest:file-entry manifest:media-type="image/svg+xml" manifest:full-path="Pictures/458.svg"/>
  <manifest:file-entry manifest:media-type="image/svg+xml" manifest:full-path="Pictures/457.svg"/>
  <manifest:file-entry manifest:media-type="image/svg+xml" manifest:full-path="Pictures/456.svg"/>
  <manifest:file-entry manifest:media-type="image/svg+xml" manifest:full-path="Pictures/455.svg"/>
  <manifest:file-entry manifest:media-type="image/svg+xml" manifest:full-path="Pictures/454.svg"/>
  <manifest:file-entry manifest:media-type="image/svg+xml" manifest:full-path="Pictures/453.svg"/>
  <manifest:file-entry manifest:media-type="image/svg+xml" manifest:full-path="Pictures/452.svg"/>
  <manifest:file-entry manifest:media-type="image/svg+xml" manifest:full-path="Pictures/451.svg"/>
  <manifest:file-entry manifest:media-type="image/svg+xml" manifest:full-path="Pictures/450.svg"/>
  <manifest:file-entry manifest:media-type="image/svg+xml" manifest:full-path="Pictures/449.svg"/>
  <manifest:file-entry manifest:media-type="image/svg+xml" manifest:full-path="Pictures/448.svg"/>
  <manifest:file-entry manifest:media-type="image/svg+xml" manifest:full-path="Pictures/447.svg"/>
  <manifest:file-entry manifest:media-type="image/svg+xml" manifest:full-path="Pictures/446.svg"/>
  <manifest:file-entry manifest:media-type="image/svg+xml" manifest:full-path="Pictures/445.svg"/>
  <manifest:file-entry manifest:media-type="image/svg+xml" manifest:full-path="Pictures/444.svg"/>
  <manifest:file-entry manifest:media-type="image/svg+xml" manifest:full-path="Pictures/443.svg"/>
  <manifest:file-entry manifest:media-type="image/svg+xml" manifest:full-path="Pictures/442.svg"/>
  <manifest:file-entry manifest:media-type="image/svg+xml" manifest:full-path="Pictures/441.svg"/>
  <manifest:file-entry manifest:media-type="image/svg+xml" manifest:full-path="Pictures/440.svg"/>
  <manifest:file-entry manifest:media-type="image/svg+xml" manifest:full-path="Pictures/439.svg"/>
  <manifest:file-entry manifest:media-type="image/svg+xml" manifest:full-path="Pictures/438.svg"/>
  <manifest:file-entry manifest:media-type="image/svg+xml" manifest:full-path="Pictures/437.svg"/>
  <manifest:file-entry manifest:media-type="image/svg+xml" manifest:full-path="Pictures/436.svg"/>
  <manifest:file-entry manifest:media-type="image/svg+xml" manifest:full-path="Pictures/435.svg"/>
  <manifest:file-entry manifest:media-type="image/svg+xml" manifest:full-path="Pictures/434.svg"/>
  <manifest:file-entry manifest:media-type="image/svg+xml" manifest:full-path="Pictures/433.svg"/>
  <manifest:file-entry manifest:media-type="image/svg+xml" manifest:full-path="Pictures/432.svg"/>
  <manifest:file-entry manifest:media-type="image/svg+xml" manifest:full-path="Pictures/431.svg"/>
  <manifest:file-entry manifest:media-type="image/svg+xml" manifest:full-path="Pictures/430.svg"/>
  <manifest:file-entry manifest:media-type="image/svg+xml" manifest:full-path="Pictures/429.svg"/>
  <manifest:file-entry manifest:media-type="image/svg+xml" manifest:full-path="Pictures/428.svg"/>
  <manifest:file-entry manifest:media-type="image/svg+xml" manifest:full-path="Pictures/427.svg"/>
  <manifest:file-entry manifest:media-type="image/svg+xml" manifest:full-path="Pictures/426.svg"/>
  <manifest:file-entry manifest:media-type="image/svg+xml" manifest:full-path="Pictures/425.svg"/>
  <manifest:file-entry manifest:media-type="image/svg+xml" manifest:full-path="Pictures/424.svg"/>
  <manifest:file-entry manifest:media-type="image/svg+xml" manifest:full-path="Pictures/423.svg"/>
  <manifest:file-entry manifest:media-type="image/svg+xml" manifest:full-path="Pictures/422.svg"/>
  <manifest:file-entry manifest:media-type="image/svg+xml" manifest:full-path="Pictures/421.svg"/>
  <manifest:file-entry manifest:media-type="image/svg+xml" manifest:full-path="Pictures/420.svg"/>
  <manifest:file-entry manifest:media-type="image/svg+xml" manifest:full-path="Pictures/419.svg"/>
  <manifest:file-entry manifest:media-type="image/svg+xml" manifest:full-path="Pictures/418.svg"/>
  <manifest:file-entry manifest:media-type="image/svg+xml" manifest:full-path="Pictures/417.svg"/>
  <manifest:file-entry manifest:media-type="image/svg+xml" manifest:full-path="Pictures/416.svg"/>
  <manifest:file-entry manifest:media-type="image/svg+xml" manifest:full-path="Pictures/415.svg"/>
  <manifest:file-entry manifest:media-type="image/svg+xml" manifest:full-path="Pictures/414.svg"/>
  <manifest:file-entry manifest:media-type="image/svg+xml" manifest:full-path="Pictures/413.svg"/>
  <manifest:file-entry manifest:media-type="image/svg+xml" manifest:full-path="Pictures/412.svg"/>
  <manifest:file-entry manifest:media-type="image/svg+xml" manifest:full-path="Pictures/411.svg"/>
  <manifest:file-entry manifest:media-type="image/svg+xml" manifest:full-path="Pictures/410.svg"/>
  <manifest:file-entry manifest:media-type="image/svg+xml" manifest:full-path="Pictures/409.svg"/>
  <manifest:file-entry manifest:media-type="image/svg+xml" manifest:full-path="Pictures/408.svg"/>
  <manifest:file-entry manifest:media-type="image/svg+xml" manifest:full-path="Pictures/407.svg"/>
  <manifest:file-entry manifest:media-type="image/svg+xml" manifest:full-path="Pictures/406.svg"/>
  <manifest:file-entry manifest:media-type="image/svg+xml" manifest:full-path="Pictures/405.svg"/>
  <manifest:file-entry manifest:media-type="image/svg+xml" manifest:full-path="Pictures/404.svg"/>
  <manifest:file-entry manifest:media-type="image/svg+xml" manifest:full-path="Pictures/403.svg"/>
  <manifest:file-entry manifest:media-type="image/svg+xml" manifest:full-path="Pictures/402.svg"/>
  <manifest:file-entry manifest:media-type="image/svg+xml" manifest:full-path="Pictures/401.svg"/>
  <manifest:file-entry manifest:media-type="image/svg+xml" manifest:full-path="Pictures/400.svg"/>
  <manifest:file-entry manifest:media-type="image/svg+xml" manifest:full-path="Pictures/399.svg"/>
  <manifest:file-entry manifest:media-type="image/svg+xml" manifest:full-path="Pictures/398.svg"/>
  <manifest:file-entry manifest:media-type="image/svg+xml" manifest:full-path="Pictures/397.svg"/>
  <manifest:file-entry manifest:media-type="image/svg+xml" manifest:full-path="Pictures/396.svg"/>
  <manifest:file-entry manifest:media-type="image/svg+xml" manifest:full-path="Pictures/395.svg"/>
  <manifest:file-entry manifest:media-type="image/svg+xml" manifest:full-path="Pictures/394.svg"/>
  <manifest:file-entry manifest:media-type="image/svg+xml" manifest:full-path="Pictures/393.svg"/>
  <manifest:file-entry manifest:media-type="image/svg+xml" manifest:full-path="Pictures/392.svg"/>
  <manifest:file-entry manifest:media-type="image/svg+xml" manifest:full-path="Pictures/391.svg"/>
  <manifest:file-entry manifest:media-type="image/svg+xml" manifest:full-path="Pictures/390.svg"/>
  <manifest:file-entry manifest:media-type="image/svg+xml" manifest:full-path="Pictures/389.svg"/>
  <manifest:file-entry manifest:media-type="image/svg+xml" manifest:full-path="Pictures/388.svg"/>
  <manifest:file-entry manifest:media-type="image/svg+xml" manifest:full-path="Pictures/387.svg"/>
  <manifest:file-entry manifest:media-type="image/svg+xml" manifest:full-path="Pictures/386.svg"/>
  <manifest:file-entry manifest:media-type="image/svg+xml" manifest:full-path="Pictures/385.svg"/>
  <manifest:file-entry manifest:media-type="image/svg+xml" manifest:full-path="Pictures/384.svg"/>
  <manifest:file-entry manifest:media-type="image/svg+xml" manifest:full-path="Pictures/383.svg"/>
  <manifest:file-entry manifest:media-type="image/svg+xml" manifest:full-path="Pictures/382.svg"/>
  <manifest:file-entry manifest:media-type="image/svg+xml" manifest:full-path="Pictures/381.svg"/>
  <manifest:file-entry manifest:media-type="image/svg+xml" manifest:full-path="Pictures/380.svg"/>
  <manifest:file-entry manifest:media-type="image/svg+xml" manifest:full-path="Pictures/379.svg"/>
  <manifest:file-entry manifest:media-type="image/svg+xml" manifest:full-path="Pictures/378.svg"/>
  <manifest:file-entry manifest:media-type="image/svg+xml" manifest:full-path="Pictures/377.svg"/>
  <manifest:file-entry manifest:media-type="image/svg+xml" manifest:full-path="Pictures/376.svg"/>
  <manifest:file-entry manifest:media-type="image/svg+xml" manifest:full-path="Pictures/375.svg"/>
  <manifest:file-entry manifest:media-type="image/svg+xml" manifest:full-path="Pictures/374.svg"/>
  <manifest:file-entry manifest:media-type="image/svg+xml" manifest:full-path="Pictures/373.svg"/>
  <manifest:file-entry manifest:media-type="image/svg+xml" manifest:full-path="Pictures/372.svg"/>
  <manifest:file-entry manifest:media-type="image/svg+xml" manifest:full-path="Pictures/371.svg"/>
  <manifest:file-entry manifest:media-type="image/svg+xml" manifest:full-path="Pictures/370.svg"/>
  <manifest:file-entry manifest:media-type="image/svg+xml" manifest:full-path="Pictures/369.svg"/>
  <manifest:file-entry manifest:media-type="image/svg+xml" manifest:full-path="Pictures/368.svg"/>
  <manifest:file-entry manifest:media-type="image/svg+xml" manifest:full-path="Pictures/367.svg"/>
  <manifest:file-entry manifest:media-type="image/svg+xml" manifest:full-path="Pictures/366.svg"/>
  <manifest:file-entry manifest:media-type="image/svg+xml" manifest:full-path="Pictures/365.svg"/>
  <manifest:file-entry manifest:media-type="image/svg+xml" manifest:full-path="Pictures/364.svg"/>
  <manifest:file-entry manifest:media-type="image/svg+xml" manifest:full-path="Pictures/363.svg"/>
  <manifest:file-entry manifest:media-type="image/svg+xml" manifest:full-path="Pictures/362.svg"/>
  <manifest:file-entry manifest:media-type="image/svg+xml" manifest:full-path="Pictures/361.svg"/>
  <manifest:file-entry manifest:media-type="image/svg+xml" manifest:full-path="Pictures/360.svg"/>
  <manifest:file-entry manifest:media-type="image/svg+xml" manifest:full-path="Pictures/359.svg"/>
  <manifest:file-entry manifest:media-type="image/svg+xml" manifest:full-path="Pictures/358.svg"/>
  <manifest:file-entry manifest:media-type="image/svg+xml" manifest:full-path="Pictures/357.svg"/>
  <manifest:file-entry manifest:media-type="image/svg+xml" manifest:full-path="Pictures/356.svg"/>
  <manifest:file-entry manifest:media-type="image/svg+xml" manifest:full-path="Pictures/355.svg"/>
  <manifest:file-entry manifest:media-type="image/svg+xml" manifest:full-path="Pictures/354.svg"/>
  <manifest:file-entry manifest:media-type="image/svg+xml" manifest:full-path="Pictures/353.svg"/>
  <manifest:file-entry manifest:media-type="image/svg+xml" manifest:full-path="Pictures/352.svg"/>
  <manifest:file-entry manifest:media-type="image/svg+xml" manifest:full-path="Pictures/351.svg"/>
  <manifest:file-entry manifest:media-type="image/svg+xml" manifest:full-path="Pictures/350.svg"/>
  <manifest:file-entry manifest:media-type="image/svg+xml" manifest:full-path="Pictures/349.svg"/>
  <manifest:file-entry manifest:media-type="image/svg+xml" manifest:full-path="Pictures/348.svg"/>
  <manifest:file-entry manifest:media-type="image/svg+xml" manifest:full-path="Pictures/347.svg"/>
  <manifest:file-entry manifest:media-type="image/svg+xml" manifest:full-path="Pictures/346.svg"/>
  <manifest:file-entry manifest:media-type="image/svg+xml" manifest:full-path="Pictures/345.svg"/>
  <manifest:file-entry manifest:media-type="image/svg+xml" manifest:full-path="Pictures/344.svg"/>
  <manifest:file-entry manifest:media-type="image/svg+xml" manifest:full-path="Pictures/343.svg"/>
  <manifest:file-entry manifest:media-type="image/svg+xml" manifest:full-path="Pictures/342.svg"/>
  <manifest:file-entry manifest:media-type="image/svg+xml" manifest:full-path="Pictures/341.svg"/>
  <manifest:file-entry manifest:media-type="image/svg+xml" manifest:full-path="Pictures/340.svg"/>
  <manifest:file-entry manifest:media-type="image/svg+xml" manifest:full-path="Pictures/339.svg"/>
  <manifest:file-entry manifest:media-type="image/svg+xml" manifest:full-path="Pictures/338.svg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3107*"/>
    </style:style>
    <style:style style:name="Table2.B" style:family="table-column">
      <style:table-column-properties style:rel-column-width="13107*"/>
    </style:style>
    <style:style style:name="Table2.C" style:family="table-column">
      <style:table-column-properties style:rel-column-width="13107*"/>
    </style:style>
    <style:style style:name="Table2.D" style:family="table-column">
      <style:table-column-properties style:rel-column-width="13107*"/>
    </style:style>
    <style:style style:name="Table2.E" style:family="table-column">
      <style:table-column-properties style:rel-column-width="1310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7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1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ABShowWpButtons</text:span></text:a></text:p>
          </table:table-cell>
          <table:table-cell table:style-name="TableRowCell" office:value-type="string">
            <text:p text:style-name="Table_20_Contents"><text:a xlink:type="simple" xlink:href="../../viewer/gui/NavPage.tsx#L96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ig</text:span></text:a></text:p>
          </table:table-cell>
          <table:table-cell table:style-name="TableRowCell" office:value-type="string">
            <text:p text:style-name="Table_20_Contents">Configure user ap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Edit image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" office:name=""><text:span text:style-name="Definition">AddonConfigPlus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Edit 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6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 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2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Lis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5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lsiting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Show 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3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3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        <text:p text:style-name="Table_20_Contents">Search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1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        <text:p text:style-name="Table_20_Contents">Sor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Browser</text:span></text:a></text:p>
          </table:table-cell>
          <table:table-cell table:style-name="TableRowCell" office:value-type="string">
            <text:p text:style-name="Table_20_Contents">Start 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lose</text:span></text:a></text:p>
          </table:table-cell>
          <table:table-cell table:style-name="TableRowCell" office:value-type="string">
            <text:p text:style-name="Table_20_Contents">Close 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97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7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4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Info</text:span></text:a></text:p>
          </table:table-cell>
          <table:table-cell table:style-name="TableRowCell" office:value-type="string">
            <text:p text:style-name="Table_20_Contents">Info at Crosshai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Select &amp; upload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9" office:name=""><text:span text:style-name="Definition">Connect</text:span></text:a></text:p>
          </table:table-cell>
          <table:table-cell table:style-name="TableRowCell" office:value-type="string">
            <text:p text:style-name="Table_20_Contents">Connect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Course</text:span></text:a></text:p>
          </table:table-cell>
          <table:table-cell table:style-name="TableRowCell" office:value-type="string">
            <text:p text:style-name="Table_20_Contents">Course up / north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1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9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8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51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2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7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6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8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2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9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1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2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2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5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2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1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2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72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0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0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2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3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1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0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0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4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5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0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7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8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22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0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6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6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2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4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0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5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6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9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6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81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8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8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32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7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8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9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9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3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0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90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6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17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Ign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4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4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6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0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7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3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6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5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2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2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4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9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8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2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3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6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2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5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Open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7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1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7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8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2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5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20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6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1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8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2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8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0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5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0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6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3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60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60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8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4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9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2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4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4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3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0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3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1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3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0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3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4" office:name=""><text:span text:style-name="Definition">En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Remo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9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Edit</text:span></text:a></text:p>
          </table:table-cell>
          <table:table-cell table:style-name="TableRowCell" office:value-type="string">
            <text:p text:style-name="Table_20_Contents">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2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0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>Dash 1</text:span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5" office:name=""><text:span text:style-name="Definition">Dash 10</text:span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>Dash 2</text:span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>Dash 3</text:span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Dash 4</text:span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Dash 5</text:span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Dash 6</text:span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Dash 7</text:span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>Dash 8</text:span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2" office:name=""><text:span text:style-name="Definition">Dash 9</text:span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2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GPS</text:span></text:a></text:p>
          </table:table-cell>
          <table:table-cell table:style-name="TableRowCell" office:value-type="string">
            <text:p text:style-name="Table_20_Contents">Center chart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97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</text:span></text:a></text:p>
          </table:table-cell>
          <table:table-cell table:style-name="TableRowCell" office:value-type="string">
            <text:p text:style-name="Table_20_Contents">Impor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103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6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2" office:name=""><text:span text:style-name="Definition">Finished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8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Follow</text:span></text:a></text:p>
          </table:table-cell>
          <table:table-cell table:style-name="TableRowCell" office:value-type="string">
            <text:p text:style-name="Table_20_Contents">Chart follows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9" office:name=""><text:span text:style-name="Definition">components/Mob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Perso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Info</text:span></text:a></text:p>
          </table:table-cell>
          <table:table-cell table:style-name="TableRowCell" office:value-type="string">
            <text:p text:style-name="Table_20_Contents">App version &amp;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1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5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3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62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Add</text:span></text:a></text:p>
          </table:table-cell>
          <table:table-cell table:style-name="TableRowCell" office:value-type="string">
            <text:p text:style-name="Table_20_Contents">Add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7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1" office:name=""><text:span text:style-name="Definition">Off</text:span></text:a></text:p>
          </table:table-cell>
          <table:table-cell table:style-name="TableRowCell" office:value-type="string">
            <text:p text:style-name="Table_20_Contents">Measurement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0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Tools</text:span></text:a></text:p>
          </table:table-cell>
          <table:table-cell table:style-name="TableRowCell" office:value-type="string">
            <text:p text:style-name="Table_20_Contents">Show nav tool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.tsx#L95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98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Before</text:span></text:a></text:p>
          </table:table-cell>
          <table:table-cell table:style-name="TableRowCell" office:value-type="string">
            <text:p text:style-name="Table_20_Contents">Add wp before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4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1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After</text:span></text:a></text:p>
          </table:table-cell>
          <table:table-cell table:style-name="TableRowCell" office:value-type="string">
            <text:p text:style-name="Table_20_Contents">Add wp after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29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6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9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31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4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67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8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5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5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kip</text:span></text:a></text:p>
          </table:table-cell>
          <table:table-cell table:style-name="TableRowCell" office:value-type="string">
            <text:p text:style-name="Table_20_Contents">Skip curren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8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SelectCh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29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Selec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.tsx#L94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2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Shift</text:span></text:a></text:p>
          </table:table-cell>
          <table:table-cell table:style-name="TableRowCell" office:value-type="string">
            <text:p text:style-name="Table_20_Contents">Shift wp to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77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27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/D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5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6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5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Edit 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93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0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1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5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28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Edit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2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Default</text:span></text:a></text:p>
          </table:table-cell>
          <table:table-cell table:style-name="TableRowCell" office:value-type="string">
            <text:p text:style-name="Table_20_Contents">Reset to default valu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ist</text:span></text:a></text:p>
          </table:table-cell>
          <table:table-cell table:style-name="TableRowCell" office:value-type="string">
            <text:p text:style-name="Table_20_Contents">Lis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5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5" office:name=""><text:span text:style-name="Definition">Remove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2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36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Route</text:span></text:a></text:p>
          </table:table-cell>
          <table:table-cell table:style-name="TableRowCell" office:value-type="string">
            <text:p text:style-name="Table_20_Contents">Open route edito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2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7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4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81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Net</text:span></text:a></text:p>
          </table:table-cell>
          <table:table-cell table:style-name="TableRowCell" office:value-type="string">
            <text:p text:style-name="Table_20_Contents">Network 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Expand</text:span></text:a></text:p>
          </table:table-cell>
          <table:table-cell table:style-name="TableRowCell" office:value-type="string">
            <text:p text:style-name="Table_20_Contents">List all handler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Debug</text:span></text:a></text:p>
          </table:table-cell>
          <table:table-cell table:style-name="TableRowCell" office:value-type="string">
            <text:p text:style-name="Table_20_Contents">Enable debugg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0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8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 compu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op</text:span></text:a></text:p>
          </table:table-cell>
          <table:table-cell table:style-name="TableRowCell" office:value-type="string">
            <text:p text:style-name="Table_20_Contents">Stop 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35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4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1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<text:span text:style-name="T1">StopW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23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7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StopW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2" office:name=""><text:span text:style-name="Definition">List</text:span></text:a></text:p>
          </table:table-cell>
          <table:table-cell table:style-name="TableRowCell" office:value-type="string">
            <text:p text:style-name="Table_20_Contents">Edi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62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Sync</text:span></text:a></text:p>
          </table:table-cell>
          <table:table-cell table:style-name="TableRowCell" office:value-type="string">
            <text:p text:style-name="Table_20_Contents">Sync routes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6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4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3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8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9" office:name=""><text:span text:style-name="Definition">List</text:span></text:a></text:p>
          </table:table-cell>
          <table:table-cell table:style-name="TableRowCell" office:value-type="string">
            <text:p text:style-name="Table_20_Contents">Edi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4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Upload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33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30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1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9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WpGoto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49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2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83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.tsx#L90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WpGoto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0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5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8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2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8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6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4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1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8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Wp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41" office:name=""><text:span text:style-name="Definition">gui/Nav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04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3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339" svg:width="0.41667in" svg:height="0.4166666666666667in"><draw:image xlink:href="Pictures/3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0" svg:width="0.41667in" svg:height="0.4166666666666667in"><draw:image xlink:href="Pictures/3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75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0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2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341" svg:width="0.41667in" svg:height="0.4166666666666667in"><draw:image xlink:href="Pictures/3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2" svg:width="0.41667in" svg:height="0.4166666666666667in"><draw:image xlink:href="Pictures/3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7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343" svg:width="0.41667in" svg:height="0.4166666666666667in"><draw:image xlink:href="Pictures/3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4" svg:width="0.41667in" svg:height="0.4166666666666667in"><draw:image xlink:href="Pictures/34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3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345" svg:width="0.41667in" svg:height="0.4166666666666667in"><draw:image xlink:href="Pictures/3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6" svg:width="0.41667in" svg:height="0.4166666666666667in"><draw:image xlink:href="Pictures/34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347" svg:width="0.41667in" svg:height="0.4166666666666667in"><draw:image xlink:href="Pictures/3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48" svg:width="0.41667in" svg:height="0.4166666666666667in"><draw:image xlink:href="Pictures/34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4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21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349" svg:width="0.41667in" svg:height="0.4166666666666667in"><draw:image xlink:href="Pictures/3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0" svg:width="0.41667in" svg:height="0.4166666666666667in"><draw:image xlink:href="Pictures/34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351" svg:width="0.41667in" svg:height="0.4166666666666667in"><draw:image xlink:href="Pictures/3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2" svg:width="0.41667in" svg:height="0.4166666666666667in"><draw:image xlink:href="Pictures/35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6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59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353" svg:width="0.41667in" svg:height="0.4166666666666667in"><draw:image xlink:href="Pictures/3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4" svg:width="0.41667in" svg:height="0.4166666666666667in"><draw:image xlink:href="Pictures/35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355" svg:width="0.41667in" svg:height="0.4166666666666667in"><draw:image xlink:href="Pictures/3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6" svg:width="0.41667in" svg:height="0.4166666666666667in"><draw:image xlink:href="Pictures/35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2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357" svg:width="0.41667in" svg:height="0.4166666666666667in"><draw:image xlink:href="Pictures/3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58" svg:width="0.41667in" svg:height="0.4166666666666667in"><draw:image xlink:href="Pictures/35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T1">Empty</text:span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6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359" svg:width="0.41667in" svg:height="0.4166666666666667in"><draw:image xlink:href="Pictures/3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0" svg:width="0.41667in" svg:height="0.4166666666666667in"><draw:image xlink:href="Pictures/35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19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361" svg:width="0.41667in" svg:height="0.4166666666666667in"><draw:image xlink:href="Pictures/3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2" svg:width="0.41667in" svg:height="0.4166666666666667in"><draw:image xlink:href="Pictures/36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2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363" svg:width="0.41667in" svg:height="0.4166666666666667in"><draw:image xlink:href="Pictures/3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4" svg:width="0.41667in" svg:height="0.4166666666666667in"><draw:image xlink:href="Pictures/36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5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365" svg:width="0.41667in" svg:height="0.4166666666666667in"><draw:image xlink:href="Pictures/3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6" svg:width="0.41667in" svg:height="0.4166666666666667in"><draw:image xlink:href="Pictures/36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28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367" svg:width="0.41667in" svg:height="0.4166666666666667in"><draw:image xlink:href="Pictures/3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68" svg:width="0.41667in" svg:height="0.4166666666666667in"><draw:image xlink:href="Pictures/36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1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369" svg:width="0.41667in" svg:height="0.4166666666666667in"><draw:image xlink:href="Pictures/3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0" svg:width="0.41667in" svg:height="0.4166666666666667in"><draw:image xlink:href="Pictures/36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3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371" svg:width="0.41667in" svg:height="0.4166666666666667in"><draw:image xlink:href="Pictures/3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2" svg:width="0.41667in" svg:height="0.4166666666666667in"><draw:image xlink:href="Pictures/3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49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373" svg:width="0.41667in" svg:height="0.4166666666666667in"><draw:image xlink:href="Pictures/3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4" svg:width="0.41667in" svg:height="0.4166666666666667in"><draw:image xlink:href="Pictures/3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7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375" svg:width="0.41667in" svg:height="0.4166666666666667in"><draw:image xlink:href="Pictures/3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6" svg:width="0.41667in" svg:height="0.4166666666666667in"><draw:image xlink:href="Pictures/3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2" office:name=""><text:span text:style-name="Definition">Layout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58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377" svg:width="0.41667in" svg:height="0.4166666666666667in"><draw:image xlink:href="Pictures/3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78" svg:width="0.41667in" svg:height="0.4166666666666667in"><draw:image xlink:href="Pictures/3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9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379" svg:width="0.41667in" svg:height="0.4166666666666667in"><draw:image xlink:href="Pictures/3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0" svg:width="0.41667in" svg:height="0.4166666666666667in"><draw:image xlink:href="Pictures/3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0" office:name=""><text:span text:style-name="Definition">MNCatNav</text:span></text:a></text:p>
          </table:table-cell>
          <table:table-cell table:style-name="TableRowCell" office:value-type="string">
            <text:p text:style-name="Table_20_Contents"><text:a xlink:type="simple" xlink:href="../../viewer/gui/MainNav.tsx#L11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3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381" svg:width="0.41667in" svg:height="0.4166666666666667in"><draw:image xlink:href="Pictures/3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2" svg:width="0.41667in" svg:height="0.4166666666666667in"><draw:image xlink:href="Pictures/3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1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5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3" office:name=""><text:span text:style-name="Definition">MNCatSet</text:span></text:a></text:p>
          </table:table-cell>
          <table:table-cell table:style-name="TableRowCell" office:value-type="string">
            <text:p text:style-name="Table_20_Contents"><text:a xlink:type="simple" xlink:href="../../viewer/gui/MainNav.tsx#L137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383" svg:width="0.41667in" svg:height="0.4166666666666667in"><draw:image xlink:href="Pictures/3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4" svg:width="0.41667in" svg:height="0.4166666666666667in"><draw:image xlink:href="Pictures/3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6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36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98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385" svg:width="0.41667in" svg:height="0.4166666666666667in"><draw:image xlink:href="Pictures/3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6" svg:width="0.41667in" svg:height="0.4166666666666667in"><draw:image xlink:href="Pictures/3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79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387" svg:width="0.41667in" svg:height="0.4166666666666667in"><draw:image xlink:href="Pictures/3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88" svg:width="0.41667in" svg:height="0.4166666666666667in"><draw:image xlink:href="Pictures/3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8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1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389" svg:width="0.41667in" svg:height="0.4166666666666667in"><draw:image xlink:href="Pictures/3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0" svg:width="0.41667in" svg:height="0.4166666666666667in"><draw:image xlink:href="Pictures/3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97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97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391" svg:width="0.41667in" svg:height="0.4166666666666667in"><draw:image xlink:href="Pictures/3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2" svg:width="0.41667in" svg:height="0.4166666666666667in"><draw:image xlink:href="Pictures/3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8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393" svg:width="0.41667in" svg:height="0.4166666666666667in"><draw:image xlink:href="Pictures/3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4" svg:width="0.41667in" svg:height="0.4166666666666667in"><draw:image xlink:href="Pictures/3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0" office:name=""><text:span text:style-name="Definition"><text:span text:style-name="T1">Ok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ParameterDialog.tsx#L120" office:name=""><text:span text:style-name="Definition">components/ParameterDialog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395" svg:width="0.41667in" svg:height="0.4166666666666667in"><draw:image xlink:href="Pictures/3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6" svg:width="0.41667in" svg:height="0.4166666666666667in"><draw:image xlink:href="Pictures/3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397" svg:width="0.41667in" svg:height="0.4166666666666667in"><draw:image xlink:href="Pictures/3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398" svg:width="0.41667in" svg:height="0.4166666666666667in"><draw:image xlink:href="Pictures/3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8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69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72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399" svg:width="0.41667in" svg:height="0.4166666666666667in"><draw:image xlink:href="Pictures/3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0" svg:width="0.41667in" svg:height="0.4166666666666667in"><draw:image xlink:href="Pictures/3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72" office:name=""><text:span text:style-name="Definition">Plugin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84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4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401" svg:width="0.41667in" svg:height="0.4166666666666667in"><draw:image xlink:href="Pictures/4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2" svg:width="0.41667in" svg:height="0.4166666666666667in"><draw:image xlink:href="Pictures/4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87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403" svg:width="0.41667in" svg:height="0.4166666666666667in"><draw:image xlink:href="Pictures/4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4" svg:width="0.41667in" svg:height="0.4166666666666667in"><draw:image xlink:href="Pictures/4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2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2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405" svg:width="0.41667in" svg:height="0.4166666666666667in"><draw:image xlink:href="Pictures/4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6" svg:width="0.41667in" svg:height="0.4166666666666667in"><draw:image xlink:href="Pictures/40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19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407" svg:width="0.41667in" svg:height="0.4166666666666667in"><draw:image xlink:href="Pictures/4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08" svg:width="0.41667in" svg:height="0.4166666666666667in"><draw:image xlink:href="Pictures/40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05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14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14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409" svg:width="0.41667in" svg:height="0.4166666666666667in"><draw:image xlink:href="Pictures/4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0" svg:width="0.41667in" svg:height="0.4166666666666667in"><draw:image xlink:href="Pictures/40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411" svg:width="0.41667in" svg:height="0.4166666666666667in"><draw:image xlink:href="Pictures/4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2" svg:width="0.41667in" svg:height="0.4166666666666667in"><draw:image xlink:href="Pictures/41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gui/MainNav.tsx#L353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12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5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413" svg:width="0.41667in" svg:height="0.4166666666666667in"><draw:image xlink:href="Pictures/4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4" svg:width="0.41667in" svg:height="0.4166666666666667in"><draw:image xlink:href="Pictures/41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5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8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8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415" svg:width="0.41667in" svg:height="0.4166666666666667in"><draw:image xlink:href="Pictures/4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6" svg:width="0.41667in" svg:height="0.4166666666666667in"><draw:image xlink:href="Pictures/41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417" svg:width="0.41667in" svg:height="0.4166666666666667in"><draw:image xlink:href="Pictures/4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18" svg:width="0.41667in" svg:height="0.4166666666666667in"><draw:image xlink:href="Pictures/41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0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419" svg:width="0.41667in" svg:height="0.4166666666666667in"><draw:image xlink:href="Pictures/4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0" svg:width="0.41667in" svg:height="0.4166666666666667in"><draw:image xlink:href="Pictures/41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421" svg:width="0.41667in" svg:height="0.4166666666666667in"><draw:image xlink:href="Pictures/4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2" svg:width="0.41667in" svg:height="0.4166666666666667in"><draw:image xlink:href="Pictures/42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IconNew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style/icons.less#L8" office:name=""><text:span text:style-name="Definition">AddOns</text:span></text:a></text:p>
          </table:table-cell>
          <table:table-cell table:style-name="TableRowCell" office:value-type="string">
            <text:p text:style-name="Table_20_Contents"><draw:frame draw:name="img423" svg:width="0.41667in" svg:height="0.4166666666666667in"><draw:image xlink:href="Pictures/4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4" svg:width="0.41667in" svg:height="0.4166666666666667in"><draw:image xlink:href="Pictures/423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" office:name=""><text:span text:style-name="Definition">AddonConfigPlus</text:span></text:a></text:p>
          </table:table-cell>
          <table:table-cell table:style-name="TableRowCell" office:value-type="string">
            <text:p text:style-name="Table_20_Contents"><draw:frame draw:name="img425" svg:width="0.41667in" svg:height="0.4166666666666667in"><draw:image xlink:href="Pictures/4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6" svg:width="0.41667in" svg:height="0.4166666666666667in"><draw:image xlink:href="Pictures/425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" office:name=""><text:span text:style-name="Definition">After</text:span></text:a></text:p>
          </table:table-cell>
          <table:table-cell table:style-name="TableRowCell" office:value-type="string">
            <text:p text:style-name="Table_20_Contents"><draw:frame draw:name="img427" svg:width="0.41667in" svg:height="0.4166666666666667in"><draw:image xlink:href="Pictures/4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28" svg:width="0.41667in" svg:height="0.4166666666666667in"><draw:image xlink:href="Pictures/427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" office:name=""><text:span text:style-name="Definition">AisInfoHide</text:span></text:a></text:p>
          </table:table-cell>
          <table:table-cell table:style-name="TableRowCell" office:value-type="string">
            <text:p text:style-name="Table_20_Contents"><draw:frame draw:name="img429" svg:width="0.41667in" svg:height="0.4166666666666667in"><draw:image xlink:href="Pictures/4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0" svg:width="0.41667in" svg:height="0.4166666666666667in"><draw:image xlink:href="Pictures/429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" office:name=""><text:span text:style-name="Definition">AisNearest</text:span></text:a></text:p>
          </table:table-cell>
          <table:table-cell table:style-name="TableRowCell" office:value-type="string">
            <text:p text:style-name="Table_20_Contents"><draw:frame draw:name="img431" svg:width="0.41667in" svg:height="0.4166666666666667in"><draw:image xlink:href="Pictures/4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2" svg:width="0.41667in" svg:height="0.4166666666666667in"><draw:image xlink:href="Pictures/431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" office:name=""><text:span text:style-name="Definition">Anchor</text:span></text:a></text:p>
          </table:table-cell>
          <table:table-cell table:style-name="TableRowCell" office:value-type="string">
            <text:p text:style-name="Table_20_Contents"><draw:frame draw:name="img433" svg:width="0.41667in" svg:height="0.4166666666666667in"><draw:image xlink:href="Pictures/4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4" svg:width="0.41667in" svg:height="0.4166666666666667in"><draw:image xlink:href="Pictures/433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" office:name=""><text:span text:style-name="Definition">AnchorEnd</text:span></text:a></text:p>
          </table:table-cell>
          <table:table-cell table:style-name="TableRowCell" office:value-type="string">
            <text:p text:style-name="Table_20_Contents"><draw:frame draw:name="img435" svg:width="0.41667in" svg:height="0.4166666666666667in"><draw:image xlink:href="Pictures/4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6" svg:width="0.41667in" svg:height="0.4166666666666667in"><draw:image xlink:href="Pictures/435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" office:name=""><text:span text:style-name="Definition">Android</text:span></text:a></text:p>
          </table:table-cell>
          <table:table-cell table:style-name="TableRowCell" office:value-type="string">
            <text:p text:style-name="Table_20_Contents"><draw:frame draw:name="img437" svg:width="0.41667in" svg:height="0.4166666666666667in"><draw:image xlink:href="Pictures/4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38" svg:width="0.41667in" svg:height="0.4166666666666667in"><draw:image xlink:href="Pictures/437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" office:name=""><text:span text:style-name="Definition">Back</text:span></text:a></text:p>
          </table:table-cell>
          <table:table-cell table:style-name="TableRowCell" office:value-type="string">
            <text:p text:style-name="Table_20_Contents"><draw:frame draw:name="img439" svg:width="0.41667in" svg:height="0.4166666666666667in"><draw:image xlink:href="Pictures/4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0" svg:width="0.41667in" svg:height="0.4166666666666667in"><draw:image xlink:href="Pictures/439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" office:name=""><text:span text:style-name="Definition">Before</text:span></text:a></text:p>
          </table:table-cell>
          <table:table-cell table:style-name="TableRowCell" office:value-type="string">
            <text:p text:style-name="Table_20_Contents"><draw:frame draw:name="img441" svg:width="0.41667in" svg:height="0.4166666666666667in"><draw:image xlink:href="Pictures/4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2" svg:width="0.41667in" svg:height="0.4166666666666667in"><draw:image xlink:href="Pictures/441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" office:name=""><text:span text:style-name="Definition">Boat</text:span></text:a></text:p>
          </table:table-cell>
          <table:table-cell table:style-name="TableRowCell" office:value-type="string">
            <text:p text:style-name="Table_20_Contents"><draw:frame draw:name="img443" svg:width="0.41667in" svg:height="0.4166666666666667in"><draw:image xlink:href="Pictures/4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4" svg:width="0.41667in" svg:height="0.4166666666666667in"><draw:image xlink:href="Pictures/443.svg" xlink:type="simple" xlink:show="embed" xlink:actuate="onLoad"/></draw:frame></text:p>
          </table:table-cell>
          <table:table-cell table:style-name="TableRowCell" office:value-type="string">
            <text:p text:style-name="Table_20_Contents">DBAnchorBoa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" office:name=""><text:span text:style-name="Definition">Browser</text:span></text:a></text:p>
          </table:table-cell>
          <table:table-cell table:style-name="TableRowCell" office:value-type="string">
            <text:p text:style-name="Table_20_Contents"><draw:frame draw:name="img445" svg:width="0.41667in" svg:height="0.4166666666666667in"><draw:image xlink:href="Pictures/4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6" svg:width="0.41667in" svg:height="0.4166666666666667in"><draw:image xlink:href="Pictures/445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4" office:name=""><text:span text:style-name="Definition">Cancel</text:span></text:a></text:p>
          </table:table-cell>
          <table:table-cell table:style-name="TableRowCell" office:value-type="string">
            <text:p text:style-name="Table_20_Contents"><draw:frame draw:name="img447" svg:width="0.41667in" svg:height="0.4166666666666667in"><draw:image xlink:href="Pictures/4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48" svg:width="0.41667in" svg:height="0.4166666666666667in"><draw:image xlink:href="Pictures/447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7" office:name=""><text:span text:style-name="Definition">Center</text:span></text:a></text:p>
          </table:table-cell>
          <table:table-cell table:style-name="TableRowCell" office:value-type="string">
            <text:p text:style-name="Table_20_Contents"><draw:frame draw:name="img449" svg:width="0.41667in" svg:height="0.4166666666666667in"><draw:image xlink:href="Pictures/4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0" svg:width="0.41667in" svg:height="0.4166666666666667in"><draw:image xlink:href="Pictures/449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0" office:name=""><text:span text:style-name="Definition">CenterAction</text:span></text:a></text:p>
          </table:table-cell>
          <table:table-cell table:style-name="TableRowCell" office:value-type="string">
            <text:p text:style-name="Table_20_Contents"><draw:frame draw:name="img451" svg:width="0.41667in" svg:height="0.4166666666666667in"><draw:image xlink:href="Pictures/4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2" svg:width="0.41667in" svg:height="0.4166666666666667in"><draw:image xlink:href="Pictures/451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3" office:name=""><text:span text:style-name="Definition">ChartScheme</text:span></text:a></text:p>
          </table:table-cell>
          <table:table-cell table:style-name="TableRowCell" office:value-type="string">
            <text:p text:style-name="Table_20_Contents"><draw:frame draw:name="img453" svg:width="0.41667in" svg:height="0.4166666666666667in"><draw:image xlink:href="Pictures/4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4" svg:width="0.41667in" svg:height="0.4166666666666667in"><draw:image xlink:href="Pictures/453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6" office:name=""><text:span text:style-name="Definition">Charts</text:span></text:a></text:p>
          </table:table-cell>
          <table:table-cell table:style-name="TableRowCell" office:value-type="string">
            <text:p text:style-name="Table_20_Contents"><draw:frame draw:name="img455" svg:width="0.41667in" svg:height="0.4166666666666667in"><draw:image xlink:href="Pictures/4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6" svg:width="0.41667in" svg:height="0.4166666666666667in"><draw:image xlink:href="Pictures/455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59" office:name=""><text:span text:style-name="Definition">Checked</text:span></text:a></text:p>
          </table:table-cell>
          <table:table-cell table:style-name="TableRowCell" office:value-type="string">
            <text:p text:style-name="Table_20_Contents"><draw:frame draw:name="img457" svg:width="0.41667in" svg:height="0.4166666666666667in"><draw:image xlink:href="Pictures/4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58" svg:width="0.41667in" svg:height="0.4166666666666667in"><draw:image xlink:href="Pictures/45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2" office:name=""><text:span text:style-name="Definition">Connect</text:span></text:a></text:p>
          </table:table-cell>
          <table:table-cell table:style-name="TableRowCell" office:value-type="string">
            <text:p text:style-name="Table_20_Contents"><draw:frame draw:name="img459" svg:width="0.41667in" svg:height="0.4166666666666667in"><draw:image xlink:href="Pictures/4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0" svg:width="0.41667in" svg:height="0.4166666666666667in"><draw:image xlink:href="Pictures/459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5" office:name=""><text:span text:style-name="Definition">Connected</text:span></text:a></text:p>
          </table:table-cell>
          <table:table-cell table:style-name="TableRowCell" office:value-type="string">
            <text:p text:style-name="Table_20_Contents"><draw:frame draw:name="img461" svg:width="0.41667in" svg:height="0.4166666666666667in"><draw:image xlink:href="Pictures/4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2" svg:width="0.41667in" svg:height="0.4166666666666667in"><draw:image xlink:href="Pictures/461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68" office:name=""><text:span text:style-name="Definition">Copy</text:span></text:a></text:p>
          </table:table-cell>
          <table:table-cell table:style-name="TableRowCell" office:value-type="string">
            <text:p text:style-name="Table_20_Contents"><draw:frame draw:name="img463" svg:width="0.41667in" svg:height="0.4166666666666667in"><draw:image xlink:href="Pictures/4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4" svg:width="0.41667in" svg:height="0.4166666666666667in"><draw:image xlink:href="Pictures/463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1" office:name=""><text:span text:style-name="Definition">CourseUp</text:span></text:a></text:p>
          </table:table-cell>
          <table:table-cell table:style-name="TableRowCell" office:value-type="string">
            <text:p text:style-name="Table_20_Contents"><draw:frame draw:name="img465" svg:width="0.41667in" svg:height="0.4166666666666667in"><draw:image xlink:href="Pictures/4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6" svg:width="0.41667in" svg:height="0.4166666666666667in"><draw:image xlink:href="Pictures/465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4" office:name=""><text:span text:style-name="Definition">Debug</text:span></text:a></text:p>
          </table:table-cell>
          <table:table-cell table:style-name="TableRowCell" office:value-type="string">
            <text:p text:style-name="Table_20_Contents"><draw:frame draw:name="img467" svg:width="0.41667in" svg:height="0.4166666666666667in"><draw:image xlink:href="Pictures/4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68" svg:width="0.41667in" svg:height="0.4166666666666667in"><draw:image xlink:href="Pictures/467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77" office:name=""><text:span text:style-name="Definition">Delete</text:span></text:a></text:p>
          </table:table-cell>
          <table:table-cell table:style-name="TableRowCell" office:value-type="string">
            <text:p text:style-name="Table_20_Contents"><draw:frame draw:name="img469" svg:width="0.41667in" svg:height="0.4166666666666667in"><draw:image xlink:href="Pictures/4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0" svg:width="0.41667in" svg:height="0.4166666666666667in"><draw:image xlink:href="Pictures/469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0" office:name=""><text:span text:style-name="Definition">Dim</text:span></text:a></text:p>
          </table:table-cell>
          <table:table-cell table:style-name="TableRowCell" office:value-type="string">
            <text:p text:style-name="Table_20_Contents"><draw:frame draw:name="img471" svg:width="0.41667in" svg:height="0.4166666666666667in"><draw:image xlink:href="Pictures/4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2" svg:width="0.41667in" svg:height="0.4166666666666667in"><draw:image xlink:href="Pictures/471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3" office:name=""><text:span text:style-name="Definition">Disable</text:span></text:a></text:p>
          </table:table-cell>
          <table:table-cell table:style-name="TableRowCell" office:value-type="string">
            <text:p text:style-name="Table_20_Contents"><draw:frame draw:name="img473" svg:width="0.41667in" svg:height="0.4166666666666667in"><draw:image xlink:href="Pictures/4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4" svg:width="0.41667in" svg:height="0.4166666666666667in"><draw:image xlink:href="Pictures/473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6" office:name=""><text:span text:style-name="Definition">Disconnect</text:span></text:a></text:p>
          </table:table-cell>
          <table:table-cell table:style-name="TableRowCell" office:value-type="string">
            <text:p text:style-name="Table_20_Contents"><draw:frame draw:name="img475" svg:width="0.41667in" svg:height="0.4166666666666667in"><draw:image xlink:href="Pictures/4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6" svg:width="0.41667in" svg:height="0.4166666666666667in"><draw:image xlink:href="Pictures/475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89" office:name=""><text:span text:style-name="Definition">Download</text:span></text:a></text:p>
          </table:table-cell>
          <table:table-cell table:style-name="TableRowCell" office:value-type="string">
            <text:p text:style-name="Table_20_Contents"><draw:frame draw:name="img477" svg:width="0.41667in" svg:height="0.4166666666666667in"><draw:image xlink:href="Pictures/4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78" svg:width="0.41667in" svg:height="0.4166666666666667in"><draw:image xlink:href="Pictures/477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2" office:name=""><text:span text:style-name="Definition">Edit</text:span></text:a></text:p>
          </table:table-cell>
          <table:table-cell table:style-name="TableRowCell" office:value-type="string">
            <text:p text:style-name="Table_20_Contents"><draw:frame draw:name="img479" svg:width="0.41667in" svg:height="0.4166666666666667in"><draw:image xlink:href="Pictures/4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0" svg:width="0.41667in" svg:height="0.4166666666666667in"><draw:image xlink:href="Pictures/479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5" office:name=""><text:span text:style-name="Definition">EditPage</text:span></text:a></text:p>
          </table:table-cell>
          <table:table-cell table:style-name="TableRowCell" office:value-type="string">
            <text:p text:style-name="Table_20_Contents"><draw:frame draw:name="img481" svg:width="0.41667in" svg:height="0.4166666666666667in"><draw:image xlink:href="Pictures/4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2" svg:width="0.41667in" svg:height="0.4166666666666667in"><draw:image xlink:href="Pictures/481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98" office:name=""><text:span text:style-name="Definition">EmptyRoute</text:span></text:a></text:p>
          </table:table-cell>
          <table:table-cell table:style-name="TableRowCell" office:value-type="string">
            <text:p text:style-name="Table_20_Contents"><draw:frame draw:name="img483" svg:width="0.41667in" svg:height="0.4166666666666667in"><draw:image xlink:href="Pictures/4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4" svg:width="0.41667in" svg:height="0.4166666666666667in"><draw:image xlink:href="Pictures/483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1" office:name=""><text:span text:style-name="Definition">Expand</text:span></text:a></text:p>
          </table:table-cell>
          <table:table-cell table:style-name="TableRowCell" office:value-type="string">
            <text:p text:style-name="Table_20_Contents"><draw:frame draw:name="img485" svg:width="0.41667in" svg:height="0.4166666666666667in"><draw:image xlink:href="Pictures/4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6" svg:width="0.41667in" svg:height="0.4166666666666667in"><draw:image xlink:href="Pictures/485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4" office:name=""><text:span text:style-name="Definition">FullScreen</text:span></text:a></text:p>
          </table:table-cell>
          <table:table-cell table:style-name="TableRowCell" office:value-type="string">
            <text:p text:style-name="Table_20_Contents"><draw:frame draw:name="img487" svg:width="0.41667in" svg:height="0.4166666666666667in"><draw:image xlink:href="Pictures/4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88" svg:width="0.41667in" svg:height="0.4166666666666667in"><draw:image xlink:href="Pictures/487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07" office:name=""><text:span text:style-name="Definition">Help</text:span></text:a></text:p>
          </table:table-cell>
          <table:table-cell table:style-name="TableRowCell" office:value-type="string">
            <text:p text:style-name="Table_20_Contents"><draw:frame draw:name="img489" svg:width="0.41667in" svg:height="0.4166666666666667in"><draw:image xlink:href="Pictures/4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0" svg:width="0.41667in" svg:height="0.4166666666666667in"><draw:image xlink:href="Pictures/489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0" office:name=""><text:span text:style-name="Definition">Hide</text:span></text:a></text:p>
          </table:table-cell>
          <table:table-cell table:style-name="TableRowCell" office:value-type="string">
            <text:p text:style-name="Table_20_Contents"><draw:frame draw:name="img491" svg:width="0.41667in" svg:height="0.4166666666666667in"><draw:image xlink:href="Pictures/4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2" svg:width="0.41667in" svg:height="0.4166666666666667in"><draw:image xlink:href="Pictures/491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3" office:name=""><text:span text:style-name="Definition">HideOverlays</text:span></text:a></text:p>
          </table:table-cell>
          <table:table-cell table:style-name="TableRowCell" office:value-type="string">
            <text:p text:style-name="Table_20_Contents"><draw:frame draw:name="img493" svg:width="0.41667in" svg:height="0.4166666666666667in"><draw:image xlink:href="Pictures/4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4" svg:width="0.41667in" svg:height="0.4166666666666667in"><draw:image xlink:href="Pictures/493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6" office:name=""><text:span text:style-name="Definition">ITDirectory</text:span></text:a></text:p>
          </table:table-cell>
          <table:table-cell table:style-name="TableRowCell" office:value-type="string">
            <text:p text:style-name="Table_20_Contents"><draw:frame draw:name="img495" svg:width="0.41667in" svg:height="0.4166666666666667in"><draw:image xlink:href="Pictures/4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6" svg:width="0.41667in" svg:height="0.4166666666666667in"><draw:image xlink:href="Pictures/49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19" office:name=""><text:span text:style-name="Definition">ITHtml</text:span></text:a></text:p>
          </table:table-cell>
          <table:table-cell table:style-name="TableRowCell" office:value-type="string">
            <text:p text:style-name="Table_20_Contents"><draw:frame draw:name="img497" svg:width="0.41667in" svg:height="0.4166666666666667in"><draw:image xlink:href="Pictures/4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498" svg:width="0.41667in" svg:height="0.4166666666666667in"><draw:image xlink:href="Pictures/49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2" office:name=""><text:span text:style-name="Definition">ITOther</text:span></text:a></text:p>
          </table:table-cell>
          <table:table-cell table:style-name="TableRowCell" office:value-type="string">
            <text:p text:style-name="Table_20_Contents"><draw:frame draw:name="img499" svg:width="0.41667in" svg:height="0.4166666666666667in"><draw:image xlink:href="Pictures/4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0" svg:width="0.41667in" svg:height="0.4166666666666667in"><draw:image xlink:href="Pictures/4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5" office:name=""><text:span text:style-name="Definition">ITServer</text:span></text:a></text:p>
          </table:table-cell>
          <table:table-cell table:style-name="TableRowCell" office:value-type="string">
            <text:p text:style-name="Table_20_Contents"><draw:frame draw:name="img501" svg:width="0.41667in" svg:height="0.4166666666666667in"><draw:image xlink:href="Pictures/5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2" svg:width="0.41667in" svg:height="0.4166666666666667in"><draw:image xlink:href="Pictures/50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28" office:name=""><text:span text:style-name="Definition">ITText</text:span></text:a></text:p>
          </table:table-cell>
          <table:table-cell table:style-name="TableRowCell" office:value-type="string">
            <text:p text:style-name="Table_20_Contents"><draw:frame draw:name="img503" svg:width="0.41667in" svg:height="0.4166666666666667in"><draw:image xlink:href="Pictures/5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4" svg:width="0.41667in" svg:height="0.4166666666666667in"><draw:image xlink:href="Pictures/50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1" office:name=""><text:span text:style-name="Definition">ITUserSpecial</text:span></text:a></text:p>
          </table:table-cell>
          <table:table-cell table:style-name="TableRowCell" office:value-type="string">
            <text:p text:style-name="Table_20_Contents"><draw:frame draw:name="img505" svg:width="0.41667in" svg:height="0.4166666666666667in"><draw:image xlink:href="Pictures/5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6" svg:width="0.41667in" svg:height="0.4166666666666667in"><draw:image xlink:href="Pictures/50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4" office:name=""><text:span text:style-name="Definition">Images</text:span></text:a></text:p>
          </table:table-cell>
          <table:table-cell table:style-name="TableRowCell" office:value-type="string">
            <text:p text:style-name="Table_20_Contents"><draw:frame draw:name="img507" svg:width="0.41667in" svg:height="0.4166666666666667in"><draw:image xlink:href="Pictures/5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08" svg:width="0.41667in" svg:height="0.4166666666666667in"><draw:image xlink:href="Pictures/507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37" office:name=""><text:span text:style-name="Definition">Imports</text:span></text:a></text:p>
          </table:table-cell>
          <table:table-cell table:style-name="TableRowCell" office:value-type="string">
            <text:p text:style-name="Table_20_Contents"><draw:frame draw:name="img509" svg:width="0.41667in" svg:height="0.4166666666666667in"><draw:image xlink:href="Pictures/5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0" svg:width="0.41667in" svg:height="0.4166666666666667in"><draw:image xlink:href="Pictures/509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0" office:name=""><text:span text:style-name="Definition">Info</text:span></text:a></text:p>
          </table:table-cell>
          <table:table-cell table:style-name="TableRowCell" office:value-type="string">
            <text:p text:style-name="Table_20_Contents"><draw:frame draw:name="img511" svg:width="0.41667in" svg:height="0.4166666666666667in"><draw:image xlink:href="Pictures/5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2" svg:width="0.41667in" svg:height="0.4166666666666667in"><draw:image xlink:href="Pictures/511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3" office:name=""><text:span text:style-name="Definition">InvertRoute</text:span></text:a></text:p>
          </table:table-cell>
          <table:table-cell table:style-name="TableRowCell" office:value-type="string">
            <text:p text:style-name="Table_20_Contents"><draw:frame draw:name="img513" svg:width="0.41667in" svg:height="0.4166666666666667in"><draw:image xlink:href="Pictures/5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4" svg:width="0.41667in" svg:height="0.4166666666666667in"><draw:image xlink:href="Pictures/513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6" office:name=""><text:span text:style-name="Definition">Items</text:span></text:a></text:p>
          </table:table-cell>
          <table:table-cell table:style-name="TableRowCell" office:value-type="string">
            <text:p text:style-name="Table_20_Contents"><draw:frame draw:name="img515" svg:width="0.41667in" svg:height="0.4166666666666667in"><draw:image xlink:href="Pictures/5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6" svg:width="0.41667in" svg:height="0.4166666666666667in"><draw:image xlink:href="Pictures/515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49" office:name=""><text:span text:style-name="Definition">JSChanged</text:span></text:a></text:p>
          </table:table-cell>
          <table:table-cell table:style-name="TableRowCell" office:value-type="string">
            <text:p text:style-name="Table_20_Contents"><draw:frame draw:name="img517" svg:width="0.41667in" svg:height="0.4166666666666667in"><draw:image xlink:href="Pictures/5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18" svg:width="0.41667in" svg:height="0.4166666666666667in"><draw:image xlink:href="Pictures/51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2" office:name=""><text:span text:style-name="Definition">Layout</text:span></text:a></text:p>
          </table:table-cell>
          <table:table-cell table:style-name="TableRowCell" office:value-type="string">
            <text:p text:style-name="Table_20_Contents"><draw:frame draw:name="img519" svg:width="0.41667in" svg:height="0.4166666666666667in"><draw:image xlink:href="Pictures/5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0" svg:width="0.41667in" svg:height="0.4166666666666667in"><draw:image xlink:href="Pictures/519.svg" xlink:type="simple" xlink:show="embed" xlink:actuate="onLoad"/></draw:frame></text:p>
          </table:table-cell>
          <table:table-cell table:style-name="TableRowCell" office:value-type="string">
            <text:p text:style-name="Table_20_Contents">Layout,EditLayout,LayoutFinished,DBEditLayou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5" office:name=""><text:span text:style-name="Definition">LayoutOff</text:span></text:a></text:p>
          </table:table-cell>
          <table:table-cell table:style-name="TableRowCell" office:value-type="string">
            <text:p text:style-name="Table_20_Contents"><draw:frame draw:name="img521" svg:width="0.41667in" svg:height="0.4166666666666667in"><draw:image xlink:href="Pictures/5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2" svg:width="0.41667in" svg:height="0.4166666666666667in"><draw:image xlink:href="Pictures/521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58" office:name=""><text:span text:style-name="Definition">Left</text:span></text:a></text:p>
          </table:table-cell>
          <table:table-cell table:style-name="TableRowCell" office:value-type="string">
            <text:p text:style-name="Table_20_Contents"><draw:frame draw:name="img523" svg:width="0.41667in" svg:height="0.4166666666666667in"><draw:image xlink:href="Pictures/5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4" svg:width="0.41667in" svg:height="0.4166666666666667in"><draw:image xlink:href="Pictures/52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1" office:name=""><text:span text:style-name="Definition">Lock</text:span></text:a></text:p>
          </table:table-cell>
          <table:table-cell table:style-name="TableRowCell" office:value-type="string">
            <text:p text:style-name="Table_20_Contents"><draw:frame draw:name="img525" svg:width="0.41667in" svg:height="0.4166666666666667in"><draw:image xlink:href="Pictures/5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6" svg:width="0.41667in" svg:height="0.4166666666666667in"><draw:image xlink:href="Pictures/525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4" office:name=""><text:span text:style-name="Definition">LockPos</text:span></text:a></text:p>
          </table:table-cell>
          <table:table-cell table:style-name="TableRowCell" office:value-type="string">
            <text:p text:style-name="Table_20_Contents"><draw:frame draw:name="img527" svg:width="0.41667in" svg:height="0.4166666666666667in"><draw:image xlink:href="Pictures/5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28" svg:width="0.41667in" svg:height="0.4166666666666667in"><draw:image xlink:href="Pictures/527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67" office:name=""><text:span text:style-name="Definition">Log</text:span></text:a></text:p>
          </table:table-cell>
          <table:table-cell table:style-name="TableRowCell" office:value-type="string">
            <text:p text:style-name="Table_20_Contents"><draw:frame draw:name="img529" svg:width="0.41667in" svg:height="0.4166666666666667in"><draw:image xlink:href="Pictures/5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0" svg:width="0.41667in" svg:height="0.4166666666666667in"><draw:image xlink:href="Pictures/529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0" office:name=""><text:span text:style-name="Definition">MNCatNav</text:span></text:a></text:p>
          </table:table-cell>
          <table:table-cell table:style-name="TableRowCell" office:value-type="string">
            <text:p text:style-name="Table_20_Contents"><draw:frame draw:name="img531" svg:width="0.41667in" svg:height="0.4166666666666667in"><draw:image xlink:href="Pictures/5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2" svg:width="0.41667in" svg:height="0.4166666666666667in"><draw:image xlink:href="Pictures/53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3" office:name=""><text:span text:style-name="Definition">MNCatSet</text:span></text:a></text:p>
          </table:table-cell>
          <table:table-cell table:style-name="TableRowCell" office:value-type="string">
            <text:p text:style-name="Table_20_Contents"><draw:frame draw:name="img533" svg:width="0.41667in" svg:height="0.4166666666666667in"><draw:image xlink:href="Pictures/5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4" svg:width="0.41667in" svg:height="0.4166666666666667in"><draw:image xlink:href="Pictures/53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6" office:name=""><text:span text:style-name="Definition">MNCollapsed</text:span></text:a></text:p>
          </table:table-cell>
          <table:table-cell table:style-name="TableRowCell" office:value-type="string">
            <text:p text:style-name="Table_20_Contents"><draw:frame draw:name="img535" svg:width="0.41667in" svg:height="0.4166666666666667in"><draw:image xlink:href="Pictures/5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6" svg:width="0.41667in" svg:height="0.4166666666666667in"><draw:image xlink:href="Pictures/53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79" office:name=""><text:span text:style-name="Definition">MNExpanded</text:span></text:a></text:p>
          </table:table-cell>
          <table:table-cell table:style-name="TableRowCell" office:value-type="string">
            <text:p text:style-name="Table_20_Contents"><draw:frame draw:name="img537" svg:width="0.41667in" svg:height="0.4166666666666667in"><draw:image xlink:href="Pictures/5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38" svg:width="0.41667in" svg:height="0.4166666666666667in"><draw:image xlink:href="Pictures/53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2" office:name=""><text:span text:style-name="Definition">MOB</text:span></text:a></text:p>
          </table:table-cell>
          <table:table-cell table:style-name="TableRowCell" office:value-type="string">
            <text:p text:style-name="Table_20_Contents"><draw:frame draw:name="img539" svg:width="0.41667in" svg:height="0.4166666666666667in"><draw:image xlink:href="Pictures/5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0" svg:width="0.41667in" svg:height="0.4166666666666667in"><draw:image xlink:href="Pictures/539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5" office:name=""><text:span text:style-name="Definition">MainNav</text:span></text:a></text:p>
          </table:table-cell>
          <table:table-cell table:style-name="TableRowCell" office:value-type="string">
            <text:p text:style-name="Table_20_Contents"><draw:frame draw:name="img541" svg:width="0.41667in" svg:height="0.4166666666666667in"><draw:image xlink:href="Pictures/5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2" svg:width="0.41667in" svg:height="0.4166666666666667in"><draw:image xlink:href="Pictures/541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88" office:name=""><text:span text:style-name="Definition">Measure</text:span></text:a></text:p>
          </table:table-cell>
          <table:table-cell table:style-name="TableRowCell" office:value-type="string">
            <text:p text:style-name="Table_20_Contents"><draw:frame draw:name="img543" svg:width="0.41667in" svg:height="0.4166666666666667in"><draw:image xlink:href="Pictures/5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4" svg:width="0.41667in" svg:height="0.4166666666666667in"><draw:image xlink:href="Pictures/543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MeasureAdd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1" office:name=""><text:span text:style-name="Definition">MeasureFlag</text:span></text:a></text:p>
          </table:table-cell>
          <table:table-cell table:style-name="TableRowCell" office:value-type="string">
            <text:p text:style-name="Table_20_Contents"><draw:frame draw:name="img545" svg:width="0.41667in" svg:height="0.4166666666666667in"><draw:image xlink:href="Pictures/5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6" svg:width="0.41667in" svg:height="0.4166666666666667in"><draw:image xlink:href="Pictures/54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4" office:name=""><text:span text:style-name="Definition">MeasureOff</text:span></text:a></text:p>
          </table:table-cell>
          <table:table-cell table:style-name="TableRowCell" office:value-type="string">
            <text:p text:style-name="Table_20_Contents"><draw:frame draw:name="img547" svg:width="0.41667in" svg:height="0.4166666666666667in"><draw:image xlink:href="Pictures/5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48" svg:width="0.41667in" svg:height="0.4166666666666667in"><draw:image xlink:href="Pictures/547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197" office:name=""><text:span text:style-name="Definition">More</text:span></text:a></text:p>
          </table:table-cell>
          <table:table-cell table:style-name="TableRowCell" office:value-type="string">
            <text:p text:style-name="Table_20_Contents"><draw:frame draw:name="img549" svg:width="0.41667in" svg:height="0.4166666666666667in"><draw:image xlink:href="Pictures/5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0" svg:width="0.41667in" svg:height="0.4166666666666667in"><draw:image xlink:href="Pictures/54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0" office:name=""><text:span text:style-name="Definition">NavAdd</text:span></text:a></text:p>
          </table:table-cell>
          <table:table-cell table:style-name="TableRowCell" office:value-type="string">
            <text:p text:style-name="Table_20_Contents"><draw:frame draw:name="img551" svg:width="0.41667in" svg:height="0.4166666666666667in"><draw:image xlink:href="Pictures/5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2" svg:width="0.41667in" svg:height="0.4166666666666667in"><draw:image xlink:href="Pictures/551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3" office:name=""><text:span text:style-name="Definition">NavAddAfter</text:span></text:a></text:p>
          </table:table-cell>
          <table:table-cell table:style-name="TableRowCell" office:value-type="string">
            <text:p text:style-name="Table_20_Contents"><draw:frame draw:name="img553" svg:width="0.41667in" svg:height="0.4166666666666667in"><draw:image xlink:href="Pictures/5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4" svg:width="0.41667in" svg:height="0.4166666666666667in"><draw:image xlink:href="Pictures/553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6" office:name=""><text:span text:style-name="Definition">NavDelete</text:span></text:a></text:p>
          </table:table-cell>
          <table:table-cell table:style-name="TableRowCell" office:value-type="string">
            <text:p text:style-name="Table_20_Contents"><draw:frame draw:name="img555" svg:width="0.41667in" svg:height="0.4166666666666667in"><draw:image xlink:href="Pictures/5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6" svg:width="0.41667in" svg:height="0.4166666666666667in"><draw:image xlink:href="Pictures/555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09" office:name=""><text:span text:style-name="Definition">NavGoto</text:span></text:a></text:p>
          </table:table-cell>
          <table:table-cell table:style-name="TableRowCell" office:value-type="string">
            <text:p text:style-name="Table_20_Contents"><draw:frame draw:name="img557" svg:width="0.41667in" svg:height="0.4166666666666667in"><draw:image xlink:href="Pictures/5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58" svg:width="0.41667in" svg:height="0.4166666666666667in"><draw:image xlink:href="Pictures/557.svg" xlink:type="simple" xlink:show="embed" xlink:actuate="onLoad"/></draw:frame></text:p>
          </table:table-cell>
          <table:table-cell table:style-name="TableRowCell" office:value-type="string">
            <text:p text:style-name="Table_20_Contents">NavGoto,NavRestart,DBStart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2" office:name=""><text:span text:style-name="Definition">NavMapWidgets</text:span></text:a></text:p>
          </table:table-cell>
          <table:table-cell table:style-name="TableRowCell" office:value-type="string">
            <text:p text:style-name="Table_20_Contents"><draw:frame draw:name="img559" svg:width="0.41667in" svg:height="0.4166666666666667in"><draw:image xlink:href="Pictures/5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0" svg:width="0.41667in" svg:height="0.4166666666666667in"><draw:image xlink:href="Pictures/559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5" office:name=""><text:span text:style-name="Definition">NavNext</text:span></text:a></text:p>
          </table:table-cell>
          <table:table-cell table:style-name="TableRowCell" office:value-type="string">
            <text:p text:style-name="Table_20_Contents"><draw:frame draw:name="img561" svg:width="0.41667in" svg:height="0.4166666666666667in"><draw:image xlink:href="Pictures/5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2" svg:width="0.41667in" svg:height="0.4166666666666667in"><draw:image xlink:href="Pictures/561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18" office:name=""><text:span text:style-name="Definition">NavStop</text:span></text:a></text:p>
          </table:table-cell>
          <table:table-cell table:style-name="TableRowCell" office:value-type="string">
            <text:p text:style-name="Table_20_Contents"><draw:frame draw:name="img563" svg:width="0.41667in" svg:height="0.4166666666666667in"><draw:image xlink:href="Pictures/5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4" svg:width="0.41667in" svg:height="0.4166666666666667in"><draw:image xlink:href="Pictures/563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1" office:name=""><text:span text:style-name="Definition">NavToCenter</text:span></text:a></text:p>
          </table:table-cell>
          <table:table-cell table:style-name="TableRowCell" office:value-type="string">
            <text:p text:style-name="Table_20_Contents"><draw:frame draw:name="img565" svg:width="0.41667in" svg:height="0.4166666666666667in"><draw:image xlink:href="Pictures/5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6" svg:width="0.41667in" svg:height="0.4166666666666667in"><draw:image xlink:href="Pictures/565.svg" xlink:type="simple" xlink:show="embed" xlink:actuate="onLoad"/></draw:frame></text:p>
          </table:table-cell>
          <table:table-cell table:style-name="TableRowCell" office:value-type="string">
            <text:p text:style-name="Table_20_Contents">NavTo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4" office:name=""><text:span text:style-name="Definition">Navigation</text:span></text:a></text:p>
          </table:table-cell>
          <table:table-cell table:style-name="TableRowCell" office:value-type="string">
            <text:p text:style-name="Table_20_Contents"><draw:frame draw:name="img567" svg:width="0.41667in" svg:height="0.4166666666666667in"><draw:image xlink:href="Pictures/5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68" svg:width="0.41667in" svg:height="0.4166666666666667in"><draw:image xlink:href="Pictures/567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27" office:name=""><text:span text:style-name="Definition">Night</text:span></text:a></text:p>
          </table:table-cell>
          <table:table-cell table:style-name="TableRowCell" office:value-type="string">
            <text:p text:style-name="Table_20_Contents"><draw:frame draw:name="img569" svg:width="0.41667in" svg:height="0.4166666666666667in"><draw:image xlink:href="Pictures/5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0" svg:width="0.41667in" svg:height="0.4166666666666667in"><draw:image xlink:href="Pictures/569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0" office:name=""><text:span text:style-name="Definition">Num1</text:span></text:a></text:p>
          </table:table-cell>
          <table:table-cell table:style-name="TableRowCell" office:value-type="string">
            <text:p text:style-name="Table_20_Contents"><draw:frame draw:name="img571" svg:width="0.41667in" svg:height="0.4166666666666667in"><draw:image xlink:href="Pictures/5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2" svg:width="0.41667in" svg:height="0.4166666666666667in"><draw:image xlink:href="Pictures/571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3" office:name=""><text:span text:style-name="Definition">Num10</text:span></text:a></text:p>
          </table:table-cell>
          <table:table-cell table:style-name="TableRowCell" office:value-type="string">
            <text:p text:style-name="Table_20_Contents"><draw:frame draw:name="img573" svg:width="0.41667in" svg:height="0.4166666666666667in"><draw:image xlink:href="Pictures/5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4" svg:width="0.41667in" svg:height="0.4166666666666667in"><draw:image xlink:href="Pictures/573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6" office:name=""><text:span text:style-name="Definition">Num2</text:span></text:a></text:p>
          </table:table-cell>
          <table:table-cell table:style-name="TableRowCell" office:value-type="string">
            <text:p text:style-name="Table_20_Contents"><draw:frame draw:name="img575" svg:width="0.41667in" svg:height="0.4166666666666667in"><draw:image xlink:href="Pictures/5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6" svg:width="0.41667in" svg:height="0.4166666666666667in"><draw:image xlink:href="Pictures/575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39" office:name=""><text:span text:style-name="Definition">Num3</text:span></text:a></text:p>
          </table:table-cell>
          <table:table-cell table:style-name="TableRowCell" office:value-type="string">
            <text:p text:style-name="Table_20_Contents"><draw:frame draw:name="img577" svg:width="0.41667in" svg:height="0.4166666666666667in"><draw:image xlink:href="Pictures/5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78" svg:width="0.41667in" svg:height="0.4166666666666667in"><draw:image xlink:href="Pictures/577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2" office:name=""><text:span text:style-name="Definition">Num4</text:span></text:a></text:p>
          </table:table-cell>
          <table:table-cell table:style-name="TableRowCell" office:value-type="string">
            <text:p text:style-name="Table_20_Contents"><draw:frame draw:name="img579" svg:width="0.41667in" svg:height="0.4166666666666667in"><draw:image xlink:href="Pictures/5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0" svg:width="0.41667in" svg:height="0.4166666666666667in"><draw:image xlink:href="Pictures/579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5" office:name=""><text:span text:style-name="Definition">Num5</text:span></text:a></text:p>
          </table:table-cell>
          <table:table-cell table:style-name="TableRowCell" office:value-type="string">
            <text:p text:style-name="Table_20_Contents"><draw:frame draw:name="img581" svg:width="0.41667in" svg:height="0.4166666666666667in"><draw:image xlink:href="Pictures/5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2" svg:width="0.41667in" svg:height="0.4166666666666667in"><draw:image xlink:href="Pictures/581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48" office:name=""><text:span text:style-name="Definition">Num6</text:span></text:a></text:p>
          </table:table-cell>
          <table:table-cell table:style-name="TableRowCell" office:value-type="string">
            <text:p text:style-name="Table_20_Contents"><draw:frame draw:name="img583" svg:width="0.41667in" svg:height="0.4166666666666667in"><draw:image xlink:href="Pictures/5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4" svg:width="0.41667in" svg:height="0.4166666666666667in"><draw:image xlink:href="Pictures/583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1" office:name=""><text:span text:style-name="Definition">Num7</text:span></text:a></text:p>
          </table:table-cell>
          <table:table-cell table:style-name="TableRowCell" office:value-type="string">
            <text:p text:style-name="Table_20_Contents"><draw:frame draw:name="img585" svg:width="0.41667in" svg:height="0.4166666666666667in"><draw:image xlink:href="Pictures/5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6" svg:width="0.41667in" svg:height="0.4166666666666667in"><draw:image xlink:href="Pictures/585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4" office:name=""><text:span text:style-name="Definition">Num8</text:span></text:a></text:p>
          </table:table-cell>
          <table:table-cell table:style-name="TableRowCell" office:value-type="string">
            <text:p text:style-name="Table_20_Contents"><draw:frame draw:name="img587" svg:width="0.41667in" svg:height="0.4166666666666667in"><draw:image xlink:href="Pictures/5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88" svg:width="0.41667in" svg:height="0.4166666666666667in"><draw:image xlink:href="Pictures/587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57" office:name=""><text:span text:style-name="Definition">Num9</text:span></text:a></text:p>
          </table:table-cell>
          <table:table-cell table:style-name="TableRowCell" office:value-type="string">
            <text:p text:style-name="Table_20_Contents"><draw:frame draw:name="img589" svg:width="0.41667in" svg:height="0.4166666666666667in"><draw:image xlink:href="Pictures/5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0" svg:width="0.41667in" svg:height="0.4166666666666667in"><draw:image xlink:href="Pictures/589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0" office:name=""><text:span text:style-name="Definition">Ok</text:span></text:a></text:p>
          </table:table-cell>
          <table:table-cell table:style-name="TableRowCell" office:value-type="string">
            <text:p text:style-name="Table_20_Contents"><draw:frame draw:name="img591" svg:width="0.41667in" svg:height="0.4166666666666667in"><draw:image xlink:href="Pictures/5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2" svg:width="0.41667in" svg:height="0.4166666666666667in"><draw:image xlink:href="Pictures/591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3" office:name=""><text:span text:style-name="Definition">Open</text:span></text:a></text:p>
          </table:table-cell>
          <table:table-cell table:style-name="TableRowCell" office:value-type="string">
            <text:p text:style-name="Table_20_Contents"><draw:frame draw:name="img593" svg:width="0.41667in" svg:height="0.4166666666666667in"><draw:image xlink:href="Pictures/5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4" svg:width="0.41667in" svg:height="0.4166666666666667in"><draw:image xlink:href="Pictures/593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6" office:name=""><text:span text:style-name="Definition">Overflow</text:span></text:a></text:p>
          </table:table-cell>
          <table:table-cell table:style-name="TableRowCell" office:value-type="string">
            <text:p text:style-name="Table_20_Contents"><draw:frame draw:name="img595" svg:width="0.41667in" svg:height="0.4166666666666667in"><draw:image xlink:href="Pictures/5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6" svg:width="0.41667in" svg:height="0.4166666666666667in"><draw:image xlink:href="Pictures/595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69" office:name=""><text:span text:style-name="Definition">Overlays</text:span></text:a></text:p>
          </table:table-cell>
          <table:table-cell table:style-name="TableRowCell" office:value-type="string">
            <text:p text:style-name="Table_20_Contents"><draw:frame draw:name="img597" svg:width="0.41667in" svg:height="0.4166666666666667in"><draw:image xlink:href="Pictures/59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598" svg:width="0.41667in" svg:height="0.4166666666666667in"><draw:image xlink:href="Pictures/597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2" office:name=""><text:span text:style-name="Definition">Plugins</text:span></text:a></text:p>
          </table:table-cell>
          <table:table-cell table:style-name="TableRowCell" office:value-type="string">
            <text:p text:style-name="Table_20_Contents"><draw:frame draw:name="img599" svg:width="0.41667in" svg:height="0.4166666666666667in"><draw:image xlink:href="Pictures/59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0" svg:width="0.41667in" svg:height="0.4166666666666667in"><draw:image xlink:href="Pictures/59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5" office:name=""><text:span text:style-name="Definition">Plus</text:span></text:a></text:p>
          </table:table-cell>
          <table:table-cell table:style-name="TableRowCell" office:value-type="string">
            <text:p text:style-name="Table_20_Contents"><draw:frame draw:name="img601" svg:width="0.41667in" svg:height="0.4166666666666667in"><draw:image xlink:href="Pictures/60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2" svg:width="0.41667in" svg:height="0.4166666666666667in"><draw:image xlink:href="Pictures/601.svg" xlink:type="simple" xlink:show="embed" xlink:actuate="onLoad"/></draw:frame></text:p>
          </table:table-cell>
          <table:table-cell table:style-name="TableRowCell" office:value-type="string">
            <text:p text:style-name="Table_20_Contents">CreateFile,DBAdd,DBNew,DBNewRoute,DBAddSub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78" office:name=""><text:span text:style-name="Definition">Propose</text:span></text:a></text:p>
          </table:table-cell>
          <table:table-cell table:style-name="TableRowCell" office:value-type="string">
            <text:p text:style-name="Table_20_Contents"><draw:frame draw:name="img603" svg:width="0.41667in" svg:height="0.4166666666666667in"><draw:image xlink:href="Pictures/60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4" svg:width="0.41667in" svg:height="0.4166666666666667in"><draw:image xlink:href="Pictures/603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1" office:name=""><text:span text:style-name="Definition">QRCode</text:span></text:a></text:p>
          </table:table-cell>
          <table:table-cell table:style-name="TableRowCell" office:value-type="string">
            <text:p text:style-name="Table_20_Contents"><draw:frame draw:name="img605" svg:width="0.41667in" svg:height="0.4166666666666667in"><draw:image xlink:href="Pictures/60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6" svg:width="0.41667in" svg:height="0.4166666666666667in"><draw:image xlink:href="Pictures/605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4" office:name=""><text:span text:style-name="Definition">RadioChecked</text:span></text:a></text:p>
          </table:table-cell>
          <table:table-cell table:style-name="TableRowCell" office:value-type="string">
            <text:p text:style-name="Table_20_Contents"><draw:frame draw:name="img607" svg:width="0.41667in" svg:height="0.4166666666666667in"><draw:image xlink:href="Pictures/60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08" svg:width="0.41667in" svg:height="0.4166666666666667in"><draw:image xlink:href="Pictures/60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87" office:name=""><text:span text:style-name="Definition">RadioUnchecked</text:span></text:a></text:p>
          </table:table-cell>
          <table:table-cell table:style-name="TableRowCell" office:value-type="string">
            <text:p text:style-name="Table_20_Contents"><draw:frame draw:name="img609" svg:width="0.41667in" svg:height="0.4166666666666667in"><draw:image xlink:href="Pictures/60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0" svg:width="0.41667in" svg:height="0.4166666666666667in"><draw:image xlink:href="Pictures/60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0" office:name=""><text:span text:style-name="Definition">Reload</text:span></text:a></text:p>
          </table:table-cell>
          <table:table-cell table:style-name="TableRowCell" office:value-type="string">
            <text:p text:style-name="Table_20_Contents"><draw:frame draw:name="img611" svg:width="0.41667in" svg:height="0.4166666666666667in"><draw:image xlink:href="Pictures/61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2" svg:width="0.41667in" svg:height="0.4166666666666667in"><draw:image xlink:href="Pictures/611.svg" xlink:type="simple" xlink:show="embed" xlink:actuate="onLoad"/></draw:frame></text:p>
          </table:table-cell>
          <table:table-cell table:style-name="TableRowCell" office:value-type="string">
            <text:p text:style-name="Table_20_Contents">ReloadUI,DBReload,DBRestart,DBAutoRe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3" office:name=""><text:span text:style-name="Definition">RemoteChannel</text:span></text:a></text:p>
          </table:table-cell>
          <table:table-cell table:style-name="TableRowCell" office:value-type="string">
            <text:p text:style-name="Table_20_Contents"><draw:frame draw:name="img613" svg:width="0.41667in" svg:height="0.4166666666666667in"><draw:image xlink:href="Pictures/61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4" svg:width="0.41667in" svg:height="0.4166666666666667in"><draw:image xlink:href="Pictures/613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6" office:name=""><text:span text:style-name="Definition">RenumberRoute</text:span></text:a></text:p>
          </table:table-cell>
          <table:table-cell table:style-name="TableRowCell" office:value-type="string">
            <text:p text:style-name="Table_20_Contents"><draw:frame draw:name="img615" svg:width="0.41667in" svg:height="0.4166666666666667in"><draw:image xlink:href="Pictures/61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6" svg:width="0.41667in" svg:height="0.4166666666666667in"><draw:image xlink:href="Pictures/615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299" office:name=""><text:span text:style-name="Definition">Reset</text:span></text:a></text:p>
          </table:table-cell>
          <table:table-cell table:style-name="TableRowCell" office:value-type="string">
            <text:p text:style-name="Table_20_Contents"><draw:frame draw:name="img617" svg:width="0.41667in" svg:height="0.4166666666666667in"><draw:image xlink:href="Pictures/61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18" svg:width="0.41667in" svg:height="0.4166666666666667in"><draw:image xlink:href="Pictures/617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2" office:name=""><text:span text:style-name="Definition">Right</text:span></text:a></text:p>
          </table:table-cell>
          <table:table-cell table:style-name="TableRowCell" office:value-type="string">
            <text:p text:style-name="Table_20_Contents"><draw:frame draw:name="img619" svg:width="0.41667in" svg:height="0.4166666666666667in"><draw:image xlink:href="Pictures/61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0" svg:width="0.41667in" svg:height="0.4166666666666667in"><draw:image xlink:href="Pictures/61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5" office:name=""><text:span text:style-name="Definition">Route</text:span></text:a></text:p>
          </table:table-cell>
          <table:table-cell table:style-name="TableRowCell" office:value-type="string">
            <text:p text:style-name="Table_20_Contents"><draw:frame draw:name="img621" svg:width="0.41667in" svg:height="0.4166666666666667in"><draw:image xlink:href="Pictures/62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2" svg:width="0.41667in" svg:height="0.4166666666666667in"><draw:image xlink:href="Pictures/621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08" office:name=""><text:span text:style-name="Definition">RouteAdd</text:span></text:a></text:p>
          </table:table-cell>
          <table:table-cell table:style-name="TableRowCell" office:value-type="string">
            <text:p text:style-name="Table_20_Contents"><draw:frame draw:name="img623" svg:width="0.41667in" svg:height="0.4166666666666667in"><draw:image xlink:href="Pictures/62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4" svg:width="0.41667in" svg:height="0.4166666666666667in"><draw:image xlink:href="Pictures/623.svg" xlink:type="simple" xlink:show="embed" xlink:actuate="onLoad"/></draw:frame></text:p>
          </table:table-cell>
          <table:table-cell table:style-name="TableRowCell" office:value-type="string">
            <text:p text:style-name="Table_20_Contents">Route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1" office:name=""><text:span text:style-name="Definition">RouteMenu</text:span></text:a></text:p>
          </table:table-cell>
          <table:table-cell table:style-name="TableRowCell" office:value-type="string">
            <text:p text:style-name="Table_20_Contents"><draw:frame draw:name="img625" svg:width="0.41667in" svg:height="0.4166666666666667in"><draw:image xlink:href="Pictures/62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6" svg:width="0.41667in" svg:height="0.4166666666666667in"><draw:image xlink:href="Pictures/625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4" office:name=""><text:span text:style-name="Definition">Satellite</text:span></text:a></text:p>
          </table:table-cell>
          <table:table-cell table:style-name="TableRowCell" office:value-type="string">
            <text:p text:style-name="Table_20_Contents"><draw:frame draw:name="img627" svg:width="0.41667in" svg:height="0.4166666666666667in"><draw:image xlink:href="Pictures/62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28" svg:width="0.41667in" svg:height="0.4166666666666667in"><draw:image xlink:href="Pictures/62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17" office:name=""><text:span text:style-name="Definition">Save</text:span></text:a></text:p>
          </table:table-cell>
          <table:table-cell table:style-name="TableRowCell" office:value-type="string">
            <text:p text:style-name="Table_20_Contents"><draw:frame draw:name="img629" svg:width="0.41667in" svg:height="0.4166666666666667in"><draw:image xlink:href="Pictures/62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0" svg:width="0.41667in" svg:height="0.4166666666666667in"><draw:image xlink:href="Pictures/629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0" office:name=""><text:span text:style-name="Definition">SaveAs</text:span></text:a></text:p>
          </table:table-cell>
          <table:table-cell table:style-name="TableRowCell" office:value-type="string">
            <text:p text:style-name="Table_20_Contents"><draw:frame draw:name="img631" svg:width="0.41667in" svg:height="0.4166666666666667in"><draw:image xlink:href="Pictures/63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2" svg:width="0.41667in" svg:height="0.4166666666666667in"><draw:image xlink:href="Pictures/631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3" office:name=""><text:span text:style-name="Definition">Search</text:span></text:a></text:p>
          </table:table-cell>
          <table:table-cell table:style-name="TableRowCell" office:value-type="string">
            <text:p text:style-name="Table_20_Contents"><draw:frame draw:name="img633" svg:width="0.41667in" svg:height="0.4166666666666667in"><draw:image xlink:href="Pictures/63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4" svg:width="0.41667in" svg:height="0.4166666666666667in"><draw:image xlink:href="Pictures/633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6" office:name=""><text:span text:style-name="Definition">Section</text:span></text:a></text:p>
          </table:table-cell>
          <table:table-cell table:style-name="TableRowCell" office:value-type="string">
            <text:p text:style-name="Table_20_Contents"><draw:frame draw:name="img635" svg:width="0.41667in" svg:height="0.4166666666666667in"><draw:image xlink:href="Pictures/63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6" svg:width="0.41667in" svg:height="0.4166666666666667in"><draw:image xlink:href="Pictures/635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29" office:name=""><text:span text:style-name="Definition">SelectChart</text:span></text:a></text:p>
          </table:table-cell>
          <table:table-cell table:style-name="TableRowCell" office:value-type="string">
            <text:p text:style-name="Table_20_Contents"><draw:frame draw:name="img637" svg:width="0.41667in" svg:height="0.4166666666666667in"><draw:image xlink:href="Pictures/63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38" svg:width="0.41667in" svg:height="0.4166666666666667in"><draw:image xlink:href="Pictures/637.svg" xlink:type="simple" xlink:show="embed" xlink:actuate="onLoad"/></draw:frame></text:p>
          </table:table-cell>
          <table:table-cell table:style-name="TableRowCell" office:value-type="string">
            <text:p text:style-name="Table_20_Contents">NavSelectCh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2" office:name=""><text:span text:style-name="Definition">Server</text:span></text:a></text:p>
          </table:table-cell>
          <table:table-cell table:style-name="TableRowCell" office:value-type="string">
            <text:p text:style-name="Table_20_Contents"><draw:frame draw:name="img639" svg:width="0.41667in" svg:height="0.4166666666666667in"><draw:image xlink:href="Pictures/63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0" svg:width="0.41667in" svg:height="0.4166666666666667in"><draw:image xlink:href="Pictures/639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5" office:name=""><text:span text:style-name="Definition">Settings</text:span></text:a></text:p>
          </table:table-cell>
          <table:table-cell table:style-name="TableRowCell" office:value-type="string">
            <text:p text:style-name="Table_20_Contents"><draw:frame draw:name="img641" svg:width="0.41667in" svg:height="0.4166666666666667in"><draw:image xlink:href="Pictures/64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2" svg:width="0.41667in" svg:height="0.4166666666666667in"><draw:image xlink:href="Pictures/641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38" office:name=""><text:span text:style-name="Definition">Shutdown</text:span></text:a></text:p>
          </table:table-cell>
          <table:table-cell table:style-name="TableRowCell" office:value-type="string">
            <text:p text:style-name="Table_20_Contents"><draw:frame draw:name="img643" svg:width="0.41667in" svg:height="0.4166666666666667in"><draw:image xlink:href="Pictures/64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4" svg:width="0.41667in" svg:height="0.4166666666666667in"><draw:image xlink:href="Pictures/643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1" office:name=""><text:span text:style-name="Definition">Sort</text:span></text:a></text:p>
          </table:table-cell>
          <table:table-cell table:style-name="TableRowCell" office:value-type="string">
            <text:p text:style-name="Table_20_Contents"><draw:frame draw:name="img645" svg:width="0.41667in" svg:height="0.4166666666666667in"><draw:image xlink:href="Pictures/64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6" svg:width="0.41667in" svg:height="0.4166666666666667in"><draw:image xlink:href="Pictures/645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4" office:name=""><text:span text:style-name="Definition">Split</text:span></text:a></text:p>
          </table:table-cell>
          <table:table-cell table:style-name="TableRowCell" office:value-type="string">
            <text:p text:style-name="Table_20_Contents"><draw:frame draw:name="img647" svg:width="0.41667in" svg:height="0.4166666666666667in"><draw:image xlink:href="Pictures/64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48" svg:width="0.41667in" svg:height="0.4166666666666667in"><draw:image xlink:href="Pictures/647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47" office:name=""><text:span text:style-name="Definition">SplitReset</text:span></text:a></text:p>
          </table:table-cell>
          <table:table-cell table:style-name="TableRowCell" office:value-type="string">
            <text:p text:style-name="Table_20_Contents"><draw:frame draw:name="img649" svg:width="0.41667in" svg:height="0.4166666666666667in"><draw:image xlink:href="Pictures/64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0" svg:width="0.41667in" svg:height="0.4166666666666667in"><draw:image xlink:href="Pictures/649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0" office:name=""><text:span text:style-name="Definition">Start</text:span></text:a></text:p>
          </table:table-cell>
          <table:table-cell table:style-name="TableRowCell" office:value-type="string">
            <text:p text:style-name="Table_20_Contents"><draw:frame draw:name="img651" svg:width="0.41667in" svg:height="0.4166666666666667in"><draw:image xlink:href="Pictures/65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2" svg:width="0.41667in" svg:height="0.4166666666666667in"><draw:image xlink:href="Pictures/651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3" office:name=""><text:span text:style-name="Definition">StatusAdd</text:span></text:a></text:p>
          </table:table-cell>
          <table:table-cell table:style-name="TableRowCell" office:value-type="string">
            <text:p text:style-name="Table_20_Contents"><draw:frame draw:name="img653" svg:width="0.41667in" svg:height="0.4166666666666667in"><draw:image xlink:href="Pictures/65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4" svg:width="0.41667in" svg:height="0.4166666666666667in"><draw:image xlink:href="Pictures/653.svg" xlink:type="simple" xlink:show="embed" xlink:actuate="onLoad"/></draw:frame></text:p>
          </table:table-cell>
          <table:table-cell table:style-name="TableRowCell" office:value-type="string">
            <text:p text:style-name="Table_20_Contents">StatusAd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6" office:name=""><text:span text:style-name="Definition">StatusRestart</text:span></text:a></text:p>
          </table:table-cell>
          <table:table-cell table:style-name="TableRowCell" office:value-type="string">
            <text:p text:style-name="Table_20_Contents"><draw:frame draw:name="img655" svg:width="0.41667in" svg:height="0.4166666666666667in"><draw:image xlink:href="Pictures/65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6" svg:width="0.41667in" svg:height="0.4166666666666667in"><draw:image xlink:href="Pictures/655.svg" xlink:type="simple" xlink:show="embed" xlink:actuate="onLoad"/></draw:frame></text:p>
          </table:table-cell>
          <table:table-cell table:style-name="TableRowCell" office:value-type="string">
            <text:p text:style-name="Table_20_Contents">Status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59" office:name=""><text:span text:style-name="Definition">Stop</text:span></text:a></text:p>
          </table:table-cell>
          <table:table-cell table:style-name="TableRowCell" office:value-type="string">
            <text:p text:style-name="Table_20_Contents"><draw:frame draw:name="img657" svg:width="0.41667in" svg:height="0.4166666666666667in"><draw:image xlink:href="Pictures/65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58" svg:width="0.41667in" svg:height="0.4166666666666667in"><draw:image xlink:href="Pictures/657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2" office:name=""><text:span text:style-name="Definition">Sync</text:span></text:a></text:p>
          </table:table-cell>
          <table:table-cell table:style-name="TableRowCell" office:value-type="string">
            <text:p text:style-name="Table_20_Contents"><draw:frame draw:name="img659" svg:width="0.41667in" svg:height="0.4166666666666667in"><draw:image xlink:href="Pictures/65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0" svg:width="0.41667in" svg:height="0.4166666666666667in"><draw:image xlink:href="Pictures/659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5" office:name=""><text:span text:style-name="Definition">Track</text:span></text:a></text:p>
          </table:table-cell>
          <table:table-cell table:style-name="TableRowCell" office:value-type="string">
            <text:p text:style-name="Table_20_Contents"><draw:frame draw:name="img661" svg:width="0.41667in" svg:height="0.4166666666666667in"><draw:image xlink:href="Pictures/66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2" svg:width="0.41667in" svg:height="0.4166666666666667in"><draw:image xlink:href="Pictures/66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68" office:name=""><text:span text:style-name="Definition">UnChecked</text:span></text:a></text:p>
          </table:table-cell>
          <table:table-cell table:style-name="TableRowCell" office:value-type="string">
            <text:p text:style-name="Table_20_Contents"><draw:frame draw:name="img663" svg:width="0.41667in" svg:height="0.4166666666666667in"><draw:image xlink:href="Pictures/66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4" svg:width="0.41667in" svg:height="0.4166666666666667in"><draw:image xlink:href="Pictures/66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1" office:name=""><text:span text:style-name="Definition">Undo</text:span></text:a></text:p>
          </table:table-cell>
          <table:table-cell table:style-name="TableRowCell" office:value-type="string">
            <text:p text:style-name="Table_20_Contents"><draw:frame draw:name="img665" svg:width="0.41667in" svg:height="0.4166666666666667in"><draw:image xlink:href="Pictures/66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6" svg:width="0.41667in" svg:height="0.4166666666666667in"><draw:image xlink:href="Pictures/665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4" office:name=""><text:span text:style-name="Definition">Upload</text:span></text:a></text:p>
          </table:table-cell>
          <table:table-cell table:style-name="TableRowCell" office:value-type="string">
            <text:p text:style-name="Table_20_Contents"><draw:frame draw:name="img667" svg:width="0.41667in" svg:height="0.4166666666666667in"><draw:image xlink:href="Pictures/66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68" svg:width="0.41667in" svg:height="0.4166666666666667in"><draw:image xlink:href="Pictures/667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77" office:name=""><text:span text:style-name="Definition">User</text:span></text:a></text:p>
          </table:table-cell>
          <table:table-cell table:style-name="TableRowCell" office:value-type="string">
            <text:p text:style-name="Table_20_Contents"><draw:frame draw:name="img669" svg:width="0.41667in" svg:height="0.4166666666666667in"><draw:image xlink:href="Pictures/66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0" svg:width="0.41667in" svg:height="0.4166666666666667in"><draw:image xlink:href="Pictures/669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0" office:name=""><text:span text:style-name="Definition">View</text:span></text:a></text:p>
          </table:table-cell>
          <table:table-cell table:style-name="TableRowCell" office:value-type="string">
            <text:p text:style-name="Table_20_Contents"><draw:frame draw:name="img671" svg:width="0.41667in" svg:height="0.4166666666666667in"><draw:image xlink:href="Pictures/67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2" svg:width="0.41667in" svg:height="0.4166666666666667in"><draw:image xlink:href="Pictures/671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3" office:name=""><text:span text:style-name="Definition">Waypoint</text:span></text:a></text:p>
          </table:table-cell>
          <table:table-cell table:style-name="TableRowCell" office:value-type="string">
            <text:p text:style-name="Table_20_Contents"><draw:frame draw:name="img673" svg:width="0.41667in" svg:height="0.4166666666666667in"><draw:image xlink:href="Pictures/67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4" svg:width="0.41667in" svg:height="0.4166666666666667in"><draw:image xlink:href="Pictures/673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6" office:name=""><text:span text:style-name="Definition">Wifi</text:span></text:a></text:p>
          </table:table-cell>
          <table:table-cell table:style-name="TableRowCell" office:value-type="string">
            <text:p text:style-name="Table_20_Contents"><draw:frame draw:name="img675" svg:width="0.41667in" svg:height="0.4166666666666667in"><draw:image xlink:href="Pictures/67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6" svg:width="0.41667in" svg:height="0.4166666666666667in"><draw:image xlink:href="Pictures/675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89" office:name=""><text:span text:style-name="Definition">WifiOff</text:span></text:a></text:p>
          </table:table-cell>
          <table:table-cell table:style-name="TableRowCell" office:value-type="string">
            <text:p text:style-name="Table_20_Contents"><draw:frame draw:name="img677" svg:width="0.41667in" svg:height="0.4166666666666667in"><draw:image xlink:href="Pictures/67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78" svg:width="0.41667in" svg:height="0.4166666666666667in"><draw:image xlink:href="Pictures/677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2" office:name=""><text:span text:style-name="Definition">WpGoto</text:span></text:a></text:p>
          </table:table-cell>
          <table:table-cell table:style-name="TableRowCell" office:value-type="string">
            <text:p text:style-name="Table_20_Contents"><draw:frame draw:name="img679" svg:width="0.41667in" svg:height="0.4166666666666667in"><draw:image xlink:href="Pictures/67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0" svg:width="0.41667in" svg:height="0.4166666666666667in"><draw:image xlink:href="Pictures/679.svg" xlink:type="simple" xlink:show="embed" xlink:actuate="onLoad"/></draw:frame></text:p>
          </table:table-cell>
          <table:table-cell table:style-name="TableRowCell" office:value-type="string">
            <text:p text:style-name="Table_20_Contents">WpGot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5" office:name=""><text:span text:style-name="Definition">WpLocate</text:span></text:a></text:p>
          </table:table-cell>
          <table:table-cell table:style-name="TableRowCell" office:value-type="string">
            <text:p text:style-name="Table_20_Contents"><draw:frame draw:name="img681" svg:width="0.41667in" svg:height="0.4166666666666667in"><draw:image xlink:href="Pictures/68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2" svg:width="0.41667in" svg:height="0.4166666666666667in"><draw:image xlink:href="Pictures/681.svg" xlink:type="simple" xlink:show="embed" xlink:actuate="onLoad"/></draw:frame></text:p>
          </table:table-cell>
          <table:table-cell table:style-name="TableRowCell" office:value-type="string">
            <text:p text:style-name="Table_20_Contents">WpLoca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398" office:name=""><text:span text:style-name="Definition">WpNext</text:span></text:a></text:p>
          </table:table-cell>
          <table:table-cell table:style-name="TableRowCell" office:value-type="string">
            <text:p text:style-name="Table_20_Contents"><draw:frame draw:name="img683" svg:width="0.41667in" svg:height="0.4166666666666667in"><draw:image xlink:href="Pictures/68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4" svg:width="0.41667in" svg:height="0.4166666666666667in"><draw:image xlink:href="Pictures/683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1" office:name=""><text:span text:style-name="Definition">WpPrevious</text:span></text:a></text:p>
          </table:table-cell>
          <table:table-cell table:style-name="TableRowCell" office:value-type="string">
            <text:p text:style-name="Table_20_Contents"><draw:frame draw:name="img685" svg:width="0.41667in" svg:height="0.4166666666666667in"><draw:image xlink:href="Pictures/68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6" svg:width="0.41667in" svg:height="0.4166666666666667in"><draw:image xlink:href="Pictures/685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4" office:name=""><text:span text:style-name="Definition">WpRestart</text:span></text:a></text:p>
          </table:table-cell>
          <table:table-cell table:style-name="TableRowCell" office:value-type="string">
            <text:p text:style-name="Table_20_Contents"><draw:frame draw:name="img687" svg:width="0.41667in" svg:height="0.4166666666666667in"><draw:image xlink:href="Pictures/686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88" svg:width="0.41667in" svg:height="0.4166666666666667in"><draw:image xlink:href="Pictures/687.svg" xlink:type="simple" xlink:show="embed" xlink:actuate="onLoad"/></draw:frame></text:p>
          </table:table-cell>
          <table:table-cell table:style-name="TableRowCell" office:value-type="string">
            <text:p text:style-name="Table_20_Contents">WpRestar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07" office:name=""><text:span text:style-name="Definition">WpStop</text:span></text:a></text:p>
          </table:table-cell>
          <table:table-cell table:style-name="TableRowCell" office:value-type="string">
            <text:p text:style-name="Table_20_Contents"><draw:frame draw:name="img689" svg:width="0.41667in" svg:height="0.4166666666666667in"><draw:image xlink:href="Pictures/688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0" svg:width="0.41667in" svg:height="0.4166666666666667in"><draw:image xlink:href="Pictures/689.svg" xlink:type="simple" xlink:show="embed" xlink:actuate="onLoad"/></draw:frame></text:p>
          </table:table-cell>
          <table:table-cell table:style-name="TableRowCell" office:value-type="string">
            <text:p text:style-name="Table_20_Contents">Stop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0" office:name=""><text:span text:style-name="Definition">WpaConnect</text:span></text:a></text:p>
          </table:table-cell>
          <table:table-cell table:style-name="TableRowCell" office:value-type="string">
            <text:p text:style-name="Table_20_Contents"><draw:frame draw:name="img691" svg:width="0.41667in" svg:height="0.4166666666666667in"><draw:image xlink:href="Pictures/690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2" svg:width="0.41667in" svg:height="0.4166666666666667in"><draw:image xlink:href="Pictures/691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3" office:name=""><text:span text:style-name="Definition">ZoomIn</text:span></text:a></text:p>
          </table:table-cell>
          <table:table-cell table:style-name="TableRowCell" office:value-type="string">
            <text:p text:style-name="Table_20_Contents"><draw:frame draw:name="img693" svg:width="0.41667in" svg:height="0.4166666666666667in"><draw:image xlink:href="Pictures/692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4" svg:width="0.41667in" svg:height="0.4166666666666667in"><draw:image xlink:href="Pictures/693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style/icons.less#L416" office:name=""><text:span text:style-name="Definition">ZoomOut</text:span></text:a></text:p>
          </table:table-cell>
          <table:table-cell table:style-name="TableRowCell" office:value-type="string">
            <text:p text:style-name="Table_20_Contents"><draw:frame draw:name="img695" svg:width="0.41667in" svg:height="0.4166666666666667in"><draw:image xlink:href="Pictures/694.svg" xlink:type="simple" xlink:show="embed" xlink:actuate="onLoad"/></draw:frame></text:p>
          </table:table-cell>
          <table:table-cell table:style-name="TableRowCell" office:value-type="string">
            <text:p text:style-name="Table_20_Contents"><draw:frame draw:name="img696" svg:width="0.41667in" svg:height="0.4166666666666667in"><draw:image xlink:href="Pictures/695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6-02T15:22:01Z</meta:creation-date>
    <dc:date>2026-06-02T15:22:01Z</dc:date>
  </office:meta>
</office:document-meta>
</file>