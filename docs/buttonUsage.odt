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341.svg"/>
  <manifest:file-entry manifest:media-type="image/svg+xml" manifest:full-path="Pictures/340.svg"/>
  <manifest:file-entry manifest:media-type="image/svg+xml" manifest:full-path="Pictures/339.svg"/>
  <manifest:file-entry manifest:media-type="image/svg+xml" manifest:full-path="Pictures/338.svg"/>
  <manifest:file-entry manifest:media-type="image/svg+xml" manifest:full-path="Pictures/337.svg"/>
  <manifest:file-entry manifest:media-type="image/svg+xml" manifest:full-path="Pictures/336.svg"/>
  <manifest:file-entry manifest:media-type="image/svg+xml" manifest:full-path="Pictures/335.svg"/>
  <manifest:file-entry manifest:media-type="image/svg+xml" manifest:full-path="Pictures/334.svg"/>
  <manifest:file-entry manifest:media-type="image/svg+xml" manifest:full-path="Pictures/333.svg"/>
  <manifest:file-entry manifest:media-type="image/svg+xml" manifest:full-path="Pictures/332.svg"/>
  <manifest:file-entry manifest:media-type="image/svg+xml" manifest:full-path="Pictures/331.svg"/>
  <manifest:file-entry manifest:media-type="image/svg+xml" manifest:full-path="Pictures/330.svg"/>
  <manifest:file-entry manifest:media-type="image/svg+xml" manifest:full-path="Pictures/329.svg"/>
  <manifest:file-entry manifest:media-type="image/svg+xml" manifest:full-path="Pictures/328.svg"/>
  <manifest:file-entry manifest:media-type="image/svg+xml" manifest:full-path="Pictures/327.svg"/>
  <manifest:file-entry manifest:media-type="image/svg+xml" manifest:full-path="Pictures/326.svg"/>
  <manifest:file-entry manifest:media-type="image/svg+xml" manifest:full-path="Pictures/325.svg"/>
  <manifest:file-entry manifest:media-type="image/svg+xml" manifest:full-path="Pictures/324.svg"/>
  <manifest:file-entry manifest:media-type="image/svg+xml" manifest:full-path="Pictures/323.svg"/>
  <manifest:file-entry manifest:media-type="image/svg+xml" manifest:full-path="Pictures/322.svg"/>
  <manifest:file-entry manifest:media-type="image/svg+xml" manifest:full-path="Pictures/321.svg"/>
  <manifest:file-entry manifest:media-type="image/svg+xml" manifest:full-path="Pictures/320.svg"/>
  <manifest:file-entry manifest:media-type="image/svg+xml" manifest:full-path="Pictures/319.svg"/>
  <manifest:file-entry manifest:media-type="image/svg+xml" manifest:full-path="Pictures/318.svg"/>
  <manifest:file-entry manifest:media-type="image/svg+xml" manifest:full-path="Pictures/317.svg"/>
  <manifest:file-entry manifest:media-type="image/svg+xml" manifest:full-path="Pictures/316.svg"/>
  <manifest:file-entry manifest:media-type="image/svg+xml" manifest:full-path="Pictures/315.svg"/>
  <manifest:file-entry manifest:media-type="image/svg+xml" manifest:full-path="Pictures/314.svg"/>
  <manifest:file-entry manifest:media-type="image/svg+xml" manifest:full-path="Pictures/313.svg"/>
  <manifest:file-entry manifest:media-type="image/svg+xml" manifest:full-path="Pictures/312.svg"/>
  <manifest:file-entry manifest:media-type="image/svg+xml" manifest:full-path="Pictures/311.svg"/>
  <manifest:file-entry manifest:media-type="image/svg+xml" manifest:full-path="Pictures/310.svg"/>
  <manifest:file-entry manifest:media-type="image/svg+xml" manifest:full-path="Pictures/309.svg"/>
  <manifest:file-entry manifest:media-type="image/svg+xml" manifest:full-path="Pictures/308.svg"/>
  <manifest:file-entry manifest:media-type="image/svg+xml" manifest:full-path="Pictures/307.svg"/>
  <manifest:file-entry manifest:media-type="image/svg+xml" manifest:full-path="Pictures/306.svg"/>
  <manifest:file-entry manifest:media-type="image/svg+xml" manifest:full-path="Pictures/305.svg"/>
  <manifest:file-entry manifest:media-type="image/svg+xml" manifest:full-path="Pictures/304.svg"/>
  <manifest:file-entry manifest:media-type="image/svg+xml" manifest:full-path="Pictures/303.svg"/>
  <manifest:file-entry manifest:media-type="image/svg+xml" manifest:full-path="Pictures/302.svg"/>
  <manifest:file-entry manifest:media-type="image/svg+xml" manifest:full-path="Pictures/301.svg"/>
  <manifest:file-entry manifest:media-type="image/svg+xml" manifest:full-path="Pictures/300.svg"/>
  <manifest:file-entry manifest:media-type="image/svg+xml" manifest:full-path="Pictures/299.svg"/>
  <manifest:file-entry manifest:media-type="image/svg+xml" manifest:full-path="Pictures/298.svg"/>
  <manifest:file-entry manifest:media-type="image/svg+xml" manifest:full-path="Pictures/297.svg"/>
  <manifest:file-entry manifest:media-type="image/svg+xml" manifest:full-path="Pictures/296.svg"/>
  <manifest:file-entry manifest:media-type="image/svg+xml" manifest:full-path="Pictures/295.svg"/>
  <manifest:file-entry manifest:media-type="image/svg+xml" manifest:full-path="Pictures/294.svg"/>
  <manifest:file-entry manifest:media-type="image/svg+xml" manifest:full-path="Pictures/293.svg"/>
  <manifest:file-entry manifest:media-type="image/svg+xml" manifest:full-path="Pictures/292.svg"/>
  <manifest:file-entry manifest:media-type="image/svg+xml" manifest:full-path="Pictures/291.svg"/>
  <manifest:file-entry manifest:media-type="image/svg+xml" manifest:full-path="Pictures/290.svg"/>
  <manifest:file-entry manifest:media-type="image/svg+xml" manifest:full-path="Pictures/289.svg"/>
  <manifest:file-entry manifest:media-type="image/svg+xml" manifest:full-path="Pictures/288.svg"/>
  <manifest:file-entry manifest:media-type="image/svg+xml" manifest:full-path="Pictures/287.svg"/>
  <manifest:file-entry manifest:media-type="image/svg+xml" manifest:full-path="Pictures/286.svg"/>
  <manifest:file-entry manifest:media-type="image/svg+xml" manifest:full-path="Pictures/285.svg"/>
  <manifest:file-entry manifest:media-type="image/svg+xml" manifest:full-path="Pictures/284.svg"/>
  <manifest:file-entry manifest:media-type="image/svg+xml" manifest:full-path="Pictures/283.svg"/>
  <manifest:file-entry manifest:media-type="image/svg+xml" manifest:full-path="Pictures/282.svg"/>
  <manifest:file-entry manifest:media-type="image/svg+xml" manifest:full-path="Pictures/281.svg"/>
  <manifest:file-entry manifest:media-type="image/svg+xml" manifest:full-path="Pictures/280.svg"/>
  <manifest:file-entry manifest:media-type="image/svg+xml" manifest:full-path="Pictures/279.svg"/>
  <manifest:file-entry manifest:media-type="image/svg+xml" manifest:full-path="Pictures/278.svg"/>
  <manifest:file-entry manifest:media-type="image/svg+xml" manifest:full-path="Pictures/277.svg"/>
  <manifest:file-entry manifest:media-type="image/svg+xml" manifest:full-path="Pictures/276.svg"/>
  <manifest:file-entry manifest:media-type="image/svg+xml" manifest:full-path="Pictures/275.svg"/>
  <manifest:file-entry manifest:media-type="image/svg+xml" manifest:full-path="Pictures/274.svg"/>
  <manifest:file-entry manifest:media-type="image/svg+xml" manifest:full-path="Pictures/273.svg"/>
  <manifest:file-entry manifest:media-type="image/svg+xml" manifest:full-path="Pictures/272.svg"/>
  <manifest:file-entry manifest:media-type="image/svg+xml" manifest:full-path="Pictures/271.svg"/>
  <manifest:file-entry manifest:media-type="image/svg+xml" manifest:full-path="Pictures/270.svg"/>
  <manifest:file-entry manifest:media-type="image/svg+xml" manifest:full-path="Pictures/269.svg"/>
  <manifest:file-entry manifest:media-type="image/svg+xml" manifest:full-path="Pictures/268.svg"/>
  <manifest:file-entry manifest:media-type="image/svg+xml" manifest:full-path="Pictures/267.svg"/>
  <manifest:file-entry manifest:media-type="image/svg+xml" manifest:full-path="Pictures/266.svg"/>
  <manifest:file-entry manifest:media-type="image/svg+xml" manifest:full-path="Pictures/265.svg"/>
  <manifest:file-entry manifest:media-type="image/svg+xml" manifest:full-path="Pictures/264.svg"/>
  <manifest:file-entry manifest:media-type="image/svg+xml" manifest:full-path="Pictures/263.svg"/>
  <manifest:file-entry manifest:media-type="image/svg+xml" manifest:full-path="Pictures/262.svg"/>
  <manifest:file-entry manifest:media-type="image/svg+xml" manifest:full-path="Pictures/261.svg"/>
  <manifest:file-entry manifest:media-type="image/svg+xml" manifest:full-path="Pictures/260.svg"/>
  <manifest:file-entry manifest:media-type="image/svg+xml" manifest:full-path="Pictures/259.svg"/>
  <manifest:file-entry manifest:media-type="image/svg+xml" manifest:full-path="Pictures/258.svg"/>
  <manifest:file-entry manifest:media-type="image/svg+xml" manifest:full-path="Pictures/257.svg"/>
  <manifest:file-entry manifest:media-type="image/svg+xml" manifest:full-path="Pictures/256.svg"/>
  <manifest:file-entry manifest:media-type="image/svg+xml" manifest:full-path="Pictures/255.svg"/>
  <manifest:file-entry manifest:media-type="image/svg+xml" manifest:full-path="Pictures/254.svg"/>
  <manifest:file-entry manifest:media-type="image/svg+xml" manifest:full-path="Pictures/253.svg"/>
  <manifest:file-entry manifest:media-type="image/svg+xml" manifest:full-path="Pictures/252.svg"/>
  <manifest:file-entry manifest:media-type="image/svg+xml" manifest:full-path="Pictures/251.svg"/>
  <manifest:file-entry manifest:media-type="image/svg+xml" manifest:full-path="Pictures/250.svg"/>
  <manifest:file-entry manifest:media-type="image/svg+xml" manifest:full-path="Pictures/249.svg"/>
  <manifest:file-entry manifest:media-type="image/svg+xml" manifest:full-path="Pictures/248.svg"/>
  <manifest:file-entry manifest:media-type="image/svg+xml" manifest:full-path="Pictures/247.svg"/>
  <manifest:file-entry manifest:media-type="image/svg+xml" manifest:full-path="Pictures/246.svg"/>
  <manifest:file-entry manifest:media-type="image/svg+xml" manifest:full-path="Pictures/245.svg"/>
  <manifest:file-entry manifest:media-type="image/svg+xml" manifest:full-path="Pictures/244.svg"/>
  <manifest:file-entry manifest:media-type="image/svg+xml" manifest:full-path="Pictures/243.svg"/>
  <manifest:file-entry manifest:media-type="image/svg+xml" manifest:full-path="Pictures/242.svg"/>
  <manifest:file-entry manifest:media-type="image/svg+xml" manifest:full-path="Pictures/241.svg"/>
  <manifest:file-entry manifest:media-type="image/svg+xml" manifest:full-path="Pictures/240.svg"/>
  <manifest:file-entry manifest:media-type="image/svg+xml" manifest:full-path="Pictures/239.svg"/>
  <manifest:file-entry manifest:media-type="image/svg+xml" manifest:full-path="Pictures/238.svg"/>
  <manifest:file-entry manifest:media-type="image/svg+xml" manifest:full-path="Pictures/237.svg"/>
  <manifest:file-entry manifest:media-type="image/svg+xml" manifest:full-path="Pictures/236.svg"/>
  <manifest:file-entry manifest:media-type="image/svg+xml" manifest:full-path="Pictures/235.svg"/>
  <manifest:file-entry manifest:media-type="image/svg+xml" manifest:full-path="Pictures/234.svg"/>
  <manifest:file-entry manifest:media-type="image/svg+xml" manifest:full-path="Pictures/233.svg"/>
  <manifest:file-entry manifest:media-type="image/svg+xml" manifest:full-path="Pictures/232.svg"/>
  <manifest:file-entry manifest:media-type="image/svg+xml" manifest:full-path="Pictures/231.svg"/>
  <manifest:file-entry manifest:media-type="image/svg+xml" manifest:full-path="Pictures/230.svg"/>
  <manifest:file-entry manifest:media-type="image/svg+xml" manifest:full-path="Pictures/229.svg"/>
  <manifest:file-entry manifest:media-type="image/svg+xml" manifest:full-path="Pictures/228.svg"/>
  <manifest:file-entry manifest:media-type="image/svg+xml" manifest:full-path="Pictures/227.svg"/>
  <manifest:file-entry manifest:media-type="image/svg+xml" manifest:full-path="Pictures/226.svg"/>
  <manifest:file-entry manifest:media-type="image/svg+xml" manifest:full-path="Pictures/225.svg"/>
  <manifest:file-entry manifest:media-type="image/svg+xml" manifest:full-path="Pictures/224.svg"/>
  <manifest:file-entry manifest:media-type="image/svg+xml" manifest:full-path="Pictures/223.svg"/>
  <manifest:file-entry manifest:media-type="image/svg+xml" manifest:full-path="Pictures/222.svg"/>
  <manifest:file-entry manifest:media-type="image/svg+xml" manifest:full-path="Pictures/221.svg"/>
  <manifest:file-entry manifest:media-type="image/svg+xml" manifest:full-path="Pictures/220.svg"/>
  <manifest:file-entry manifest:media-type="image/svg+xml" manifest:full-path="Pictures/219.svg"/>
  <manifest:file-entry manifest:media-type="image/svg+xml" manifest:full-path="Pictures/218.svg"/>
  <manifest:file-entry manifest:media-type="image/svg+xml" manifest:full-path="Pictures/217.svg"/>
  <manifest:file-entry manifest:media-type="image/svg+xml" manifest:full-path="Pictures/216.svg"/>
  <manifest:file-entry manifest:media-type="image/svg+xml" manifest:full-path="Pictures/215.svg"/>
  <manifest:file-entry manifest:media-type="image/svg+xml" manifest:full-path="Pictures/214.svg"/>
  <manifest:file-entry manifest:media-type="image/svg+xml" manifest:full-path="Pictures/213.svg"/>
  <manifest:file-entry manifest:media-type="image/svg+xml" manifest:full-path="Pictures/212.svg"/>
  <manifest:file-entry manifest:media-type="image/svg+xml" manifest:full-path="Pictures/211.svg"/>
  <manifest:file-entry manifest:media-type="image/svg+xml" manifest:full-path="Pictures/210.svg"/>
  <manifest:file-entry manifest:media-type="image/svg+xml" manifest:full-path="Pictures/209.svg"/>
  <manifest:file-entry manifest:media-type="image/svg+xml" manifest:full-path="Pictures/208.svg"/>
  <manifest:file-entry manifest:media-type="image/svg+xml" manifest:full-path="Pictures/207.svg"/>
  <manifest:file-entry manifest:media-type="image/svg+xml" manifest:full-path="Pictures/206.svg"/>
  <manifest:file-entry manifest:media-type="image/svg+xml" manifest:full-path="Pictures/205.svg"/>
  <manifest:file-entry manifest:media-type="image/svg+xml" manifest:full-path="Pictures/204.svg"/>
  <manifest:file-entry manifest:media-type="image/svg+xml" manifest:full-path="Pictures/203.svg"/>
  <manifest:file-entry manifest:media-type="image/svg+xml" manifest:full-path="Pictures/202.svg"/>
  <manifest:file-entry manifest:media-type="image/svg+xml" manifest:full-path="Pictures/201.svg"/>
  <manifest:file-entry manifest:media-type="image/svg+xml" manifest:full-path="Pictures/200.svg"/>
  <manifest:file-entry manifest:media-type="image/svg+xml" manifest:full-path="Pictures/199.svg"/>
  <manifest:file-entry manifest:media-type="image/svg+xml" manifest:full-path="Pictures/198.svg"/>
  <manifest:file-entry manifest:media-type="image/svg+xml" manifest:full-path="Pictures/197.svg"/>
  <manifest:file-entry manifest:media-type="image/svg+xml" manifest:full-path="Pictures/196.svg"/>
  <manifest:file-entry manifest:media-type="image/svg+xml" manifest:full-path="Pictures/195.svg"/>
  <manifest:file-entry manifest:media-type="image/svg+xml" manifest:full-path="Pictures/194.svg"/>
  <manifest:file-entry manifest:media-type="image/svg+xml" manifest:full-path="Pictures/193.svg"/>
  <manifest:file-entry manifest:media-type="image/svg+xml" manifest:full-path="Pictures/192.svg"/>
  <manifest:file-entry manifest:media-type="image/svg+xml" manifest:full-path="Pictures/191.svg"/>
  <manifest:file-entry manifest:media-type="image/svg+xml" manifest:full-path="Pictures/190.svg"/>
  <manifest:file-entry manifest:media-type="image/svg+xml" manifest:full-path="Pictures/189.svg"/>
  <manifest:file-entry manifest:media-type="image/svg+xml" manifest:full-path="Pictures/188.svg"/>
  <manifest:file-entry manifest:media-type="image/svg+xml" manifest:full-path="Pictures/187.svg"/>
  <manifest:file-entry manifest:media-type="image/svg+xml" manifest:full-path="Pictures/186.svg"/>
  <manifest:file-entry manifest:media-type="image/svg+xml" manifest:full-path="Pictures/185.svg"/>
  <manifest:file-entry manifest:media-type="image/svg+xml" manifest:full-path="Pictures/184.svg"/>
  <manifest:file-entry manifest:media-type="image/svg+xml" manifest:full-path="Pictures/183.svg"/>
  <manifest:file-entry manifest:media-type="image/svg+xml" manifest:full-path="Pictures/182.svg"/>
  <manifest:file-entry manifest:media-type="image/svg+xml" manifest:full-path="Pictures/181.svg"/>
  <manifest:file-entry manifest:media-type="image/svg+xml" manifest:full-path="Pictures/180.svg"/>
  <manifest:file-entry manifest:media-type="image/svg+xml" manifest:full-path="Pictures/179.svg"/>
  <manifest:file-entry manifest:media-type="image/svg+xml" manifest:full-path="Pictures/178.svg"/>
  <manifest:file-entry manifest:media-type="image/svg+xml" manifest:full-path="Pictures/177.svg"/>
  <manifest:file-entry manifest:media-type="image/svg+xml" manifest:full-path="Pictures/176.svg"/>
  <manifest:file-entry manifest:media-type="image/svg+xml" manifest:full-path="Pictures/175.svg"/>
  <manifest:file-entry manifest:media-type="image/svg+xml" manifest:full-path="Pictures/174.svg"/>
  <manifest:file-entry manifest:media-type="image/svg+xml" manifest:full-path="Pictures/173.svg"/>
  <manifest:file-entry manifest:media-type="image/svg+xml" manifest:full-path="Pictures/172.svg"/>
  <manifest:file-entry manifest:media-type="image/svg+xml" manifest:full-path="Pictures/171.svg"/>
  <manifest:file-entry manifest:media-type="image/svg+xml" manifest:full-path="Pictures/170.svg"/>
  <manifest:file-entry manifest:media-type="image/svg+xml" manifest:full-path="Pictures/169.svg"/>
  <manifest:file-entry manifest:media-type="image/svg+xml" manifest:full-path="Pictures/168.svg"/>
  <manifest:file-entry manifest:media-type="image/svg+xml" manifest:full-path="Pictures/167.svg"/>
  <manifest:file-entry manifest:media-type="image/svg+xml" manifest:full-path="Pictures/166.svg"/>
  <manifest:file-entry manifest:media-type="image/svg+xml" manifest:full-path="Pictures/165.svg"/>
  <manifest:file-entry manifest:media-type="image/svg+xml" manifest:full-path="Pictures/164.svg"/>
  <manifest:file-entry manifest:media-type="image/svg+xml" manifest:full-path="Pictures/163.svg"/>
  <manifest:file-entry manifest:media-type="image/svg+xml" manifest:full-path="Pictures/162.svg"/>
  <manifest:file-entry manifest:media-type="image/svg+xml" manifest:full-path="Pictures/161.svg"/>
  <manifest:file-entry manifest:media-type="image/svg+xml" manifest:full-path="Pictures/160.svg"/>
  <manifest:file-entry manifest:media-type="image/svg+xml" manifest:full-path="Pictures/159.svg"/>
  <manifest:file-entry manifest:media-type="image/svg+xml" manifest:full-path="Pictures/158.svg"/>
  <manifest:file-entry manifest:media-type="image/svg+xml" manifest:full-path="Pictures/157.svg"/>
  <manifest:file-entry manifest:media-type="image/svg+xml" manifest:full-path="Pictures/156.svg"/>
  <manifest:file-entry manifest:media-type="image/svg+xml" manifest:full-path="Pictures/155.svg"/>
  <manifest:file-entry manifest:media-type="image/svg+xml" manifest:full-path="Pictures/154.svg"/>
  <manifest:file-entry manifest:media-type="image/svg+xml" manifest:full-path="Pictures/153.svg"/>
  <manifest:file-entry manifest:media-type="image/svg+xml" manifest:full-path="Pictures/152.svg"/>
  <manifest:file-entry manifest:media-type="image/svg+xml" manifest:full-path="Pictures/151.svg"/>
  <manifest:file-entry manifest:media-type="image/svg+xml" manifest:full-path="Pictures/150.svg"/>
  <manifest:file-entry manifest:media-type="image/svg+xml" manifest:full-path="Pictures/149.svg"/>
  <manifest:file-entry manifest:media-type="image/svg+xml" manifest:full-path="Pictures/148.svg"/>
  <manifest:file-entry manifest:media-type="image/svg+xml" manifest:full-path="Pictures/147.svg"/>
  <manifest:file-entry manifest:media-type="image/svg+xml" manifest:full-path="Pictures/146.svg"/>
  <manifest:file-entry manifest:media-type="image/svg+xml" manifest:full-path="Pictures/145.svg"/>
  <manifest:file-entry manifest:media-type="image/svg+xml" manifest:full-path="Pictures/144.svg"/>
  <manifest:file-entry manifest:media-type="image/svg+xml" manifest:full-path="Pictures/143.svg"/>
  <manifest:file-entry manifest:media-type="image/svg+xml" manifest:full-path="Pictures/142.svg"/>
  <manifest:file-entry manifest:media-type="image/svg+xml" manifest:full-path="Pictures/141.svg"/>
  <manifest:file-entry manifest:media-type="image/svg+xml" manifest:full-path="Pictures/140.svg"/>
  <manifest:file-entry manifest:media-type="image/svg+xml" manifest:full-path="Pictures/139.svg"/>
  <manifest:file-entry manifest:media-type="image/svg+xml" manifest:full-path="Pictures/138.svg"/>
  <manifest:file-entry manifest:media-type="image/svg+xml" manifest:full-path="Pictures/137.svg"/>
  <manifest:file-entry manifest:media-type="image/svg+xml" manifest:full-path="Pictures/136.svg"/>
  <manifest:file-entry manifest:media-type="image/svg+xml" manifest:full-path="Pictures/135.svg"/>
  <manifest:file-entry manifest:media-type="image/svg+xml" manifest:full-path="Pictures/134.svg"/>
  <manifest:file-entry manifest:media-type="image/svg+xml" manifest:full-path="Pictures/133.svg"/>
  <manifest:file-entry manifest:media-type="image/svg+xml" manifest:full-path="Pictures/132.svg"/>
  <manifest:file-entry manifest:media-type="image/svg+xml" manifest:full-path="Pictures/131.svg"/>
  <manifest:file-entry manifest:media-type="image/svg+xml" manifest:full-path="Pictures/130.svg"/>
  <manifest:file-entry manifest:media-type="image/svg+xml" manifest:full-path="Pictures/129.svg"/>
  <manifest:file-entry manifest:media-type="image/svg+xml" manifest:full-path="Pictures/128.svg"/>
  <manifest:file-entry manifest:media-type="image/svg+xml" manifest:full-path="Pictures/127.svg"/>
  <manifest:file-entry manifest:media-type="image/svg+xml" manifest:full-path="Pictures/126.svg"/>
  <manifest:file-entry manifest:media-type="image/svg+xml" manifest:full-path="Pictures/125.svg"/>
  <manifest:file-entry manifest:media-type="image/svg+xml" manifest:full-path="Pictures/124.svg"/>
  <manifest:file-entry manifest:media-type="image/svg+xml" manifest:full-path="Pictures/123.svg"/>
  <manifest:file-entry manifest:media-type="image/svg+xml" manifest:full-path="Pictures/122.svg"/>
  <manifest:file-entry manifest:media-type="image/svg+xml" manifest:full-path="Pictures/121.svg"/>
  <manifest:file-entry manifest:media-type="image/svg+xml" manifest:full-path="Pictures/120.svg"/>
  <manifest:file-entry manifest:media-type="image/svg+xml" manifest:full-path="Pictures/119.svg"/>
  <manifest:file-entry manifest:media-type="image/svg+xml" manifest:full-path="Pictures/118.svg"/>
  <manifest:file-entry manifest:media-type="image/svg+xml" manifest:full-path="Pictures/117.svg"/>
  <manifest:file-entry manifest:media-type="image/svg+xml" manifest:full-path="Pictures/116.svg"/>
  <manifest:file-entry manifest:media-type="image/svg+xml" manifest:full-path="Pictures/115.svg"/>
  <manifest:file-entry manifest:media-type="image/svg+xml" manifest:full-path="Pictures/114.svg"/>
  <manifest:file-entry manifest:media-type="image/svg+xml" manifest:full-path="Pictures/113.svg"/>
  <manifest:file-entry manifest:media-type="image/svg+xml" manifest:full-path="Pictures/112.svg"/>
  <manifest:file-entry manifest:media-type="image/svg+xml" manifest:full-path="Pictures/111.svg"/>
  <manifest:file-entry manifest:media-type="image/svg+xml" manifest:full-path="Pictures/110.svg"/>
  <manifest:file-entry manifest:media-type="image/svg+xml" manifest:full-path="Pictures/109.svg"/>
  <manifest:file-entry manifest:media-type="image/svg+xml" manifest:full-path="Pictures/108.svg"/>
  <manifest:file-entry manifest:media-type="image/svg+xml" manifest:full-path="Pictures/107.svg"/>
  <manifest:file-entry manifest:media-type="image/svg+xml" manifest:full-path="Pictures/106.svg"/>
  <manifest:file-entry manifest:media-type="image/svg+xml" manifest:full-path="Pictures/105.svg"/>
  <manifest:file-entry manifest:media-type="image/svg+xml" manifest:full-path="Pictures/104.svg"/>
  <manifest:file-entry manifest:media-type="image/svg+xml" manifest:full-path="Pictures/103.svg"/>
  <manifest:file-entry manifest:media-type="image/svg+xml" manifest:full-path="Pictures/102.svg"/>
  <manifest:file-entry manifest:media-type="image/svg+xml" manifest:full-path="Pictures/101.svg"/>
  <manifest:file-entry manifest:media-type="image/svg+xml" manifest:full-path="Pictures/100.svg"/>
  <manifest:file-entry manifest:media-type="image/svg+xml" manifest:full-path="Pictures/99.svg"/>
  <manifest:file-entry manifest:media-type="image/svg+xml" manifest:full-path="Pictures/98.svg"/>
  <manifest:file-entry manifest:media-type="image/svg+xml" manifest:full-path="Pictures/97.svg"/>
  <manifest:file-entry manifest:media-type="image/svg+xml" manifest:full-path="Pictures/96.svg"/>
  <manifest:file-entry manifest:media-type="image/svg+xml" manifest:full-path="Pictures/95.svg"/>
  <manifest:file-entry manifest:media-type="image/svg+xml" manifest:full-path="Pictures/94.svg"/>
  <manifest:file-entry manifest:media-type="image/svg+xml" manifest:full-path="Pictures/93.svg"/>
  <manifest:file-entry manifest:media-type="image/svg+xml" manifest:full-path="Pictures/92.svg"/>
  <manifest:file-entry manifest:media-type="image/svg+xml" manifest:full-path="Pictures/91.svg"/>
  <manifest:file-entry manifest:media-type="image/svg+xml" manifest:full-path="Pictures/90.svg"/>
  <manifest:file-entry manifest:media-type="image/svg+xml" manifest:full-path="Pictures/89.svg"/>
  <manifest:file-entry manifest:media-type="image/svg+xml" manifest:full-path="Pictures/88.svg"/>
  <manifest:file-entry manifest:media-type="image/svg+xml" manifest:full-path="Pictures/87.svg"/>
  <manifest:file-entry manifest:media-type="image/svg+xml" manifest:full-path="Pictures/86.svg"/>
  <manifest:file-entry manifest:media-type="image/svg+xml" manifest:full-path="Pictures/85.svg"/>
  <manifest:file-entry manifest:media-type="image/svg+xml" manifest:full-path="Pictures/84.svg"/>
  <manifest:file-entry manifest:media-type="image/svg+xml" manifest:full-path="Pictures/83.svg"/>
  <manifest:file-entry manifest:media-type="image/svg+xml" manifest:full-path="Pictures/82.svg"/>
  <manifest:file-entry manifest:media-type="image/svg+xml" manifest:full-path="Pictures/81.svg"/>
  <manifest:file-entry manifest:media-type="image/svg+xml" manifest:full-path="Pictures/80.svg"/>
  <manifest:file-entry manifest:media-type="image/svg+xml" manifest:full-path="Pictures/79.svg"/>
  <manifest:file-entry manifest:media-type="image/svg+xml" manifest:full-path="Pictures/78.svg"/>
  <manifest:file-entry manifest:media-type="image/svg+xml" manifest:full-path="Pictures/77.svg"/>
  <manifest:file-entry manifest:media-type="image/svg+xml" manifest:full-path="Pictures/76.svg"/>
  <manifest:file-entry manifest:media-type="image/svg+xml" manifest:full-path="Pictures/75.svg"/>
  <manifest:file-entry manifest:media-type="image/svg+xml" manifest:full-path="Pictures/74.svg"/>
  <manifest:file-entry manifest:media-type="image/svg+xml" manifest:full-path="Pictures/73.svg"/>
  <manifest:file-entry manifest:media-type="image/svg+xml" manifest:full-path="Pictures/72.svg"/>
  <manifest:file-entry manifest:media-type="image/svg+xml" manifest:full-path="Pictures/71.svg"/>
  <manifest:file-entry manifest:media-type="image/svg+xml" manifest:full-path="Pictures/70.svg"/>
  <manifest:file-entry manifest:media-type="image/svg+xml" manifest:full-path="Pictures/69.svg"/>
  <manifest:file-entry manifest:media-type="image/svg+xml" manifest:full-path="Pictures/68.svg"/>
  <manifest:file-entry manifest:media-type="image/svg+xml" manifest:full-path="Pictures/67.svg"/>
  <manifest:file-entry manifest:media-type="image/svg+xml" manifest:full-path="Pictures/66.svg"/>
  <manifest:file-entry manifest:media-type="image/svg+xml" manifest:full-path="Pictures/65.svg"/>
  <manifest:file-entry manifest:media-type="image/svg+xml" manifest:full-path="Pictures/64.svg"/>
  <manifest:file-entry manifest:media-type="image/svg+xml" manifest:full-path="Pictures/63.svg"/>
  <manifest:file-entry manifest:media-type="image/svg+xml" manifest:full-path="Pictures/62.svg"/>
  <manifest:file-entry manifest:media-type="image/svg+xml" manifest:full-path="Pictures/61.svg"/>
  <manifest:file-entry manifest:media-type="image/svg+xml" manifest:full-path="Pictures/60.svg"/>
  <manifest:file-entry manifest:media-type="image/svg+xml" manifest:full-path="Pictures/59.svg"/>
  <manifest:file-entry manifest:media-type="image/svg+xml" manifest:full-path="Pictures/58.svg"/>
  <manifest:file-entry manifest:media-type="image/svg+xml" manifest:full-path="Pictures/57.svg"/>
  <manifest:file-entry manifest:media-type="image/svg+xml" manifest:full-path="Pictures/56.svg"/>
  <manifest:file-entry manifest:media-type="image/svg+xml" manifest:full-path="Pictures/55.svg"/>
  <manifest:file-entry manifest:media-type="image/svg+xml" manifest:full-path="Pictures/54.svg"/>
  <manifest:file-entry manifest:media-type="image/svg+xml" manifest:full-path="Pictures/53.svg"/>
  <manifest:file-entry manifest:media-type="image/svg+xml" manifest:full-path="Pictures/52.svg"/>
  <manifest:file-entry manifest:media-type="image/svg+xml" manifest:full-path="Pictures/51.svg"/>
  <manifest:file-entry manifest:media-type="image/svg+xml" manifest:full-path="Pictures/50.svg"/>
  <manifest:file-entry manifest:media-type="image/svg+xml" manifest:full-path="Pictures/49.svg"/>
  <manifest:file-entry manifest:media-type="image/svg+xml" manifest:full-path="Pictures/48.svg"/>
  <manifest:file-entry manifest:media-type="image/svg+xml" manifest:full-path="Pictures/47.svg"/>
  <manifest:file-entry manifest:media-type="image/svg+xml" manifest:full-path="Pictures/46.svg"/>
  <manifest:file-entry manifest:media-type="image/svg+xml" manifest:full-path="Pictures/45.svg"/>
  <manifest:file-entry manifest:media-type="image/svg+xml" manifest:full-path="Pictures/44.svg"/>
  <manifest:file-entry manifest:media-type="image/svg+xml" manifest:full-path="Pictures/43.svg"/>
  <manifest:file-entry manifest:media-type="image/svg+xml" manifest:full-path="Pictures/42.svg"/>
  <manifest:file-entry manifest:media-type="image/svg+xml" manifest:full-path="Pictures/41.svg"/>
  <manifest:file-entry manifest:media-type="image/svg+xml" manifest:full-path="Pictures/40.svg"/>
  <manifest:file-entry manifest:media-type="image/svg+xml" manifest:full-path="Pictures/39.svg"/>
  <manifest:file-entry manifest:media-type="image/svg+xml" manifest:full-path="Pictures/38.svg"/>
  <manifest:file-entry manifest:media-type="image/svg+xml" manifest:full-path="Pictures/37.svg"/>
  <manifest:file-entry manifest:media-type="image/svg+xml" manifest:full-path="Pictures/36.svg"/>
  <manifest:file-entry manifest:media-type="image/svg+xml" manifest:full-path="Pictures/35.svg"/>
  <manifest:file-entry manifest:media-type="image/svg+xml" manifest:full-path="Pictures/34.svg"/>
  <manifest:file-entry manifest:media-type="image/svg+xml" manifest:full-path="Pictures/33.svg"/>
  <manifest:file-entry manifest:media-type="image/svg+xml" manifest:full-path="Pictures/32.svg"/>
  <manifest:file-entry manifest:media-type="image/svg+xml" manifest:full-path="Pictures/31.svg"/>
  <manifest:file-entry manifest:media-type="image/svg+xml" manifest:full-path="Pictures/30.svg"/>
  <manifest:file-entry manifest:media-type="image/svg+xml" manifest:full-path="Pictures/29.svg"/>
  <manifest:file-entry manifest:media-type="image/svg+xml" manifest:full-path="Pictures/28.svg"/>
  <manifest:file-entry manifest:media-type="image/svg+xml" manifest:full-path="Pictures/27.svg"/>
  <manifest:file-entry manifest:media-type="image/svg+xml" manifest:full-path="Pictures/26.svg"/>
  <manifest:file-entry manifest:media-type="image/svg+xml" manifest:full-path="Pictures/25.svg"/>
  <manifest:file-entry manifest:media-type="image/svg+xml" manifest:full-path="Pictures/24.svg"/>
  <manifest:file-entry manifest:media-type="image/svg+xml" manifest:full-path="Pictures/23.svg"/>
  <manifest:file-entry manifest:media-type="image/svg+xml" manifest:full-path="Pictures/22.svg"/>
  <manifest:file-entry manifest:media-type="image/svg+xml" manifest:full-path="Pictures/21.svg"/>
  <manifest:file-entry manifest:media-type="image/svg+xml" manifest:full-path="Pictures/20.svg"/>
  <manifest:file-entry manifest:media-type="image/svg+xml" manifest:full-path="Pictures/19.svg"/>
  <manifest:file-entry manifest:media-type="image/svg+xml" manifest:full-path="Pictures/18.svg"/>
  <manifest:file-entry manifest:media-type="image/svg+xml" manifest:full-path="Pictures/17.svg"/>
  <manifest:file-entry manifest:media-type="image/svg+xml" manifest:full-path="Pictures/16.svg"/>
  <manifest:file-entry manifest:media-type="image/svg+xml" manifest:full-path="Pictures/15.svg"/>
  <manifest:file-entry manifest:media-type="image/svg+xml" manifest:full-path="Pictures/14.svg"/>
  <manifest:file-entry manifest:media-type="image/svg+xml" manifest:full-path="Pictures/13.svg"/>
  <manifest:file-entry manifest:media-type="image/svg+xml" manifest:full-path="Pictures/12.svg"/>
  <manifest:file-entry manifest:media-type="image/svg+xml" manifest:full-path="Pictures/11.svg"/>
  <manifest:file-entry manifest:media-type="image/svg+xml" manifest:full-path="Pictures/10.svg"/>
  <manifest:file-entry manifest:media-type="image/svg+xml" manifest:full-path="Pictures/9.svg"/>
  <manifest:file-entry manifest:media-type="image/svg+xml" manifest:full-path="Pictures/8.svg"/>
  <manifest:file-entry manifest:media-type="image/svg+xml" manifest:full-path="Pictures/7.svg"/>
  <manifest:file-entry manifest:media-type="image/svg+xml" manifest:full-path="Pictures/6.svg"/>
  <manifest:file-entry manifest:media-type="image/svg+xml" manifest:full-path="Pictures/5.svg"/>
  <manifest:file-entry manifest:media-type="image/svg+xml" manifest:full-path="Pictures/4.svg"/>
  <manifest:file-entry manifest:media-type="image/svg+xml" manifest:full-path="Pictures/3.svg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9362*"/>
    </style:style>
    <style:style style:name="Table1.B" style:family="table-column">
      <style:table-column-properties style:rel-column-width="9362*"/>
    </style:style>
    <style:style style:name="Table1.C" style:family="table-column">
      <style:table-column-properties style:rel-column-width="9362*"/>
    </style:style>
    <style:style style:name="Table1.D" style:family="table-column">
      <style:table-column-properties style:rel-column-width="9362*"/>
    </style:style>
    <style:style style:name="Table1.E" style:family="table-column">
      <style:table-column-properties style:rel-column-width="9362*"/>
    </style:style>
    <style:style style:name="Table1.F" style:family="table-column">
      <style:table-column-properties style:rel-column-width="9362*"/>
    </style:style>
    <style:style style:name="Table1.G" style:family="table-column">
      <style:table-column-properties style:rel-column-width="936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16383*"/>
    </style:style>
    <style:style style:name="Table2.D" style:family="table-column">
      <style:table-column-properties style:rel-column-width="16383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</office:automatic-styles>
  <office:body>
    <office:text>
      <text:h text:style-name="Heading_20_1" text:outline-level="1"><text:bookmark-start text:name="buttons"/>Buttons<text:bookmark-end text:name="button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File</text:p>
            </table:table-cell>
            <table:table-cell table:style-name="TableHeaderRowCell" office:value-type="string">
              <text:p text:style-name="Table_20_Heading">Icon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shortText</text:p>
            </table:table-cell>
            <table:table-cell table:style-name="TableHeaderRowCell" office:value-type="string">
              <text:p text:style-name="Table_20_Heading">longTex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components/ButtonDefs.ts#L275" office:name=""><text:span text:style-name="Definition"><text:span text:style-name="T1">ABShow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85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" svg:width="0.41667in" svg:height="0.4166666666666667in"><draw:image xlink:href="Pictures/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2" office:name=""><text:span text:style-name="Definition">Measure</text:span></text:a></text:p>
          </table:table-cell>
          <table:table-cell table:style-name="TableRowCell" office:value-type="string">
            <text:p text:style-name="Table_20_Contents">Show measu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<text:span text:style-name="T1">ABShowWpButt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0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1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" svg:width="0.41667in" svg:height="0.4166666666666667in"><draw:image xlink:href="Pictures/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9" office:name=""><text:span text:style-name="Definition">Wp</text:span></text:a></text:p>
          </table:table-cell>
          <table:table-cell table:style-name="TableRowCell" office:value-type="string">
            <text:p text:style-name="Table_20_Contents">Show wp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1" office:name=""><text:span text:style-name="Definition">ABShowWpButtons</text:span></text:a></text:p>
          </table:table-cell>
          <table:table-cell table:style-name="TableRowCell" office:value-type="string">
            <text:p text:style-name="Table_20_Contents"><text:a xlink:type="simple" xlink:href="../../viewer/gui/NavPage.tsx#L97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" office:name=""><text:span text:style-name="Definition"><text:span text:style-name="T1">AddonConfigAddOn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1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3" svg:width="0.41667in" svg:height="0.4166666666666667in"><draw:image xlink:href="Pictures/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" office:name=""><text:span text:style-name="Definition">Config</text:span></text:a></text:p>
          </table:table-cell>
          <table:table-cell table:style-name="TableRowCell" office:value-type="string">
            <text:p text:style-name="Table_20_Contents">Configure user ap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" office:name=""><text:span text:style-name="Definition"><text:span text:style-name="T1">AddonConfigImage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7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4" svg:width="0.41667in" svg:height="0.4166666666666667in"><draw:image xlink:href="Pictures/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" office:name=""><text:span text:style-name="Definition">Images</text:span></text:a></text:p>
          </table:table-cell>
          <table:table-cell table:style-name="TableRowCell" office:value-type="string">
            <text:p text:style-name="Table_20_Contents">Edit image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" office:name=""><text:span text:style-name="Definition"><text:span text:style-name="T1">AddonConfigPlus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40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5" svg:width="0.41667in" svg:height="0.4166666666666667in"><draw:image xlink:href="Pictures/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" office:name=""><text:span text:style-name="Definition">Add</text:span></text:a></text:p>
          </table:table-cell>
          <table:table-cell table:style-name="TableRowCell" office:value-type="string">
            <text:p text:style-name="Table_20_Contents">Add user ap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" office:name=""><text:span text:style-name="Definition"><text:span text:style-name="T1">AddonConfigU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OnConfigPageButtons.ts#L34" office:name=""><text:span text:style-name="Definition">gui/AddOnConfigPageButtons.ts</text:span></text:a></text:p>
          </table:table-cell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6" svg:width="0.41667in" svg:height="0.4166666666666667in"><draw:image xlink:href="Pictures/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" office:name=""><text:span text:style-name="Definition">User</text:span></text:a></text:p>
          </table:table-cell>
          <table:table-cell table:style-name="TableRowCell" office:value-type="string">
            <text:p text:style-name="Table_20_Contents">Edit user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2" office:name=""><text:span text:style-name="Definition"><text:span text:style-name="T1">AisInfo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56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7" svg:width="0.41667in" svg:height="0.4166666666666667in"><draw:image xlink:href="Pictures/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7" office:name=""><text:span text:style-name="Definition">Hide</text:span></text:a></text:p>
          </table:table-cell>
          <table:table-cell table:style-name="TableRowCell" office:value-type="string">
            <text:p text:style-name="Table_20_Contents">Hide target info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8" office:name=""><text:span text:style-name="Definition"><text:span text:style-name="T1">AisInfoLoc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42" office:name=""><text:span text:style-name="Definition">components/AisInfoDisplay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8" svg:width="0.41667in" svg:height="0.4166666666666667in"><draw:image xlink:href="Pictures/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4" office:name=""><text:span text:style-name="Definition">Locate</text:span></text:a></text:p>
          </table:table-cell>
          <table:table-cell table:style-name="TableRowCell" office:value-type="string">
            <text:p text:style-name="Table_20_Contents">Center to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<text:span text:style-name="T1">Ai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3" office:name=""><text:span text:style-name="Definition">gui/AisCfg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9" svg:width="0.41667in" svg:height="0.4166666666666667in"><draw:image xlink:href="Pictures/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81" office:name=""><text:span text:style-name="Definition">Targets</text:span></text:a></text:p>
          </table:table-cell>
          <table:table-cell table:style-name="TableRowCell" office:value-type="string">
            <text:p text:style-name="Table_20_Contents">Lis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4" office:name=""><text:span text:style-name="Definition">AisItems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75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6" office:name=""><text:span text:style-name="Definition"><text:span text:style-name="T1">AisLock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9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10" svg:width="0.41667in" svg:height="0.4166666666666667in"><draw:image xlink:href="Pictures/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5" office:name=""><text:span text:style-name="Definition">Pause</text:span></text:a></text:p>
          </table:table-cell>
          <table:table-cell table:style-name="TableRowCell" office:value-type="string">
            <text:p text:style-name="Table_20_Contents">Pause lsiting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<text:span text:style-name="T1">AisNeares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0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11" svg:width="0.41667in" svg:height="0.4166666666666667in"><draw:image xlink:href="Pictures/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9" office:name=""><text:span text:style-name="Definition">Nearest</text:span></text:a></text:p>
          </table:table-cell>
          <table:table-cell table:style-name="TableRowCell" office:value-type="string">
            <text:p text:style-name="Table_20_Contents">Show nearest targe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8" office:name=""><text:span text:style-name="Definition">AisNearest</text:span></text:a></text:p>
          </table:table-cell>
          <table:table-cell table:style-name="TableRowCell" office:value-type="string">
            <text:p text:style-name="Table_20_Contents"><text:a xlink:type="simple" xlink:href="../../viewer/components/AisInfoDisplay.tsx#L233" office:name=""><text:span text:style-name="Definition">components/AisInfoDisplay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20" office:name=""><text:span text:style-name="Definition"><text:span text:style-name="T1">AisSearch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45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12" svg:width="0.41667in" svg:height="0.4166666666666667in"><draw:image xlink:href="Pictures/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8" office:name=""><text:span text:style-name="Definition">Search</text:span></text:a></text:p>
          </table:table-cell>
          <table:table-cell table:style-name="TableRowCell" office:value-type="string">
            <text:p text:style-name="Table_20_Contents">Search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12" office:name=""><text:span text:style-name="Definition"><text:span text:style-name="T1">AisSort</text:span></text:span></text:a></text:p>
          </table:table-cell>
          <table:table-cell table:style-name="TableRowCell" office:value-type="string">
            <text:p text:style-name="Table_20_Contents"><text:a xlink:type="simple" xlink:href="../../viewer/gui/AisPageButtons.ts#L34" office:name=""><text:span text:style-name="Definition">gui/AisPageButtons.ts</text:span></text:a></text:p>
          </table:table-cell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13" svg:width="0.41667in" svg:height="0.4166666666666667in"><draw:image xlink:href="Pictures/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72" office:name=""><text:span text:style-name="Definition">Sort</text:span></text:a></text:p>
          </table:table-cell>
          <table:table-cell table:style-name="TableRowCell" office:value-type="string">
            <text:p text:style-name="Table_20_Contents">Sort AIS tar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7" office:name=""><text:span text:style-name="Definition"><text:span text:style-name="T1">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81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4" svg:width="0.41667in" svg:height="0.4166666666666667in"><draw:image xlink:href="Pictures/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5" office:name=""><text:span text:style-name="Definition">Anchor</text:span></text:a></text:p>
          </table:table-cell>
          <table:table-cell table:style-name="TableRowCell" office:value-type="string">
            <text:p text:style-name="Table_20_Contents">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9" office:name=""><text:span text:style-name="Definition"><text:span text:style-name="T1">Android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5" svg:width="0.41667in" svg:height="0.4166666666666667in"><draw:image xlink:href="Pictures/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1" office:name=""><text:span text:style-name="Definition">Browser</text:span></text:a></text:p>
          </table:table-cell>
          <table:table-cell table:style-name="TableRowCell" office:value-type="string">
            <text:p text:style-name="Table_20_Contents">Start external brows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" office:name=""><text:span text:style-name="Definition"><text:span text:style-name="T1">Back</text:span></text:span></text:a></text:p>
          </table:table-cell>
          <table:table-cell table:style-name="TableRowCell" office:value-type="string">
            <text:p text:style-name="Table_20_Contents"><text:a xlink:type="simple" xlink:href="../../viewer/gui/AddOnPageButtons.ts#L30" office:name=""><text:span text:style-name="Definition">gui/AddOnPageButtons.ts</text:span></text:a>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" svg:width="0.41667in" svg:height="0.4166666666666667in"><draw:image xlink:href="Pictures/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" office:name=""><text:span text:style-name="Definition">Back</text:span></text:a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<text:span text:style-name="T1">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5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7" svg:width="0.41667in" svg:height="0.4166666666666667in"><draw:image xlink:href="Pictures/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" office:name=""><text:span text:style-name="Definition">Close</text:span></text:a></text:p>
          </table:table-cell>
          <table:table-cell table:style-name="TableRowCell" office:value-type="string">
            <text:p text:style-name="Table_20_Contents">Close pa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97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7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44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35" office:name=""><text:span text:style-name="Definition">gui/General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UploadHandler.tsx#L313" office:name=""><text:span text:style-name="Definition">components/UploadHandler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" office:name=""><text:span text:style-name="Definition">Cancel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15" office:name=""><text:span text:style-name="Definition">components/AnchorWatch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33" office:name=""><text:span text:style-name="Definition"><text:span text:style-name="T1">CenterAction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88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18" svg:width="0.41667in" svg:height="0.4166666666666667in"><draw:image xlink:href="Pictures/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2" office:name=""><text:span text:style-name="Definition">Info</text:span></text:a></text:p>
          </table:table-cell>
          <table:table-cell table:style-name="TableRowCell" office:value-type="string">
            <text:p text:style-name="Table_20_Contents">Info at Crosshai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2" office:name=""><text:span text:style-name="Definition"><text:span text:style-name="T1">Cha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7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9" svg:width="0.41667in" svg:height="0.4166666666666667in"><draw:image xlink:href="Pictures/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5" office:name=""><text:span text:style-name="Definition">Charts</text:span></text:a></text:p>
          </table:table-cell>
          <table:table-cell table:style-name="TableRowCell" office:value-type="string">
            <text:p text:style-name="Table_20_Contents">Select &amp; upload char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0" office:name=""><text:span text:style-name="Definition"><text:span text:style-name="T1">Connected</text:span></text:span></text:a></text:p>
          </table:table-cell>
          <table:table-cell table:style-name="TableRowCell" office:value-type="string">
            <text:p text:style-name="Table_20_Contents"><text:a xlink:type="simple" xlink:href="../../viewer/gui/GeneralButtons.ts#L41" office:name=""><text:span text:style-name="Definition">gui/GeneralButtons.ts</text:span></text:a></text:p>
          </table:table-cell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0" svg:width="0.41667in" svg:height="0.4166666666666667in"><draw:image xlink:href="Pictures/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9" office:name=""><text:span text:style-name="Definition">Connect</text:span></text:a></text:p>
          </table:table-cell>
          <table:table-cell table:style-name="TableRowCell" office:value-type="string">
            <text:p text:style-name="Table_20_Contents">Connect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<text:span text:style-name="T1">CourseU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6" office:name=""><text:span text:style-name="Definition">gui/NavPage.tsx</text:span></text:a></text:p>
          </table:table-cell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1" svg:width="0.41667in" svg:height="0.4166666666666667in"><draw:image xlink:href="Pictures/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7" office:name=""><text:span text:style-name="Definition">Course</text:span></text:a></text:p>
          </table:table-cell>
          <table:table-cell table:style-name="TableRowCell" office:value-type="string">
            <text:p text:style-name="Table_20_Contents">Course up / north u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5" office:name=""><text:span text:style-name="Definition">CourseU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8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7" office:name=""><text:span text:style-name="Definition"><text:span text:style-name="T1">CreateFi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277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2" svg:width="0.41667in" svg:height="0.4166666666666667in"><draw:image xlink:href="Pictures/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9" office:name=""><text:span text:style-name="Definition">New</text:span></text:a></text:p>
          </table:table-cell>
          <table:table-cell table:style-name="TableRowCell" office:value-type="string">
            <text:p text:style-name="Table_20_Contents">Create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5" office:name=""><text:span text:style-name="Definition"><text:span text:style-name="T1">DBAccep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1" office:name=""><text:span text:style-name="Definition">components/Eula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3" svg:width="0.41667in" svg:height="0.4166666666666667in"><draw:image xlink:href="Pictures/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5" office:name=""><text:span text:style-name="Definition">Accep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<text:span text:style-name="T1">DBActiv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41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4" svg:width="0.41667in" svg:height="0.4166666666666667in"><draw:image xlink:href="Pictures/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7" office:name=""><text:span text:style-name="Definition">Activ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5" office:name=""><text:span text:style-name="Definition">DBActiva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619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4" office:name=""><text:span text:style-name="Definition"><text:span text:style-name="T1">DB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251" office:name=""><text:span text:style-name="Definition">gui/NavPage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5" svg:width="0.41667in" svg:height="0.4166666666666667in"><draw:image xlink:href="Pictures/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8" office:name=""><text:span text:style-name="Definition">Ad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8" office:name=""><text:span text:style-name="Definition"><text:span text:style-name="T1">DBAddSu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ombinedWidget.jsx#L107" office:name=""><text:span text:style-name="Definition">components/CombinedWidget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6" svg:width="0.41667in" svg:height="0.4166666666666667in"><draw:image xlink:href="Pictures/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4" office:name=""><text:span text:style-name="Definition">+Sub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2" office:name=""><text:span text:style-name="Definition"><text:span text:style-name="T1">DB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0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7" svg:width="0.41667in" svg:height="0.4166666666666667in"><draw:image xlink:href="Pictures/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5" office:name=""><text:span text:style-name="Definition">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4" office:name=""><text:span text:style-name="Definition"><text:span text:style-name="T1">DBAnchor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3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8" svg:width="0.41667in" svg:height="0.4166666666666667in"><draw:image xlink:href="Pictures/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3" office:name=""><text:span text:style-name="Definition">Boat</text:span></text:a></text:p>
          </table:table-cell>
          <table:table-cell table:style-name="TableRowCell" office:value-type="string">
            <text:p text:style-name="Table_20_Contents">at boat po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68" office:name=""><text:span text:style-name="Definition"><text:span text:style-name="T1">DBAnchorCen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97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9" svg:width="0.41667in" svg:height="0.4166666666666667in"><draw:image xlink:href="Pictures/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36" office:name=""><text:span text:style-name="Definition">Center</text:span></text:a></text:p>
          </table:table-cell>
          <table:table-cell table:style-name="TableRowCell" office:value-type="string">
            <text:p text:style-name="Table_20_Contents">at map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7" office:name=""><text:span text:style-name="Definition"><text:span text:style-name="T1">DBAuto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78" office:name=""><text:span text:style-name="Definition">components/LogDialog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" svg:width="0.41667in" svg:height="0.4166666666666667in"><draw:image xlink:href="Pictures/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9" office:name=""><text:span text:style-name="Definition">Aut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8" office:name=""><text:span text:style-name="Definition"><text:span text:style-name="T1">DB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89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31" svg:width="0.41667in" svg:height="0.4166666666666667in"><draw:image xlink:href="Pictures/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2" office:name=""><text:span text:style-name="Definition">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<text:span text:style-name="T1">DBCancel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32" svg:width="0.41667in" svg:height="0.4166666666666667in"><draw:image xlink:href="Pictures/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0" office:name=""><text:span text:style-name="Definition">Cance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gui/NavPage.tsx#L26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0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42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29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6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4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9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ulaDialog.jsx#L30" office:name=""><text:span text:style-name="Definition">components/Eula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0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6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138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5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1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3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8" office:name=""><text:span text:style-name="Definition">components/RemoteChannel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2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9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25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6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9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0" office:name=""><text:span text:style-name="Definition">DBCancel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7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8" office:name=""><text:span text:style-name="Definition"><text:span text:style-name="T1">DB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72" office:name=""><text:span text:style-name="Definition">gui/NavPage.t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" svg:width="0.41667in" svg:height="0.4166666666666667in"><draw:image xlink:href="Pictures/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7" office:name=""><text:span text:style-name="Definition">Cen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6" office:name=""><text:span text:style-name="Definition"><text:span text:style-name="T1">DBCleanTrack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20" office:name=""><text:span text:style-name="Definition">gui/NavPage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4" svg:width="0.41667in" svg:height="0.4166666666666667in"><draw:image xlink:href="Pictures/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0" office:name=""><text:span text:style-name="Definition">Clean trac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<text:span text:style-name="T1">DBClea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87" office:name=""><text:span text:style-name="Definition">components/BasicDialogs.t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5" svg:width="0.41667in" svg:height="0.4166666666666667in"><draw:image xlink:href="Pictures/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9" office:name=""><text:span text:style-name="Definition">Clea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7" office:name=""><text:span text:style-name="Definition">DBClear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23" office:name=""><text:span text:style-name="Definition">components/ItemNam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6" office:name=""><text:span text:style-name="Definition"><text:span text:style-name="T1">DBCompu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46" office:name=""><text:span text:style-name="Definition">components/TrackConvertDialog.jsx</text:span></text:a></text:p>
          </table:table-cell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9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6" svg:width="0.41667in" svg:height="0.4166666666666667in"><draw:image xlink:href="Pictures/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1" office:name=""><text:span text:style-name="Definition">Comp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1" office:name=""><text:span text:style-name="Definition"><text:span text:style-name="T1">DBConfi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6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37" svg:width="0.41667in" svg:height="0.4166666666666667in"><draw:image xlink:href="Pictures/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4" office:name=""><text:span text:style-name="Definition">Confi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6" office:name=""><text:span text:style-name="Definition"><text:span text:style-name="T1">DB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53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38" svg:width="0.41667in" svg:height="0.4166666666666667in"><draw:image xlink:href="Pictures/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7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3" office:name=""><text:span text:style-name="Definition"><text:span text:style-name="T1">DBCop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9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9" svg:width="0.41667in" svg:height="0.4166666666666667in"><draw:image xlink:href="Pictures/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5" office:name=""><text:span text:style-name="Definition">Cop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<text:span text:style-name="T1">DB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87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0" svg:width="0.41667in" svg:height="0.4166666666666667in"><draw:image xlink:href="Pictures/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9" office:name=""><text:span text:style-name="Definition">Dele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73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53" office:name=""><text:span text:style-name="Definition">components/Importer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55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2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422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2" office:name=""><text:span text:style-name="Definition">DBDelete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6" office:name=""><text:span text:style-name="Definition">components/EditWidge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6" office:name=""><text:span text:style-name="Definition"><text:span text:style-name="T1">DBDisabl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6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41" svg:width="0.41667in" svg:height="0.4166666666666667in"><draw:image xlink:href="Pictures/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2" office:name=""><text:span text:style-name="Definition"><text:span text:style-name="T1">DBDiscar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1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42" svg:width="0.41667in" svg:height="0.4166666666666667in"><draw:image xlink:href="Pictures/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6" office:name=""><text:span text:style-name="Definition">Discard change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72" office:name=""><text:span text:style-name="Definition"><text:span text:style-name="T1">DB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48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43" svg:width="0.41667in" svg:height="0.4166666666666667in"><draw:image xlink:href="Pictures/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3" office:name=""><text:span text:style-name="Definition">Dis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<text:span text:style-name="T1">DBDown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50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44" svg:width="0.41667in" svg:height="0.4166666666666667in"><draw:image xlink:href="Pictures/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3" office:name=""><text:span text:style-name="Definition">Down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4" office:name=""><text:span text:style-name="Definition">DBDown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Button.tsx#L107" office:name=""><text:span text:style-name="Definition">components/DownloadButton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8" office:name=""><text:span text:style-name="Definition"><text:span text:style-name="T1">DBEditCs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45" svg:width="0.41667in" svg:height="0.4166666666666667in"><draw:image xlink:href="Pictures/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93" office:name=""><text:span text:style-name="Definition">Edit CS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1" office:name=""><text:span text:style-name="Definition"><text:span text:style-name="T1">DBEditLayou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533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46" svg:width="0.41667in" svg:height="0.4166666666666667in"><draw:image xlink:href="Pictures/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07" office:name=""><text:span text:style-name="Definition">Edi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81" office:name=""><text:span text:style-name="Definition">DBEditLayou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55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<text:span text:style-name="T1">DBEdi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93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7" svg:width="0.41667in" svg:height="0.4166666666666667in"><draw:image xlink:href="Pictures/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32" office:name=""><text:span text:style-name="Definition">DBEdit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81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3" office:name=""><text:span text:style-name="Definition"><text:span text:style-name="T1">DBEmpty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8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16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48" svg:width="0.41667in" svg:height="0.4166666666666667in"><draw:image xlink:href="Pictures/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4" office:name=""><text:span text:style-name="Definition">Empty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24" office:name=""><text:span text:style-name="Definition"><text:span text:style-name="T1">DBFeature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532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49" svg:width="0.41667in" svg:height="0.4166666666666667in"><draw:image xlink:href="Pictures/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4" office:name=""><text:span text:style-name="Definition">New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4" office:name=""><text:span text:style-name="Definition"><text:span text:style-name="T1">DBHid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46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12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50" svg:width="0.41667in" svg:height="0.4166666666666667in"><draw:image xlink:href="Pictures/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6" office:name=""><text:span text:style-name="Definition">Hid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5" office:name=""><text:span text:style-name="Definition"><text:span text:style-name="T1">DBHide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1" svg:width="0.41667in" svg:height="0.4166666666666667in"><draw:image xlink:href="Pictures/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0" office:name=""><text:span text:style-name="Definition">Hide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6" office:name=""><text:span text:style-name="Definition"><text:span text:style-name="T1">DBHide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90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52" svg:width="0.41667in" svg:height="0.4166666666666667in"><draw:image xlink:href="Pictures/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3" office:name=""><text:span text:style-name="Definition">Hide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<text:span text:style-name="T1">DBIgn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716" office:name=""><text:span text:style-name="Definition">components/Settin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../../viewer/style/button_text.less#L380" office:name=""><text:span text:style-name="Definition">Ignore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0" office:name=""><text:span text:style-name="Definition">DBIgnore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7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0" office:name=""><text:span text:style-name="Definition"><text:span text:style-name="T1">DBInfo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364" office:name=""><text:span text:style-name="Definition">components/FeatureInfoDialog.jsx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53" svg:width="0.41667in" svg:height="0.4166666666666667in"><draw:image xlink:href="Pictures/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3" office:name=""><text:span text:style-name="Definition">Info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26" office:name=""><text:span text:style-name="Definition"><text:span text:style-name="T1">DBInse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19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4" svg:width="0.41667in" svg:height="0.4166666666666667in"><draw:image xlink:href="Pictures/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68" office:name=""><text:span text:style-name="Definition">Ins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03" office:name=""><text:span text:style-name="Definition"><text:span text:style-name="T1">DBInsertAft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1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55" svg:width="0.41667in" svg:height="0.4166666666666667in"><draw:image xlink:href="Pictures/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4" office:name=""><text:span text:style-name="Definition">Insert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9" office:name=""><text:span text:style-name="Definition"><text:span text:style-name="T1">DBInsertBef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0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56" svg:width="0.41667in" svg:height="0.4166666666666667in"><draw:image xlink:href="Pictures/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1" office:name=""><text:span text:style-name="Definition">Insert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2" office:name=""><text:span text:style-name="Definition"><text:span text:style-name="T1">DBInsertRoute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8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7" svg:width="0.41667in" svg:height="0.4166666666666667in"><draw:image xlink:href="Pictures/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2" office:name=""><text:span text:style-name="Definition">Route aft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8" office:name=""><text:span text:style-name="Definition"><text:span text:style-name="T1">DBInsertRouteBefor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7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58" svg:width="0.41667in" svg:height="0.4166666666666667in"><draw:image xlink:href="Pictures/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49" office:name=""><text:span text:style-name="Definition">Route befor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27" office:name=""><text:span text:style-name="Definition"><text:span text:style-name="T1">DBInve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9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59" svg:width="0.41667in" svg:height="0.4166666666666667in"><draw:image xlink:href="Pictures/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7" office:name=""><text:span text:style-name="Definition">Inve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9" office:name=""><text:span text:style-name="Definition"><text:span text:style-name="T1">DBLoad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4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60" svg:width="0.41667in" svg:height="0.4166666666666667in"><draw:image xlink:href="Pictures/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6" office:name=""><text:span text:style-name="Definition">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<text:span text:style-name="T1">DBLo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224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61" svg:width="0.41667in" svg:height="0.4166666666666667in"><draw:image xlink:href="Pictures/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5" office:name=""><text:span text:style-name="Definition">Log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8" office:name=""><text:span text:style-name="Definition">DBLog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00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<text:span text:style-name="T1">DBN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8" office:name=""><text:span text:style-name="Definition">components/UserAppDialog.t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2" svg:width="0.41667in" svg:height="0.4166666666666667in"><draw:image xlink:href="Pictures/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2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8" office:name=""><text:span text:style-name="Definition">DBNew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88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5" office:name=""><text:span text:style-name="Definition"><text:span text:style-name="T1">DBNew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3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63" svg:width="0.41667in" svg:height="0.4166666666666667in"><draw:image xlink:href="Pictures/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3" office:name=""><text:span text:style-name="Definition">N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<text:span text:style-name="T1">DBOk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2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64" svg:width="0.41667in" svg:height="0.4166666666666667in"><draw:image xlink:href="Pictures/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7" office:name=""><text:span text:style-name="Definition">Ok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HandlerDialog.jsx#L181" office:name=""><text:span text:style-name="Definition">components/EditHandle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OverlayDialog.tsx#L369" office:name=""><text:span text:style-name="Definition">components/Overlay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277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ImportDialog.jsx#L81" office:name=""><text:span text:style-name="Definition">components/Impo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20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6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36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52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63" office:name=""><text:span text:style-name="Definition">components/LayoutFinished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90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6" office:name=""><text:span text:style-name="Definition">DBOk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178" office:name=""><text:span text:style-name="Definition">components/EditPage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1" office:name=""><text:span text:style-name="Definition"><text:span text:style-name="T1">DBOpenCh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56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65" svg:width="0.41667in" svg:height="0.4166666666666667in"><draw:image xlink:href="Pictures/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5" office:name=""><text:span text:style-name="Definition">Open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<text:span text:style-name="T1">DB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9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66" svg:width="0.41667in" svg:height="0.4166666666666667in"><draw:image xlink:href="Pictures/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21" office:name=""><text:span text:style-name="Definition">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9" office:name=""><text:span text:style-name="Definition">DBOverlays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93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13" office:name=""><text:span text:style-name="Definition"><text:span text:style-name="T1">DBPre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79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67" svg:width="0.41667in" svg:height="0.4166666666666667in"><draw:image xlink:href="Pictures/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58" office:name=""><text:span text:style-name="Definition">Pre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53" office:name=""><text:span text:style-name="Definition"><text:span text:style-name="T1">DBPropos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temNameDialog.jsx#L138" office:name=""><text:span text:style-name="Definition">components/ItemNameDialog.jsx</text:span></text:a></text:p>
          </table:table-cell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31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68" svg:width="0.41667in" svg:height="0.4166666666666667in"><draw:image xlink:href="Pictures/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9" office:name=""><text:span text:style-name="Definition">Propose</text:span></text:a></text:p>
          </table:table-cell>
          <table:table-cell table:style-name="TableRowCell" office:value-type="string">
            <text:p text:style-name="Table_20_Contents">Propose new nam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<text:span text:style-name="T1">DBReloa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315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69" svg:width="0.41667in" svg:height="0.4166666666666667in"><draw:image xlink:href="Pictures/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07" office:name=""><text:span text:style-name="Definition">Reload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LogDialog.tsx#L93" office:name=""><text:span text:style-name="Definition">components/Log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12" office:name=""><text:span text:style-name="Definition">DBReload</text:span></text:a></text:p>
          </table:table-cell>
          <table:table-cell table:style-name="TableRowCell" office:value-type="string">
            <text:p text:style-name="Table_20_Contents"><text:a xlink:type="simple" xlink:href="../../viewer/components/ErrorListDialog.jsx#L39" office:name=""><text:span text:style-name="Definition">components/ErrorLis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<text:span text:style-name="T1">DBRenam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5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70" svg:width="0.41667in" svg:height="0.4166666666666667in"><draw:image xlink:href="Pictures/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6" office:name=""><text:span text:style-name="Definition">Rena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88" office:name=""><text:span text:style-name="Definition">DBRenam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571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31" office:name=""><text:span text:style-name="Definition"><text:span text:style-name="T1">DBRenumberRou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20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71" svg:width="0.41667in" svg:height="0.4166666666666667in"><draw:image xlink:href="Pictures/7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0" office:name=""><text:span text:style-name="Definition">Renumber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<text:span text:style-name="T1">DBRese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70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72" svg:width="0.41667in" svg:height="0.4166666666666667in"><draw:image xlink:href="Pictures/7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6" office:name=""><text:span text:style-name="Definition">Rese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55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ColorDialog.jsx#L48" office:name=""><text:span text:style-name="Definition">components/Color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73" office:name=""><text:span text:style-name="Definition">DBReset</text:span></text:a></text:p>
          </table:table-cell>
          <table:table-cell table:style-name="TableRowCell" office:value-type="string">
            <text:p text:style-name="Table_20_Contents"><text:a xlink:type="simple" xlink:href="../../viewer/components/BasicDialogs.tsx#L102" office:name=""><text:span text:style-name="Definition">components/BasicDialog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4" office:name=""><text:span text:style-name="Definition"><text:span text:style-name="T1">DBRestar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98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73" svg:width="0.41667in" svg:height="0.4166666666666667in"><draw:image xlink:href="Pictures/7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82" office:name=""><text:span text:style-name="Definition">Restar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3" office:name=""><text:span text:style-name="Definition"><text:span text:style-name="T1">DBRoutePoint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6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74" svg:width="0.41667in" svg:height="0.4166666666666667in"><draw:image xlink:href="Pictures/7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29" office:name=""><text:span text:style-name="Definition">Point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<text:span text:style-name="T1">DBSav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90" office:name=""><text:span text:style-name="Definition">components/EditDialog.tsx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75" svg:width="0.41667in" svg:height="0.4166666666666667in"><draw:image xlink:href="Pictures/7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5" office:name=""><text:span text:style-name="Definition">Sa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656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00" office:name=""><text:span text:style-name="Definition">DBSave</text:span></text:a></text:p>
          </table:table-cell>
          <table:table-cell table:style-name="TableRowCell" office:value-type="string">
            <text:p text:style-name="Table_20_Contents"><text:a xlink:type="simple" xlink:href="../../viewer/components/TrackConvertDialog.jsx#L454" office:name=""><text:span text:style-name="Definition">components/TrackConver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96" office:name=""><text:span text:style-name="Definition"><text:span text:style-name="T1">DBSaveA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5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76" svg:width="0.41667in" svg:height="0.4166666666666667in"><draw:image xlink:href="Pictures/7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62" office:name=""><text:span text:style-name="Definition">Save a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95" office:name=""><text:span text:style-name="Definition"><text:span text:style-name="T1">DBSchem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967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42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77" svg:width="0.41667in" svg:height="0.4166666666666667in"><draw:image xlink:href="Pictures/7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18" office:name=""><text:span text:style-name="Definition">Schem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91" office:name=""><text:span text:style-name="Definition"><text:span text:style-name="T1">DBShowAll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27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8" svg:width="0.41667in" svg:height="0.4166666666666667in"><draw:image xlink:href="Pictures/7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7" office:name=""><text:span text:style-name="Definition">Show all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82" office:name=""><text:span text:style-name="Definition"><text:span text:style-name="T1">DBShowOverlays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383" office:name=""><text:span text:style-name="Definition">components/MapPage.tsx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79" svg:width="0.41667in" svg:height="0.4166666666666667in"><draw:image xlink:href="Pictures/7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40" office:name=""><text:span text:style-name="Definition">Show overlays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56" office:name=""><text:span text:style-name="Definition"><text:span text:style-name="T1">DBStart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60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80" svg:width="0.41667in" svg:height="0.4166666666666667in"><draw:image xlink:href="Pictures/7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55" office:name=""><text:span text:style-name="Definition">Start rou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40" office:name=""><text:span text:style-name="Definition"><text:span text:style-name="T1">DBSto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mporterView.tsx#L183" office:name=""><text:span text:style-name="Definition">components/ImporterView.tsx</text:span></text:a></text:p>
          </table:table-cell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306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81" svg:width="0.41667in" svg:height="0.4166666666666667in"><draw:image xlink:href="Pictures/8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9" office:name=""><text:span text:style-name="Definition">Sto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30" office:name=""><text:span text:style-name="Definition"><text:span text:style-name="T1">DBUpda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WidgetDialog.jsx#L201" office:name=""><text:span text:style-name="Definition">components/EditWidgetDialog.jsx</text:span></text:a></text:p>
          </table:table-cell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82" svg:width="0.41667in" svg:height="0.4166666666666667in"><draw:image xlink:href="Pictures/8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71" office:name=""><text:span text:style-name="Definition">Updat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19" office:name=""><text:span text:style-name="Definition"><text:span text:style-name="T1">DBUserAp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709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83" svg:width="0.41667in" svg:height="0.4166666666666667in"><draw:image xlink:href="Pictures/8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30" office:name=""><text:span text:style-name="Definition">User Ap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7" office:name=""><text:span text:style-name="Definition"><text:span text:style-name="T1">DB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35" office:name=""><text:span text:style-name="Definition">components/FileDialog.jsx</text:span></text:a></text:p>
          </table:table-cell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84" svg:width="0.41667in" svg:height="0.4166666666666667in"><draw:image xlink:href="Pictures/8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98" office:name=""><text:span text:style-name="Definition">View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9" office:name=""><text:span text:style-name="Definition"><text:span text:style-name="T1">DBWpaConnect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10" office:name=""><text:span text:style-name="Definition">gui/WpaPage.jsx</text:span></text:a></text:p>
          </table:table-cell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85" svg:width="0.41667in" svg:height="0.4166666666666667in"><draw:image xlink:href="Pictures/8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7" office:name=""><text:span text:style-name="Definition">Connect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5" office:name=""><text:span text:style-name="Definition"><text:span text:style-name="T1">DBWpaDis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103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86" svg:width="0.41667in" svg:height="0.4166666666666667in"><draw:image xlink:href="Pictures/8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410" office:name=""><text:span text:style-name="Definition">Dis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51" office:name=""><text:span text:style-name="Definition"><text:span text:style-name="T1">DBWpaEnabl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96" office:name=""><text:span text:style-name="Definition">gui/WpaPage.jsx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87" svg:width="0.41667in" svg:height="0.4166666666666667in"><draw:image xlink:href="Pictures/8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71" office:name=""><text:span text:style-name="Definition">Enabl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547" office:name=""><text:span text:style-name="Definition"><text:span text:style-name="T1">DBWpaRemove</text:span></text:span></text:a></text:p>
          </table:table-cell>
          <table:table-cell table:style-name="TableRowCell" office:value-type="string">
            <text:p text:style-name="Table_20_Contents"><text:a xlink:type="simple" xlink:href="../../viewer/gui/WpaPage.jsx#L89" office:name=""><text:span text:style-name="Definition">gui/WpaPage.jsx</text:span></text:a></text:p>
          </table:table-cell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8" svg:width="0.41667in" svg:height="0.4166666666666667in"><draw:image xlink:href="Pictures/8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83" office:name=""><text:span text:style-name="Definition">Remov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9" office:name=""><text:span text:style-name="Definition"><text:span text:style-name="T1">DefaultValu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109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89" svg:width="0.41667in" svg:height="0.4166666666666667in"><draw:image xlink:href="Pictures/8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3" office:name=""><text:span text:style-name="Definition">Default</text:span></text:a></text:p>
          </table:table-cell>
          <table:table-cell table:style-name="TableRowCell" office:value-type="string">
            <text:p text:style-name="Table_20_Contents">Default valu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8" office:name=""><text:span text:style-name="Definition"><text:span text:style-name="T1">Dim</text:span></text:span></text:a></text:p>
          </table:table-cell>
          <table:table-cell table:style-name="TableRowCell" office:value-type="string">
            <text:p text:style-name="Table_20_Contents"><text:a xlink:type="simple" xlink:href="../../viewer/util/dimhandler.ts#L164" office:name=""><text:span text:style-name="Definition">util/dimhandler.ts</text:span></text:a></text:p>
          </table:table-cell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90" svg:width="0.41667in" svg:height="0.4166666666666667in"><draw:image xlink:href="Pictures/8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5" office:name=""><text:span text:style-name="Definition">Dim</text:span></text:a></text:p>
          </table:table-cell>
          <table:table-cell table:style-name="TableRowCell" office:value-type="string">
            <text:p text:style-name="Table_20_Contents">Dim backligh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355" office:name=""><text:span text:style-name="Definition">components/EditOverlaysDialog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91" svg:width="0.41667in" svg:height="0.4166666666666667in"><draw:image xlink:href="Pictures/9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6" office:name=""><text:span text:style-name="Definition">Edit</text:span></text:a></text:p>
          </table:table-cell>
          <table:table-cell table:style-name="TableRowCell" office:value-type="string">
            <text:p text:style-name="Table_20_Contents">Edit item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EditOverlaysDialog.jsx#L738" office:name=""><text:span text:style-name="Definition">components/EditOverlays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684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39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63" office:name=""><text:span text:style-name="Definition">Edit</text:span></text:a></text:p>
          </table:table-cell>
          <table:table-cell table:style-name="TableRowCell" office:value-type="string">
            <text:p text:style-name="Table_20_Contents"><text:a xlink:type="simple" xlink:href="../../viewer/components/StatusItems.tsx#L48" office:name=""><text:span text:style-name="Definition">components/StatusItem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8" office:name=""><text:span text:style-name="Definition"><text:span text:style-name="T1">EditPag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PageDialog.tsx#L217" office:name=""><text:span text:style-name="Definition">components/EditPageDialog.tsx</text:span></text:a></text:p>
          </table:table-cell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92" svg:width="0.41667in" svg:height="0.4166666666666667in"><draw:image xlink:href="Pictures/9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6" office:name=""><text:span text:style-name="Definition">Config</text:span></text:a></text:p>
          </table:table-cell>
          <table:table-cell table:style-name="TableRowCell" office:value-type="string">
            <text:p text:style-name="Table_20_Contents">Page layout confi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1" office:name=""><text:span text:style-name="Definition"><text:span text:style-name="T1">FullScreen</text:span></text:span></text:a></text:p>
          </table:table-cell>
          <table:table-cell table:style-name="TableRowCell" office:value-type="string">
            <text:p text:style-name="Table_20_Contents"><text:a xlink:type="simple" xlink:href="../../viewer/util/Fullscreen.ts#L84" office:name=""><text:span text:style-name="Definition">util/Fullscreen.ts</text:span></text:a></text:p>
          </table:table-cell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93" svg:width="0.41667in" svg:height="0.4166666666666667in"><draw:image xlink:href="Pictures/9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" office:name=""><text:span text:style-name="Definition">Full</text:span></text:a></text:p>
          </table:table-cell>
          <table:table-cell table:style-name="TableRowCell" office:value-type="string">
            <text:p text:style-name="Table_20_Contents">Full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6" office:name=""><text:span text:style-name="Definition"><text:span text:style-name="T1">Gps1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4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94" svg:width="0.41667in" svg:height="0.4166666666666667in"><draw:image xlink:href="Pictures/9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8" office:name=""><text:span text:style-name="Definition">Dash 1</text:span></text:a></text:p>
          </table:table-cell>
          <table:table-cell table:style-name="TableRowCell" office:value-type="string">
            <text:p text:style-name="Table_20_Contents">Dashboard 1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2" office:name=""><text:span text:style-name="Definition"><text:span text:style-name="T1">Gps10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3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95" svg:width="0.41667in" svg:height="0.4166666666666667in"><draw:image xlink:href="Pictures/9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5" office:name=""><text:span text:style-name="Definition">Dash 10</text:span></text:a></text:p>
          </table:table-cell>
          <table:table-cell table:style-name="TableRowCell" office:value-type="string">
            <text:p text:style-name="Table_20_Contents">Dashboard 10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0" office:name=""><text:span text:style-name="Definition"><text:span text:style-name="T1">Gps2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5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96" svg:width="0.41667in" svg:height="0.4166666666666667in"><draw:image xlink:href="Pictures/9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1" office:name=""><text:span text:style-name="Definition">Dash 2</text:span></text:a></text:p>
          </table:table-cell>
          <table:table-cell table:style-name="TableRowCell" office:value-type="string">
            <text:p text:style-name="Table_20_Contents">Dashboard 2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4" office:name=""><text:span text:style-name="Definition"><text:span text:style-name="T1">Gps3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6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97" svg:width="0.41667in" svg:height="0.4166666666666667in"><draw:image xlink:href="Pictures/9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4" office:name=""><text:span text:style-name="Definition">Dash 3</text:span></text:a></text:p>
          </table:table-cell>
          <table:table-cell table:style-name="TableRowCell" office:value-type="string">
            <text:p text:style-name="Table_20_Contents">Dashboard 3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08" office:name=""><text:span text:style-name="Definition"><text:span text:style-name="T1">Gps4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7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98" svg:width="0.41667in" svg:height="0.4166666666666667in"><draw:image xlink:href="Pictures/9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17" office:name=""><text:span text:style-name="Definition">Dash 4</text:span></text:a></text:p>
          </table:table-cell>
          <table:table-cell table:style-name="TableRowCell" office:value-type="string">
            <text:p text:style-name="Table_20_Contents">Dashboard 4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2" office:name=""><text:span text:style-name="Definition"><text:span text:style-name="T1">Gps5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8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99" svg:width="0.41667in" svg:height="0.4166666666666667in"><draw:image xlink:href="Pictures/9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0" office:name=""><text:span text:style-name="Definition">Dash 5</text:span></text:a></text:p>
          </table:table-cell>
          <table:table-cell table:style-name="TableRowCell" office:value-type="string">
            <text:p text:style-name="Table_20_Contents">Dashboard 5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16" office:name=""><text:span text:style-name="Definition"><text:span text:style-name="T1">Gps6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39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100" svg:width="0.41667in" svg:height="0.4166666666666667in"><draw:image xlink:href="Pictures/9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3" office:name=""><text:span text:style-name="Definition">Dash 6</text:span></text:a></text:p>
          </table:table-cell>
          <table:table-cell table:style-name="TableRowCell" office:value-type="string">
            <text:p text:style-name="Table_20_Contents">Dashboard 6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0" office:name=""><text:span text:style-name="Definition"><text:span text:style-name="T1">Gps7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0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101" svg:width="0.41667in" svg:height="0.4166666666666667in"><draw:image xlink:href="Pictures/10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6" office:name=""><text:span text:style-name="Definition">Dash 7</text:span></text:a></text:p>
          </table:table-cell>
          <table:table-cell table:style-name="TableRowCell" office:value-type="string">
            <text:p text:style-name="Table_20_Contents">Dashboard 7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4" office:name=""><text:span text:style-name="Definition"><text:span text:style-name="T1">Gps8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1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102" svg:width="0.41667in" svg:height="0.4166666666666667in"><draw:image xlink:href="Pictures/10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29" office:name=""><text:span text:style-name="Definition">Dash 8</text:span></text:a></text:p>
          </table:table-cell>
          <table:table-cell table:style-name="TableRowCell" office:value-type="string">
            <text:p text:style-name="Table_20_Contents">Dashboard 8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28" office:name=""><text:span text:style-name="Definition"><text:span text:style-name="T1">Gps9</text:span></text:span></text:a></text:p>
          </table:table-cell>
          <table:table-cell table:style-name="TableRowCell" office:value-type="string">
            <text:p text:style-name="Table_20_Contents"><text:a xlink:type="simple" xlink:href="../../viewer/gui/GpsPageButtons.ts#L42" office:name=""><text:span text:style-name="Definition">gui/GpsPageButtons.ts</text:span></text:a></text:p>
          </table:table-cell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103" svg:width="0.41667in" svg:height="0.4166666666666667in"><draw:image xlink:href="Pictures/10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2" office:name=""><text:span text:style-name="Definition">Dash 9</text:span></text:a></text:p>
          </table:table-cell>
          <table:table-cell table:style-name="TableRowCell" office:value-type="string">
            <text:p text:style-name="Table_20_Contents">Dashboard 9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<text:span text:style-name="T1">Gps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1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04" svg:width="0.41667in" svg:height="0.4166666666666667in"><draw:image xlink:href="Pictures/10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3" office:name=""><text:span text:style-name="Definition">GPS</text:span></text:a></text:p>
          </table:table-cell>
          <table:table-cell table:style-name="TableRowCell" office:value-type="string">
            <text:p text:style-name="Table_20_Contents">Center chart to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3" office:name=""><text:span text:style-name="Definition">GpsCenter</text:span></text:a></text:p>
          </table:table-cell>
          <table:table-cell table:style-name="TableRowCell" office:value-type="string">
            <text:p text:style-name="Table_20_Contents"><text:a xlink:type="simple" xlink:href="../../viewer/gui/NavPage.tsx#L97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5" office:name=""><text:span text:style-name="Definition"><text:span text:style-name="T1">Help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EditableParameterUI.jsx#L70" office:name=""><text:span text:style-name="Definition">components/EditableParameterUI.jsx</text:span></text:a></text:p>
          </table:table-cell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105" svg:width="0.41667in" svg:height="0.4166666666666667in"><draw:image xlink:href="Pictures/10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30" office:name=""><text:span text:style-name="Definition">Help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46" office:name=""><text:span text:style-name="Definition"><text:span text:style-name="T1">Import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40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106" svg:width="0.41667in" svg:height="0.4166666666666667in"><draw:image xlink:href="Pictures/10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8" office:name=""><text:span text:style-name="Definition">Import</text:span></text:a></text:p>
          </table:table-cell>
          <table:table-cell table:style-name="TableRowCell" office:value-type="string">
            <text:p text:style-name="Table_20_Contents">Impor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34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.tsx#L86" office:name=""><text:span text:style-name="Definition">gui/LayoutsPage.t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7" svg:width="0.41667in" svg:height="0.4166666666666667in"><draw:image xlink:href="Pictures/10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3" office:name=""><text:span text:style-name="Definition">Layout</text:span></text:a></text:p>
          </table:table-cell>
          <table:table-cell table:style-name="TableRowCell" office:value-type="string">
            <text:p text:style-name="Table_20_Contents">Select / edit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2" office:name=""><text:span text:style-name="Definition"><text:span text:style-name="T1">LayoutFinish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LayoutFinishedDialog.jsx#L80" office:name=""><text:span text:style-name="Definition">components/LayoutFinishedDialog.jsx</text:span></text:a></text:p>
          </table:table-cell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08" svg:width="0.41667in" svg:height="0.4166666666666667in"><draw:image xlink:href="Pictures/10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19" office:name=""><text:span text:style-name="Definition">Finished</text:span></text:a></text:p>
          </table:table-cell>
          <table:table-cell table:style-name="TableRowCell" office:value-type="string">
            <text:p text:style-name="Table_20_Contents">Finish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<text:span text:style-name="T1">LockMarker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749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109" svg:width="0.41667in" svg:height="0.4166666666666667in"><draw:image xlink:href="Pictures/10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4" office:name=""><text:span text:style-name="Definition">Start</text:span></text:a></text:p>
          </table:table-cell>
          <table:table-cell table:style-name="TableRowCell" office:value-type="string">
            <text:p text:style-name="Table_20_Contents">Start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.tsx#L839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.tsx#L92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1" office:name=""><text:span text:style-name="Definition">LockMarker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5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<text:span text:style-name="T1">LockPo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00" office:name=""><text:span text:style-name="Definition">gui/NavPage.tsx</text:span></text:a></text:p>
          </table:table-cell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10" svg:width="0.41667in" svg:height="0.4166666666666667in"><draw:image xlink:href="Pictures/10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71" office:name=""><text:span text:style-name="Definition">Follow</text:span></text:a></text:p>
          </table:table-cell>
          <table:table-cell table:style-name="TableRowCell" office:value-type="string">
            <text:p text:style-name="Table_20_Contents">Chart follows G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5" office:name=""><text:span text:style-name="Definition">LockPo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8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" office:name=""><text:span text:style-name="Definition"><text:span text:style-name="T1">MOB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ob.ts#L59" office:name=""><text:span text:style-name="Definition">components/Mob.ts</text:span></text:a></text:p>
          </table:table-cell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111" svg:width="0.41667in" svg:height="0.4166666666666667in"><draw:image xlink:href="Pictures/11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" office:name=""><text:span text:style-name="Definition">MOB</text:span></text:a></text:p>
          </table:table-cell>
          <table:table-cell table:style-name="TableRowCell" office:value-type="string">
            <text:p text:style-name="Table_20_Contents">Person over boar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<text:span text:style-name="T1">MainExi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9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112" svg:width="0.41667in" svg:height="0.4166666666666667in"><draw:image xlink:href="Pictures/11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5" office:name=""><text:span text:style-name="Definition">Exit</text:span></text:a></text:p>
          </table:table-cell>
          <table:table-cell table:style-name="TableRowCell" office:value-type="string">
            <text:p text:style-name="Table_20_Contents">Exit AvNav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03" office:name=""><text:span text:style-name="Definition">MainExit</text:span></text:a></text:p>
          </table:table-cell>
          <table:table-cell table:style-name="TableRowCell" office:value-type="string">
            <text:p text:style-name="Table_20_Contents"><text:a xlink:type="simple" xlink:href="../../viewer/gui/WarningPage.tsx#L125" office:name=""><text:span text:style-name="Definition">gui/Warning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9" office:name=""><text:span text:style-name="Definition"><text:span text:style-name="T1">MainInfo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113" svg:width="0.41667in" svg:height="0.4166666666666667in"><draw:image xlink:href="Pictures/11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6" office:name=""><text:span text:style-name="Definition">Info</text:span></text:a></text:p>
          </table:table-cell>
          <table:table-cell table:style-name="TableRowCell" office:value-type="string">
            <text:p text:style-name="Table_20_Contents">App version &amp; licens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37" office:name=""><text:span text:style-name="Definition"><text:span text:style-name="T1">Main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426" office:name=""><text:span text:style-name="Definition">gui/MainNav.tsx</text:span></text:a></text:p>
          </table:table-cell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114" svg:width="0.41667in" svg:height="0.4166666666666667in"><draw:image xlink:href="Pictures/11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9" office:name=""><text:span text:style-name="Definition">Menu</text:span></text:a></text:p>
          </table:table-cell>
          <table:table-cell table:style-name="TableRowCell" office:value-type="string">
            <text:p text:style-name="Table_20_Contents">Main menu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55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5" svg:width="0.41667in" svg:height="0.4166666666666667in"><draw:image xlink:href="Pictures/11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5" office:name=""><text:span text:style-name="Definition">Start</text:span></text:a></text:p>
          </table:table-cell>
          <table:table-cell table:style-name="TableRowCell" office:value-type="string">
            <text:p text:style-name="Table_20_Contents">Start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79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<text:span text:style-name="T1">MeasureAdd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2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16" svg:width="0.41667in" svg:height="0.4166666666666667in"><draw:image xlink:href="Pictures/11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98" office:name=""><text:span text:style-name="Definition">Add</text:span></text:a></text:p>
          </table:table-cell>
          <table:table-cell table:style-name="TableRowCell" office:value-type="string">
            <text:p text:style-name="Table_20_Contents">Add measuremen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3" office:name=""><text:span text:style-name="Definition">MeasureAdd</text:span></text:a></text:p>
          </table:table-cell>
          <table:table-cell table:style-name="TableRowCell" office:value-type="string">
            <text:p text:style-name="Table_20_Contents"><text:a xlink:type="simple" xlink:href="../../viewer/gui/NavPage.tsx#L851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<text:span text:style-name="T1">MeasureOff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48" office:name=""><text:span text:style-name="Definition">gui/NavPage.tsx</text:span></text:a></text:p>
          </table:table-cell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9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117" svg:width="0.41667in" svg:height="0.4166666666666667in"><draw:image xlink:href="Pictures/11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1" office:name=""><text:span text:style-name="Definition">Off</text:span></text:a></text:p>
          </table:table-cell>
          <table:table-cell table:style-name="TableRowCell" office:value-type="string">
            <text:p text:style-name="Table_20_Contents">Measurement off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87" office:name=""><text:span text:style-name="Definition">MeasureOff</text:span></text:a></text:p>
          </table:table-cell>
          <table:table-cell table:style-name="TableRowCell" office:value-type="string">
            <text:p text:style-name="Table_20_Contents"><text:a xlink:type="simple" xlink:href="../../viewer/gui/NavPage.tsx#L860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<text:span text:style-name="T1">NavAction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9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118" svg:width="0.41667in" svg:height="0.4166666666666667in"><draw:image xlink:href="Pictures/11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6" office:name=""><text:span text:style-name="Definition">Actions</text:span></text:a></text:p>
          </table:table-cell>
          <table:table-cell table:style-name="TableRowCell" office:value-type="string">
            <text:p text:style-name="Table_20_Contents">Show nav acti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.tsx#L96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67" office:name=""><text:span text:style-name="Definition">NavActions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<text:span text:style-name="T1">NavAdd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79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19" svg:width="0.41667in" svg:height="0.4166666666666667in"><draw:image xlink:href="Pictures/11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9" office:name=""><text:span text:style-name="Definition">Before</text:span></text:a></text:p>
          </table:table-cell>
          <table:table-cell table:style-name="TableRowCell" office:value-type="string">
            <text:p text:style-name="Table_20_Contents">Add wp before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7" office:name=""><text:span text:style-name="Definition">NavAd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38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<text:span text:style-name="T1">NavAddAf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11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120" svg:width="0.41667in" svg:height="0.4166666666666667in"><draw:image xlink:href="Pictures/11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6" office:name=""><text:span text:style-name="Definition">After</text:span></text:a></text:p>
          </table:table-cell>
          <table:table-cell table:style-name="TableRowCell" office:value-type="string">
            <text:p text:style-name="Table_20_Contents">Add wp after selected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83" office:name=""><text:span text:style-name="Definition">NavAddAf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21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1" office:name=""><text:span text:style-name="Definition"><text:span text:style-name="T1">NavDele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5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121" svg:width="0.41667in" svg:height="0.4166666666666667in"><draw:image xlink:href="Pictures/12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2" office:name=""><text:span text:style-name="Definition">Delete</text:span></text:a></text:p>
          </table:table-cell>
          <table:table-cell table:style-name="TableRowCell" office:value-type="string">
            <text:p text:style-name="Table_20_Contents">Delete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<text:span text:style-name="T1">NavGoto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8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122" svg:width="0.41667in" svg:height="0.4166666666666667in"><draw:image xlink:href="Pictures/12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8" office:name=""><text:span text:style-name="Definition">Start</text:span></text:a></text:p>
          </table:table-cell>
          <table:table-cell table:style-name="TableRowCell" office:value-type="string">
            <text:p text:style-name="Table_20_Contents">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gui/NavPage.tsx#L31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0" office:name=""><text:span text:style-name="Definition">NavGoto</text:span></text:a></text:p>
          </table:table-cell>
          <table:table-cell table:style-name="TableRowCell" office:value-type="string">
            <text:p text:style-name="Table_20_Contents"><text:a xlink:type="simple" xlink:href="../../viewer/components/WaypointDialog.jsx#L117" office:name=""><text:span text:style-name="Definition">components/Waypoint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50" office:name=""><text:span text:style-name="Definition"><text:span text:style-name="T1">NavMapWidgets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884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123" svg:width="0.41667in" svg:height="0.4166666666666667in"><draw:image xlink:href="Pictures/12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5" office:name=""><text:span text:style-name="Definition">On Map</text:span></text:a></text:p>
          </table:table-cell>
          <table:table-cell table:style-name="TableRowCell" office:value-type="string">
            <text:p text:style-name="Table_20_Contents">Map widget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05" office:name=""><text:span text:style-name="Definition"><text:span text:style-name="T1">NavNex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53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124" svg:width="0.41667in" svg:height="0.4166666666666667in"><draw:image xlink:href="Pictures/12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1" office:name=""><text:span text:style-name="Definition">Skip</text:span></text:a></text:p>
          </table:table-cell>
          <table:table-cell table:style-name="TableRowCell" office:value-type="string">
            <text:p text:style-name="Table_20_Contents">Skip curren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0" office:name=""><text:span text:style-name="Definition"><text:span text:style-name="T1">Nav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28" office:name=""><text:span text:style-name="Definition">gui/NavPage.tsx</text:span></text:a></text:p>
          </table:table-cell>
          <table:table-cell table:style-name="TableRowCell" office:value-type="string">
            <text:p text:style-name="Table_20_Contents">NavRestar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avrestart.svg</text:span></text:a></text:p>
          </table:table-cell>
          <table:table-cell table:style-name="TableRowCell" office:value-type="string">
            <text:p text:style-name="Table_20_Contents"><draw:frame draw:name="img125" svg:width="0.41667in" svg:height="0.4166666666666667in"><draw:image xlink:href="Pictures/12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47" office:name=""><text:span text:style-name="Definition">Restart</text:span></text:a></text:p>
          </table:table-cell>
          <table:table-cell table:style-name="TableRowCell" office:value-type="string">
            <text:p text:style-name="Table_20_Contents">Restart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<text:span text:style-name="T1">NavSelectChar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0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26" svg:width="0.41667in" svg:height="0.4166666666666667in"><draw:image xlink:href="Pictures/12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7" office:name=""><text:span text:style-name="Definition">Charts</text:span></text:a></text:p>
          </table:table-cell>
          <table:table-cell table:style-name="TableRowCell" office:value-type="string">
            <text:p text:style-name="Table_20_Contents">Select charts &amp; overlay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.tsx#L96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37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1" office:name=""><text:span text:style-name="Definition">NavSelectChart</text:span></text:a></text:p>
          </table:table-cell>
          <table:table-cell table:style-name="TableRowCell" office:value-type="string">
            <text:p text:style-name="Table_20_Contents"><text:a xlink:type="simple" xlink:href="../../viewer/components/MapPage.tsx#L130" office:name=""><text:span text:style-name="Definition">components/Map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<text:span text:style-name="T1">NavToCenter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82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27" svg:width="0.41667in" svg:height="0.4166666666666667in"><draw:image xlink:href="Pictures/12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35" office:name=""><text:span text:style-name="Definition">Shift</text:span></text:a></text:p>
          </table:table-cell>
          <table:table-cell table:style-name="TableRowCell" office:value-type="string">
            <text:p text:style-name="Table_20_Contents">Shift wp to cen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95" office:name=""><text:span text:style-name="Definition">NavToCenter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69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3" office:name=""><text:span text:style-name="Definition"><text:span text:style-name="T1">Night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43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128" svg:width="0.41667in" svg:height="0.4166666666666667in"><draw:image xlink:href="Pictures/12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" office:name=""><text:span text:style-name="Definition">Night</text:span></text:a></text:p>
          </table:table-cell>
          <table:table-cell table:style-name="TableRowCell" office:value-type="string">
            <text:p text:style-name="Table_20_Contents">Night/Day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71" office:name=""><text:span text:style-name="Definition"><text:span text:style-name="T1">Overflo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ButtonList.tsx#L167" office:name=""><text:span text:style-name="Definition">components/ButtonList.tsx</text:span></text:a></text:p>
          </table:table-cell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129" svg:width="0.41667in" svg:height="0.4166666666666667in"><draw:image xlink:href="Pictures/12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42" office:name=""><text:span text:style-name="Definition">More</text:span></text:a></text:p>
          </table:table-cell>
          <table:table-cell table:style-name="TableRowCell" office:value-type="string">
            <text:p text:style-name="Table_20_Contents">More button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0" office:name=""><text:span text:style-name="Definition"><text:span text:style-name="T1">OverlaysView</text:span>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4" office:name=""><text:span text:style-name="Definition">gui/ChartsPageButtons.ts</text:span></text:a></text:p>
          </table:table-cell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30" svg:width="0.41667in" svg:height="0.4166666666666667in"><draw:image xlink:href="Pictures/12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1" office:name=""><text:span text:style-name="Definition">Overlays</text:span></text:a></text:p>
          </table:table-cell>
          <table:table-cell table:style-name="TableRowCell" office:value-type="string">
            <text:p text:style-name="Table_20_Contents">Edit overlay fil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9" office:name=""><text:span text:style-name="Definition"><text:span text:style-name="T1">ReloadUI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65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31" svg:width="0.41667in" svg:height="0.4166666666666667in"><draw:image xlink:href="Pictures/13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" office:name=""><text:span text:style-name="Definition">Reload</text:span></text:a></text:p>
          </table:table-cell>
          <table:table-cell table:style-name="TableRowCell" office:value-type="string">
            <text:p text:style-name="Table_20_Contents">Reload U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87" office:name=""><text:span text:style-name="Definition"><text:span text:style-name="T1">RemoteChannel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RemoteChannelDialog.tsx#L95" office:name=""><text:span text:style-name="Definition">components/RemoteChannelDialog.tsx</text:span></text:a></text:p>
          </table:table-cell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132" svg:width="0.41667in" svg:height="0.4166666666666667in"><draw:image xlink:href="Pictures/13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3" office:name=""><text:span text:style-name="Definition">Remote</text:span></text:a></text:p>
          </table:table-cell>
          <table:table-cell table:style-name="TableRowCell" office:value-type="string">
            <text:p text:style-name="Table_20_Contents">Remote control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46" office:name=""><text:span text:style-name="Definition"><text:span text:style-name="T1">Revert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layouthandler.ts#L1133" office:name=""><text:span text:style-name="Definition">util/layouthandler.ts</text:span></text:a></text:p>
          </table:table-cell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133" svg:width="0.41667in" svg:height="0.4166666666666667in"><draw:image xlink:href="Pictures/13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22" office:name=""><text:span text:style-name="Definition">Undo</text:span></text:a></text:p>
          </table:table-cell>
          <table:table-cell table:style-name="TableRowCell" office:value-type="string">
            <text:p text:style-name="Table_20_Contents">Undo layout chang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2" office:name=""><text:span text:style-name="Definition"><text:span text:style-name="T1">RouteAdd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31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34" svg:width="0.41667in" svg:height="0.4166666666666667in"><draw:image xlink:href="Pictures/13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3" office:name=""><text:span text:style-name="Definition">Add</text:span></text:a></text:p>
          </table:table-cell>
          <table:table-cell table:style-name="TableRowCell" office:value-type="string">
            <text:p text:style-name="Table_20_Contents">Add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9" office:name=""><text:span text:style-name="Definition"><text:span text:style-name="T1">RouteMenu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18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135" svg:width="0.41667in" svg:height="0.4166666666666667in"><draw:image xlink:href="Pictures/13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9" office:name=""><text:span text:style-name="Definition">Edit</text:span></text:a></text:p>
          </table:table-cell>
          <table:table-cell table:style-name="TableRowCell" office:value-type="string">
            <text:p text:style-name="Table_20_Contents">Edit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0" office:name=""><text:span text:style-name="Definition"><text:span text:style-name="T1">SectionView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136" svg:width="0.41667in" svg:height="0.4166666666666667in"><draw:image xlink:href="Pictures/13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7" office:name=""><text:span text:style-name="Definition">Groups</text:span></text:a></text:p>
          </table:table-cell>
          <table:table-cell table:style-name="TableRowCell" office:value-type="string">
            <text:p text:style-name="Table_20_Contents">Settings group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<text:span text:style-name="T1">ServerView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1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137" svg:width="0.41667in" svg:height="0.4166666666666667in"><draw:image xlink:href="Pictures/13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6" office:name=""><text:span text:style-name="Definition">Server</text:span></text:a></text:p>
          </table:table-cell>
          <table:table-cell table:style-name="TableRowCell" office:value-type="string">
            <text:p text:style-name="Table_20_Contents">Server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0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0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66" office:name=""><text:span text:style-name="Definition">ServerView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31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8" office:name=""><text:span text:style-name="Definition"><text:span text:style-name="T1">SettingsDefault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8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138" svg:width="0.41667in" svg:height="0.4166666666666667in"><draw:image xlink:href="Pictures/13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3" office:name=""><text:span text:style-name="Definition">Default</text:span></text:a></text:p>
          </table:table-cell>
          <table:table-cell table:style-name="TableRowCell" office:value-type="string">
            <text:p text:style-name="Table_20_Contents">Reset to default valu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04" office:name=""><text:span text:style-name="Definition"><text:span text:style-name="T1">SettingsItems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3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39" svg:width="0.41667in" svg:height="0.4166666666666667in"><draw:image xlink:href="Pictures/13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0" office:name=""><text:span text:style-name="Definition">List</text:span></text:a></text:p>
          </table:table-cell>
          <table:table-cell table:style-name="TableRowCell" office:value-type="string">
            <text:p text:style-name="Table_20_Contents">Lis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4" office:name=""><text:span text:style-name="Definition"><text:span text:style-name="T1">SettingsLayoutOff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Settings.tsx#L304" office:name=""><text:span text:style-name="Definition">components/Settings.tsx</text:span></text:a></text:p>
          </table:table-cell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140" svg:width="0.41667in" svg:height="0.4166666666666667in"><draw:image xlink:href="Pictures/13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5" office:name=""><text:span text:style-name="Definition">Remove</text:span></text:a></text:p>
          </table:table-cell>
          <table:table-cell table:style-name="TableRowCell" office:value-type="string">
            <text:p text:style-name="Table_20_Contents">Remove from lay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2" office:name=""><text:span text:style-name="Definition"><text:span text:style-name="T1">Settings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42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141" svg:width="0.41667in" svg:height="0.4166666666666667in"><draw:image xlink:href="Pictures/14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6" office:name=""><text:span text:style-name="Definition">Load</text:span></text:a></text:p>
          </table:table-cell>
          <table:table-cell table:style-name="TableRowCell" office:value-type="string">
            <text:p text:style-name="Table_20_Contents">Loa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16" office:name=""><text:span text:style-name="Definition"><text:span text:style-name="T1">SettingsSave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56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142" svg:width="0.41667in" svg:height="0.4166666666666667in"><draw:image xlink:href="Pictures/14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9" office:name=""><text:span text:style-name="Definition">Save</text:span></text:a></text:p>
          </table:table-cell>
          <table:table-cell table:style-name="TableRowCell" office:value-type="string">
            <text:p text:style-name="Table_20_Contents">Save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0" office:name=""><text:span text:style-name="Definition"><text:span text:style-name="T1">SettingsSplitReset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85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143" svg:width="0.41667in" svg:height="0.4166666666666667in"><draw:image xlink:href="Pictures/14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2" office:name=""><text:span text:style-name="Definition">Reset</text:span></text:a></text:p>
          </table:table-cell>
          <table:table-cell table:style-name="TableRowCell" office:value-type="string">
            <text:p text:style-name="Table_20_Contents">Reset split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<text:span text:style-name="T1">ShowRoutePanel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53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44" svg:width="0.41667in" svg:height="0.4166666666666667in"><draw:image xlink:href="Pictures/14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80" office:name=""><text:span text:style-name="Definition">Route</text:span></text:a></text:p>
          </table:table-cell>
          <table:table-cell table:style-name="TableRowCell" office:value-type="string">
            <text:p text:style-name="Table_20_Contents">Open route edito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59" office:name=""><text:span text:style-name="Definition">ShowRoutePanel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92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<text:span text:style-name="T1">Show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43" office:name=""><text:span text:style-name="Definition">gui/LayoutsPageButtons.ts</text:span></text:a></text:p>
          </table:table-cell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45" svg:width="0.41667in" svg:height="0.4166666666666667in"><draw:image xlink:href="Pictures/14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59" office:name=""><text:span text:style-name="Definition">Display</text:span></text:a></text:p>
          </table:table-cell>
          <table:table-cell table:style-name="TableRowCell" office:value-type="string">
            <text:p text:style-name="Table_20_Contents">Display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52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AisCfgPageButtons.ts#L38" office:name=""><text:span text:style-name="Definition">gui/AisCfg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emotePageButtons.ts#L31" office:name=""><text:span text:style-name="Definition">gui/Remote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81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0" office:name=""><text:span text:style-name="Definition">ShowSettings</text:span></text:a></text:p>
          </table:table-cell>
          <table:table-cell table:style-name="TableRowCell" office:value-type="string">
            <text:p text:style-name="Table_20_Contents"><text:a xlink:type="simple" xlink:href="../../viewer/gui/ChartsPageButtons.ts#L57" office:name=""><text:span text:style-name="Definition">gui/Char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95" office:name=""><text:span text:style-name="Definition"><text:span text:style-name="T1">Split</text:span></text:span></text:a></text:p>
          </table:table-cell>
          <table:table-cell table:style-name="TableRowCell" office:value-type="string">
            <text:p text:style-name="Table_20_Contents"><text:a xlink:type="simple" xlink:href="../../viewer/util/splitsupport.ts#L122" office:name=""><text:span text:style-name="Definition">util/splitsupport.ts</text:span></text:a></text:p>
          </table:table-cell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146" svg:width="0.41667in" svg:height="0.4166666666666667in"><draw:image xlink:href="Pictures/14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9" office:name=""><text:span text:style-name="Definition">Split</text:span></text:a></text:p>
          </table:table-cell>
          <table:table-cell table:style-name="TableRowCell" office:value-type="string">
            <text:p text:style-name="Table_20_Contents">Split scree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<text:span text:style-name="T1">StatusAdd</text:span></text:span></text:a></text:p>
          </table:table-cell>
          <table:table-cell table:style-name="TableRowCell" office:value-type="string">
            <text:p text:style-name="Table_20_Contents"><text:a xlink:type="simple" xlink:href="../../viewer/gui/ChannelsPageButtons.ts#L31" office:name=""><text:span text:style-name="Definition">gui/ChannelsPageButtons.ts</text:span></text:a></text:p>
          </table:table-cell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147" svg:width="0.41667in" svg:height="0.4166666666666667in"><draw:image xlink:href="Pictures/14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91" office:name=""><text:span text:style-name="Definition">Add</text:span></text:a></text:p>
          </table:table-cell>
          <table:table-cell table:style-name="TableRowCell" office:value-type="string">
            <text:p text:style-name="Table_20_Contents">Add connectio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37" office:name=""><text:span text:style-name="Definition">StatusAdd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97" office:name=""><text:span text:style-name="Definition">gui/Server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1" office:name=""><text:span text:style-name="Definition"><text:span text:style-name="T1">StatusAddresses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148" svg:width="0.41667in" svg:height="0.4166666666666667in"><draw:image xlink:href="Pictures/14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5" office:name=""><text:span text:style-name="Definition">Net</text:span></text:a></text:p>
          </table:table-cell>
          <table:table-cell table:style-name="TableRowCell" office:value-type="string">
            <text:p text:style-name="Table_20_Contents">Network address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3" office:name=""><text:span text:style-name="Definition"><text:span text:style-name="T1">StatusAll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36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149" svg:width="0.41667in" svg:height="0.4166666666666667in"><draw:image xlink:href="Pictures/14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9" office:name=""><text:span text:style-name="Definition">Expand</text:span></text:a></text:p>
          </table:table-cell>
          <table:table-cell table:style-name="TableRowCell" office:value-type="string">
            <text:p text:style-name="Table_20_Contents">List all handler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75" office:name=""><text:span text:style-name="Definition"><text:span text:style-name="T1">StatusAndroid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5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150" svg:width="0.41667in" svg:height="0.4166666666666667in"><draw:image xlink:href="Pictures/14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8" office:name=""><text:span text:style-name="Definition">Android</text:span></text:a></text:p>
          </table:table-cell>
          <table:table-cell table:style-name="TableRowCell" office:value-type="string">
            <text:p text:style-name="Table_20_Contents">Android settin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5" office:name=""><text:span text:style-name="Definition"><text:span text:style-name="T1">StatusDebu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8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151" svg:width="0.41667in" svg:height="0.4166666666666667in"><draw:image xlink:href="Pictures/15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3" office:name=""><text:span text:style-name="Definition">Debug</text:span></text:a></text:p>
          </table:table-cell>
          <table:table-cell table:style-name="TableRowCell" office:value-type="string">
            <text:p text:style-name="Table_20_Contents">Enable debugg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91" office:name=""><text:span text:style-name="Definition"><text:span text:style-name="T1">StatusLog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75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52" svg:width="0.41667in" svg:height="0.4166666666666667in"><draw:image xlink:href="Pictures/15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80" office:name=""><text:span text:style-name="Definition">Log</text:span></text:a></text:p>
          </table:table-cell>
          <table:table-cell table:style-name="TableRowCell" office:value-type="string">
            <text:p text:style-name="Table_20_Contents">AvNav lo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7" office:name=""><text:span text:style-name="Definition"><text:span text:style-name="T1">Status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62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153" svg:width="0.41667in" svg:height="0.4166666666666667in"><draw:image xlink:href="Pictures/15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7" office:name=""><text:span text:style-name="Definition">Restart</text:span></text:a></text:p>
          </table:table-cell>
          <table:table-cell table:style-name="TableRowCell" office:value-type="string">
            <text:p text:style-name="Table_20_Contents">Restart AvNav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83" office:name=""><text:span text:style-name="Definition"><text:span text:style-name="T1">StatusShutdown</text:span></text:span></text:a></text:p>
          </table:table-cell>
          <table:table-cell table:style-name="TableRowCell" office:value-type="string">
            <text:p text:style-name="Table_20_Contents"><text:a xlink:type="simple" xlink:href="../../viewer/gui/MainActionButtons.tsx#L124" office:name=""><text:span text:style-name="Definition">gui/MainActionButtons.tsx</text:span></text:a></text:p>
          </table:table-cell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154" svg:width="0.41667in" svg:height="0.4166666666666667in"><draw:image xlink:href="Pictures/15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74" office:name=""><text:span text:style-name="Definition">Halt</text:span></text:a></text:p>
          </table:table-cell>
          <table:table-cell table:style-name="TableRowCell" office:value-type="string">
            <text:p text:style-name="Table_20_Contents">Shutdown server comput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67" office:name=""><text:span text:style-name="Definition"><text:span text:style-name="T1">StatusWpa</text:span></text:span></text:a></text:p>
          </table:table-cell>
          <table:table-cell table:style-name="TableRowCell" office:value-type="string">
            <text:p text:style-name="Table_20_Contents"><text:a xlink:type="simple" xlink:href="../../viewer/gui/ServerPageButtons.ts#L40" office:name=""><text:span text:style-name="Definition">gui/ServerPageButtons.ts</text:span></text:a></text:p>
          </table:table-cell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155" svg:width="0.41667in" svg:height="0.4166666666666667in"><draw:image xlink:href="Pictures/15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62" office:name=""><text:span text:style-name="Definition">Wifi</text:span></text:a></text:p>
          </table:table-cell>
          <table:table-cell table:style-name="TableRowCell" office:value-type="string">
            <text:p text:style-name="Table_20_Contents">Configure Wifi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41" office:name=""><text:span text:style-name="Definition"><text:span text:style-name="T1">StopAnchorWatch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AnchorWatchDialog.jsx#L102" office:name=""><text:span text:style-name="Definition">components/AnchorWatchDialog.jsx</text:span></text:a></text:p>
          </table:table-cell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156" svg:width="0.41667in" svg:height="0.4166666666666667in"><draw:image xlink:href="Pictures/15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68" office:name=""><text:span text:style-name="Definition">Stop</text:span></text:a></text:p>
          </table:table-cell>
          <table:table-cell table:style-name="TableRowCell" office:value-type="string">
            <text:p text:style-name="Table_20_Contents">Stop anchor watch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<text:span text:style-name="T1">StopNav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3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57" svg:width="0.41667in" svg:height="0.4166666666666667in"><draw:image xlink:href="Pictures/15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3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1025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74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.tsx#L93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0" office:name=""><text:span text:style-name="Definition">StopNav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66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<text:span text:style-name="T1">StopWp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940" office:name=""><text:span text:style-name="Definition">gui/NavPage.tsx</text:span></text:a></text:p>
          </table:table-cell>
          <table:table-cell table:style-name="TableRowCell" office:value-type="string">
            <text:p text:style-name="Table_20_Contents">WpStop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stop-wp.svg</text:span></text:a></text:p>
          </table:table-cell>
          <table:table-cell table:style-name="TableRowCell" office:value-type="string">
            <text:p text:style-name="Table_20_Contents"><draw:frame draw:name="img158" svg:width="0.41667in" svg:height="0.4166666666666667in"><draw:image xlink:href="Pictures/15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6" office:name=""><text:span text:style-name="Definition">Stop</text:span></text:a></text:p>
          </table:table-cell>
          <table:table-cell table:style-name="TableRowCell" office:value-type="string">
            <text:p text:style-name="Table_20_Contents">Sto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25" office:name=""><text:span text:style-name="Definition">StopWp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75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54" office:name=""><text:span text:style-name="Definition"><text:span text:style-name="T1">Stored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3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59" svg:width="0.41667in" svg:height="0.4166666666666667in"><draw:image xlink:href="Pictures/15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52" office:name=""><text:span text:style-name="Definition">List</text:span></text:a></text:p>
          </table:table-cell>
          <table:table-cell table:style-name="TableRowCell" office:value-type="string">
            <text:p text:style-name="Table_20_Contents">Edit stored route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346" office:name=""><text:span text:style-name="Definition"><text:span text:style-name="T1">SyncRoutes</text:span>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44" office:name=""><text:span text:style-name="Definition">gui/RoutesPageButtons.ts</text:span></text:a></text:p>
          </table:table-cell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160" svg:width="0.41667in" svg:height="0.4166666666666667in"><draw:image xlink:href="Pictures/15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46" office:name=""><text:span text:style-name="Definition">Sync</text:span></text:a></text:p>
          </table:table-cell>
          <table:table-cell table:style-name="TableRowCell" office:value-type="string">
            <text:p text:style-name="Table_20_Contents">Sync routes to server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<text:span text:style-name="T1">ToRoute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469" office:name=""><text:span text:style-name="Definition">gui/NavPage.tsx</text:span></text:a></text:p>
          </table:table-cell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161" svg:width="0.41667in" svg:height="0.4166666666666667in"><draw:image xlink:href="Pictures/160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204" office:name=""><text:span text:style-name="Definition">Route</text:span></text:a></text:p>
          </table:table-cell>
          <table:table-cell table:style-name="TableRowCell" office:value-type="string">
            <text:p text:style-name="Table_20_Contents">To rout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53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gui/NavPage.tsx#L783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91" office:name=""><text:span text:style-name="Definition">ToRoute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416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429" office:name=""><text:span text:style-name="Definition"><text:span text:style-name="T1">TrackItems</text:span>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4" office:name=""><text:span text:style-name="Definition">gui/TracksPageButtons.ts</text:span></text:a></text:p>
          </table:table-cell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162" svg:width="0.41667in" svg:height="0.4166666666666667in"><draw:image xlink:href="Pictures/161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309" office:name=""><text:span text:style-name="Definition">List</text:span></text:a></text:p>
          </table:table-cell>
          <table:table-cell table:style-name="TableRowCell" office:value-type="string">
            <text:p text:style-name="Table_20_Contents">Edit tracks / logs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<text:span text:style-name="T1">Upload</text:span></text:span></text:a></text:p>
          </table:table-cell>
          <table:table-cell table:style-name="TableRowCell" office:value-type="string">
            <text:p text:style-name="Table_20_Contents"><text:a xlink:type="simple" xlink:href="../../viewer/gui/SettingsPageButtons.ts#L70" office:name=""><text:span text:style-name="Definition">gui/SettingsPageButtons.ts</text:span></text:a></text:p>
          </table:table-cell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163" svg:width="0.41667in" svg:height="0.4166666666666667in"><draw:image xlink:href="Pictures/162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62" office:name=""><text:span text:style-name="Definition">Upload</text:span></text:a></text:p>
          </table:table-cell>
          <table:table-cell table:style-name="TableRowCell" office:value-type="string">
            <text:p text:style-name="Table_20_Contents">Upload file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LayoutsPageButtons.ts#L29" office:name=""><text:span text:style-name="Definition">gui/Layout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TracksPageButtons.ts#L37" office:name=""><text:span text:style-name="Definition">gui/Track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306" office:name=""><text:span text:style-name="Definition">gui/EditRoutePage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RoutesPageButtons.ts#L66" office:name=""><text:span text:style-name="Definition">gui/Route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gui/PluginsPageButtons.ts#L31" office:name=""><text:span text:style-name="Definition">gui/Plugins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EditDialog.tsx#L63" office:name=""><text:span text:style-name="Definition">components/Edi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FileDialog.jsx#L1192" office:name=""><text:span text:style-name="Definition">components/File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34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UserAppDialog.tsx#L100" office:name=""><text:span text:style-name="Definition">components/UserApp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74" office:name=""><text:span text:style-name="Definition">Upload</text:span></text:a></text:p>
          </table:table-cell>
          <table:table-cell table:style-name="TableRowCell" office:value-type="string">
            <text:p text:style-name="Table_20_Contents"><text:a xlink:type="simple" xlink:href="../../viewer/components/IconDialog.jsx#L144" office:name=""><text:span text:style-name="Definition">components/Icon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<text:span text:style-name="T1">WpEdi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12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64" svg:width="0.41667in" svg:height="0.4166666666666667in"><draw:image xlink:href="Pictures/163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8" office:name=""><text:span text:style-name="Definition">Edit</text:span></text:a></text:p>
          </table:table-cell>
          <table:table-cell table:style-name="TableRowCell" office:value-type="string">
            <text:p text:style-name="Table_20_Contents">Edi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9" office:name=""><text:span text:style-name="Definition">WpEdit</text:span></text:a></text:p>
          </table:table-cell>
          <table:table-cell table:style-name="TableRowCell" office:value-type="string">
            <text:p text:style-name="Table_20_Contents"><text:a xlink:type="simple" xlink:href="../../viewer/gui/NavPage.tsx#L29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<text:span text:style-name="T1">WpLocate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0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165" svg:width="0.41667in" svg:height="0.4166666666666667in"><draw:image xlink:href="Pictures/164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05" office:name=""><text:span text:style-name="Definition">Locate</text:span></text:a></text:p>
          </table:table-cell>
          <table:table-cell table:style-name="TableRowCell" office:value-type="string">
            <text:p text:style-name="Table_20_Contents">Center to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55" office:name=""><text:span text:style-name="Definition">WpLocate</text:span></text:a></text:p>
          </table:table-cell>
          <table:table-cell table:style-name="TableRowCell" office:value-type="string">
            <text:p text:style-name="Table_20_Contents"><text:a xlink:type="simple" xlink:href="../../viewer/gui/NavPage.tsx#L287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<text:span text:style-name="T1">WpNex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2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166" svg:width="0.41667in" svg:height="0.4166666666666667in"><draw:image xlink:href="Pictures/165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1" office:name=""><text:span text:style-name="Definition">Next</text:span></text:a></text:p>
          </table:table-cell>
          <table:table-cell table:style-name="TableRowCell" office:value-type="string">
            <text:p text:style-name="Table_20_Contents">Next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3" office:name=""><text:span text:style-name="Definition">WpNext</text:span></text:a></text:p>
          </table:table-cell>
          <table:table-cell table:style-name="TableRowCell" office:value-type="string">
            <text:p text:style-name="Table_20_Contents"><text:a xlink:type="simple" xlink:href="../../viewer/gui/NavPage.tsx#L368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<text:span text:style-name="T1">WpPrevious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640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167" svg:width="0.41667in" svg:height="0.4166666666666667in"><draw:image xlink:href="Pictures/166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14" office:name=""><text:span text:style-name="Definition">Previous</text:span></text:a></text:p>
          </table:table-cell>
          <table:table-cell table:style-name="TableRowCell" office:value-type="string">
            <text:p text:style-name="Table_20_Contents">Previous wp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67" office:name=""><text:span text:style-name="Definition">WpPrevious</text:span></text:a></text:p>
          </table:table-cell>
          <table:table-cell table:style-name="TableRowCell" office:value-type="string">
            <text:p text:style-name="Table_20_Contents"><text:a xlink:type="simple" xlink:href="../../viewer/gui/NavPage.tsx#L384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215" office:name=""><text:span text:style-name="Definition"><text:span text:style-name="T1">WpRestart</text:span></text:span></text:a></text:p>
          </table:table-cell>
          <table:table-cell table:style-name="TableRowCell" office:value-type="string">
            <text:p text:style-name="Table_20_Contents"><text:a xlink:type="simple" xlink:href="../../viewer/gui/NavPage.tsx#L341" office:name=""><text:span text:style-name="Definition">gui/NavPage.tsx</text:span></text:a></text:p>
          </table:table-cell>
          <table:table-cell table:style-name="TableRowCell" office:value-type="string">
            <text:p text:style-name="Table_20_Contents">WpRestart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prestart.svg</text:span></text:a></text:p>
          </table:table-cell>
          <table:table-cell table:style-name="TableRowCell" office:value-type="string">
            <text:p text:style-name="Table_20_Contents"><draw:frame draw:name="img168" svg:width="0.41667in" svg:height="0.4166666666666667in"><draw:image xlink:href="Pictures/167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50" office:name=""><text:span text:style-name="Definition">Restart</text:span></text:a></text:p>
          </table:table-cell>
          <table:table-cell table:style-name="TableRowCell" office:value-type="string">
            <text:p text:style-name="Table_20_Contents">Restart wp routing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<text:span text:style-name="T1">ZoomIn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09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169" svg:width="0.41667in" svg:height="0.4166666666666667in"><draw:image xlink:href="Pictures/168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0" office:name=""><text:span text:style-name="Definition">Zoom</text:span></text:a></text:p>
          </table:table-cell>
          <table:table-cell table:style-name="TableRowCell" office:value-type="string">
            <text:p text:style-name="Table_20_Contents">Zoom in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.tsx#L892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5" office:name=""><text:span text:style-name="Definition">ZoomIn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0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<text:span text:style-name="T1">ZoomOut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915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170" svg:width="0.41667in" svg:height="0.4166666666666667in"><draw:image xlink:href="Pictures/169.svg" xlink:type="simple" xlink:show="embed" xlink:actuate="onLoad"/></draw:frame></text:p>
          </table:table-cell>
          <table:table-cell table:style-name="TableRowCell" office:value-type="string">
            <text:p text:style-name="Table_20_Contents"><text:a xlink:type="simple" xlink:href="../../viewer/style/button_text.less#L123" office:name=""><text:span text:style-name="Definition">Zoom</text:span></text:a></text:p>
          </table:table-cell>
          <table:table-cell table:style-name="TableRowCell" office:value-type="string">
            <text:p text:style-name="Table_20_Contents">Zoom out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.tsx#L896" office:name=""><text:span text:style-name="Definition">gui/NavPage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components/ButtonDefs.ts#L179" office:name=""><text:span text:style-name="Definition">ZoomOut</text:span></text:a></text:p>
          </table:table-cell>
          <table:table-cell table:style-name="TableRowCell" office:value-type="string">
            <text:p text:style-name="Table_20_Contents"><text:a xlink:type="simple" xlink:href="../../viewer/gui/NavPageButtons.ts#L44" office:name=""><text:span text:style-name="Definition">gui/NavPageButt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s"/>Icons<text:bookmark-end text:name="ic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Usag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../../viewer/images/icons-new#L210" office:name=""><text:span text:style-name="Definition"><text:span text:style-name="T1">Ancho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8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171" svg:width="0.41667in" svg:height="0.4166666666666667in"><draw:image xlink:href="Pictures/17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0" office:name=""><text:span text:style-name="Definition">Anchor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2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16" office:name=""><text:span text:style-name="Definition"><text:span text:style-name="T1">Boa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56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72" svg:width="0.41667in" svg:height="0.4166666666666667in"><draw:image xlink:href="Pictures/17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6" office:name=""><text:span text:style-name="Definition"><text:span text:style-name="T1">Browser</text:span></text:span></text:a></text:p>
          </table:table-cell>
          <table:table-cell table:style-name="TableRowCell" office:value-type="string">
            <text:p text:style-name="Table_20_Contents"><text:a xlink:type="simple" xlink:href="../../viewer/gui/AddressPage.tsx#L40" office:name=""><text:span text:style-name="Definition">gui/AddressPage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3" svg:width="0.41667in" svg:height="0.4166666666666667in"><draw:image xlink:href="Pictures/17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<text:span text:style-name="T1">Chart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174" svg:width="0.41667in" svg:height="0.4166666666666667in"><draw:image xlink:href="Pictures/17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0" office:name=""><text:span text:style-name="Definition">Chart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9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6" office:name=""><text:span text:style-name="Definition"><text:span text:style-name="T1">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175" svg:width="0.41667in" svg:height="0.4166666666666667in"><draw:image xlink:href="Pictures/17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35" office:name=""><text:span text:style-name="Definition"><text:span text:style-name="T1">Disconnec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86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176" svg:width="0.41667in" svg:height="0.4166666666666667in"><draw:image xlink:href="Pictures/17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5" office:name=""><text:span text:style-name="Definition"><text:span text:style-name="T1">Edi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177" svg:width="0.41667in" svg:height="0.4166666666666667in"><draw:image xlink:href="Pictures/17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<text:span text:style-name="T1">Empty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None</text:span></text:a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3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7" office:name=""><text:span text:style-name="Definition">Empty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2" office:name=""><text:span text:style-name="Definition"><text:span text:style-name="T1">ITDirectory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02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178" svg:width="0.41667in" svg:height="0.4166666666666667in"><draw:image xlink:href="Pictures/17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6" office:name=""><text:span text:style-name="Definition"><text:span text:style-name="T1">ITHtm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5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179" svg:width="0.41667in" svg:height="0.4166666666666667in"><draw:image xlink:href="Pictures/17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05" office:name=""><text:span text:style-name="Definition"><text:span text:style-name="T1">ITOth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05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180" svg:width="0.41667in" svg:height="0.4166666666666667in"><draw:image xlink:href="Pictures/17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0" office:name=""><text:span text:style-name="Definition"><text:span text:style-name="T1">ITServer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2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181" svg:width="0.41667in" svg:height="0.4166666666666667in"><draw:image xlink:href="Pictures/18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9" office:name=""><text:span text:style-name="Definition"><text:span text:style-name="T1">ITTex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9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182" svg:width="0.41667in" svg:height="0.4166666666666667in"><draw:image xlink:href="Pictures/18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93" office:name=""><text:span text:style-name="Definition"><text:span text:style-name="T1">ITUserSpecial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4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183" svg:width="0.41667in" svg:height="0.4166666666666667in"><draw:image xlink:href="Pictures/18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" office:name=""><text:span text:style-name="Definition"><text:span text:style-name="T1">Image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1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184" svg:width="0.41667in" svg:height="0.4166666666666667in"><draw:image xlink:href="Pictures/18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23" office:name=""><text:span text:style-name="Definition"><text:span text:style-name="T1">JSChang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9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23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185" svg:width="0.41667in" svg:height="0.4166666666666667in"><draw:image xlink:href="Pictures/18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2" office:name=""><text:span text:style-name="Definition"><text:span text:style-name="T1">Layout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8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186" svg:width="0.41667in" svg:height="0.4166666666666667in"><draw:image xlink:href="Pictures/18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0" office:name=""><text:span text:style-name="Definition"><text:span text:style-name="T1">Lef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66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187" svg:width="0.41667in" svg:height="0.4166666666666667in"><draw:image xlink:href="Pictures/18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3" office:name=""><text:span text:style-name="Definition"><text:span text:style-name="T1">MNCatNav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4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188" svg:width="0.41667in" svg:height="0.4166666666666667in"><draw:image xlink:href="Pictures/18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86" office:name=""><text:span text:style-name="Definition"><text:span text:style-name="T1">MNCatSet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75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189" svg:width="0.41667in" svg:height="0.4166666666666667in"><draw:image xlink:href="Pictures/18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5" office:name=""><text:span text:style-name="Definition"><text:span text:style-name="T1">MNCollaps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0" svg:width="0.41667in" svg:height="0.4166666666666667in"><draw:image xlink:href="Pictures/18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5" office:name=""><text:span text:style-name="Definition">MNCollapsed</text:span></text:a></text:p>
          </table:table-cell>
          <table:table-cell table:style-name="TableRowCell" office:value-type="string">
            <text:p text:style-name="Table_20_Contents"><text:a xlink:type="simple" xlink:href="../../viewer/gui/MainNav.tsx#L344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9" office:name=""><text:span text:style-name="Definition"><text:span text:style-name="T1">MNExpanded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206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9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191" svg:width="0.41667in" svg:height="0.4166666666666667in"><draw:image xlink:href="Pictures/19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9" office:name=""><text:span text:style-name="Definition">MNExpanded</text:span></text:a></text:p>
          </table:table-cell>
          <table:table-cell table:style-name="TableRowCell" office:value-type="string">
            <text:p text:style-name="Table_20_Contents"><text:a xlink:type="simple" xlink:href="../../viewer/gui/MainNav.tsx#L352" office:name=""><text:span text:style-name="Definition">gui/MainNav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6" office:name=""><text:span text:style-name="Definition"><text:span text:style-name="T1">Measu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65" office:name=""><text:span text:style-name="Definition">components/TitleIcon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192" svg:width="0.41667in" svg:height="0.4166666666666667in"><draw:image xlink:href="Pictures/19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6" office:name=""><text:span text:style-name="Definition">Measur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3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52" office:name=""><text:span text:style-name="Definition"><text:span text:style-name="T1">MeasureFlag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27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52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193" svg:width="0.41667in" svg:height="0.4166666666666667in"><draw:image xlink:href="Pictures/19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0" office:name=""><text:span text:style-name="Definition"><text:span text:style-name="T1">Mor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WayPointItem.jsx#L24" office:name=""><text:span text:style-name="Definition">components/WayPointItem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194" svg:width="0.41667in" svg:height="0.4166666666666667in"><draw:image xlink:href="Pictures/19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83" office:name=""><text:span text:style-name="Definition"><text:span text:style-name="T1">NavStop</text:span></text:span></text:a></text:p>
          </table:table-cell>
          <table:table-cell table:style-name="TableRowCell" office:value-type="string">
            <text:p text:style-name="Table_20_Contents"><text:a xlink:type="simple" xlink:href="../../viewer/gui/EditRoutePage.jsx#L474" office:name=""><text:span text:style-name="Definition">gui/EditRoutePage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195" svg:width="0.41667in" svg:height="0.4166666666666667in"><draw:image xlink:href="Pictures/19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<text:span text:style-name="T1">Overlay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2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196" svg:width="0.41667in" svg:height="0.4166666666666667in"><draw:image xlink:href="Pictures/19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ChartsSelectDialog.tsx#L68" office:name=""><text:span text:style-name="Definition">components/ChartsSelectDialog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0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16" office:name=""><text:span text:style-name="Definition">Overlays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" office:name=""><text:span text:style-name="Definition"><text:span text:style-name="T1">Plugins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3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197" svg:width="0.41667in" svg:height="0.4166666666666667in"><draw:image xlink:href="Pictures/19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72" office:name=""><text:span text:style-name="Definition"><text:span text:style-name="T1">Radio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72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198" svg:width="0.41667in" svg:height="0.4166666666666667in"><draw:image xlink:href="Pictures/19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9" office:name=""><text:span text:style-name="Definition"><text:span text:style-name="T1">Radio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30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9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199" svg:width="0.41667in" svg:height="0.4166666666666667in"><draw:image xlink:href="Pictures/198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3" office:name=""><text:span text:style-name="Definition"><text:span text:style-name="T1">Righ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MultiView.tsx#L172" office:name=""><text:span text:style-name="Definition">components/MultiView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00" svg:width="0.41667in" svg:height="0.4166666666666667in"><draw:image xlink:href="Pictures/199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<text:span text:style-name="T1">Route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6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201" svg:width="0.41667in" svg:height="0.4166666666666667in"><draw:image xlink:href="Pictures/200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22" office:name=""><text:span text:style-name="Definition">Route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7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28" office:name=""><text:span text:style-name="Definition"><text:span text:style-name="T1">Satellite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TimeStatusWidget.tsx#L58" office:name=""><text:span text:style-name="Definition">components/TimeStatusWidge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428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202" svg:width="0.41667in" svg:height="0.4166666666666667in"><draw:image xlink:href="Pictures/201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<text:span text:style-name="T1">Settings</text:span></text:span></text:a></text:p>
          </table:table-cell>
          <table:table-cell table:style-name="TableRowCell" office:value-type="string">
            <text:p text:style-name="Table_20_Contents"><text:a xlink:type="simple" xlink:href="../../viewer/gui/MainNav.tsx#L361" office:name=""><text:span text:style-name="Definition">gui/MainNav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03" svg:width="0.41667in" svg:height="0.4166666666666667in"><draw:image xlink:href="Pictures/202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9" office:name=""><text:span text:style-name="Definition">util/itemFunctions.ts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95" office:name=""><text:span text:style-name="Definition">Settings</text:span></text:a></text:p>
          </table:table-cell>
          <table:table-cell table:style-name="TableRowCell" office:value-type="string">
            <text:p text:style-name="Table_20_Contents"><text:a xlink:type="simple" xlink:href="../../viewer/components/TitleIcons.tsx#L92" office:name=""><text:span text:style-name="Definition">components/TitleIcons.t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<text:span text:style-name="T1">Track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47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204" svg:width="0.41667in" svg:height="0.4166666666666667in"><draw:image xlink:href="Pictures/203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4" office:name=""><text:span text:style-name="Definition">Track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48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363" office:name=""><text:span text:style-name="Definition"><text:span text:style-name="T1">UnChecked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Inputs.tsx#L103" office:name=""><text:span text:style-name="Definition">components/Inputs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205" svg:width="0.41667in" svg:height="0.4166666666666667in"><draw:image xlink:href="Pictures/204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7" office:name=""><text:span text:style-name="Definition"><text:span text:style-name="T1">User</text:span></text:span></text:a></text:p>
          </table:table-cell>
          <table:table-cell table:style-name="TableRowCell" office:value-type="string">
            <text:p text:style-name="Table_20_Contents"><text:a xlink:type="simple" xlink:href="../../viewer/util/itemFunctions.ts#L150" office:name=""><text:span text:style-name="Definition">util/itemFunctions.ts</text:span></text:a>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06" svg:width="0.41667in" svg:height="0.4166666666666667in"><draw:image xlink:href="Pictures/205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83" office:name=""><text:span text:style-name="Definition"><text:span text:style-name="T1">View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DownloadItemList.tsx#L104" office:name=""><text:span text:style-name="Definition">components/DownloadItemList.tsx</text:span></text:a>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207" svg:width="0.41667in" svg:height="0.4166666666666667in"><draw:image xlink:href="Pictures/206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8" office:name=""><text:span text:style-name="Definition"><text:span text:style-name="T1">Waypoint</text:span></text:span></text:a></text:p>
          </table:table-cell>
          <table:table-cell table:style-name="TableRowCell" office:value-type="string">
            <text:p text:style-name="Table_20_Contents"><text:a xlink:type="simple" xlink:href="../../viewer/components/CenterDisplayWidget.jsx#L42" office:name=""><text:span text:style-name="Definition">components/CenterDisplayWidget.jsx</text:span></text:a></text:p>
          </table:table-cell>
          <table:table-cell table:style-name="TableRowCell" office:value-type="string">
            <text:p text:style-name="Table_20_Contents"><text:a xlink:type="simple" xlink:href="../../viewer/style/icons.less#L41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08" svg:width="0.41667in" svg:height="0.4166666666666667in"><draw:image xlink:href="Pictures/207.svg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a xlink:type="simple" xlink:href="../../viewer/images/icons-new#L418" office:name=""><text:span text:style-name="Definition">Waypoint</text:span></text:a></text:p>
          </table:table-cell>
          <table:table-cell table:style-name="TableRowCell" office:value-type="string">
            <text:p text:style-name="Table_20_Contents"><text:a xlink:type="simple" xlink:href="../../viewer/components/FeatureInfoDialog.jsx#L151" office:name=""><text:span text:style-name="Definition">components/FeatureInfoDialog.jsx</text:span></text:a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iconusage"/>IconUsage<text:bookmark-end text:name="iconusag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IconFile</text:p>
            </table:table-cell>
            <table:table-cell table:style-name="TableHeaderRowCell" office:value-type="string">
              <text:p text:style-name="Table_20_Heading">Icon</text:p>
            </table:table-cell>
            <table:table-cell table:style-name="TableHeaderRowCell" office:value-type="string">
              <text:p text:style-name="Table_20_Heading">Usage</text:p>
            </table:table-cell>
          </table:table-row>
        </table:table-header-rows>
        <table:table-row>
          <table:table-cell table:style-name="TableRowCell" office:value-type="string">
            <text:p text:style-name="Table_20_Contents">AddOns</text:p>
          </table:table-cell>
          <table:table-cell table:style-name="TableRowCell" office:value-type="string">
            <text:p text:style-name="Table_20_Contents"><text:a xlink:type="simple" xlink:href="../../viewer/style/icons.less#L137" office:name=""><text:span text:style-name="Definition">apps.svg</text:span></text:a></text:p>
          </table:table-cell>
          <table:table-cell table:style-name="TableRowCell" office:value-type="string">
            <text:p text:style-name="Table_20_Contents"><draw:frame draw:name="img209" svg:width="0.41667in" svg:height="0.4166666666666667in"><draw:image xlink:href="Pictures/208.svg" xlink:type="simple" xlink:show="embed" xlink:actuate="onLoad"/></draw:frame></text:p>
          </table:table-cell>
          <table:table-cell table:style-name="TableRowCell" office:value-type="string">
            <text:p text:style-name="Table_20_Contents">AddonConfigAddOns,DBUserApp</text:p>
          </table:table-cell>
        </table:table-row>
        <table:table-row>
          <table:table-cell table:style-name="TableRowCell" office:value-type="string">
            <text:p text:style-name="Table_20_Contents">After</text:p>
          </table:table-cell>
          <table:table-cell table:style-name="TableRowCell" office:value-type="string">
            <text:p text:style-name="Table_20_Contents"><text:a xlink:type="simple" xlink:href="../../viewer/style/icons.less#L300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10" svg:width="0.41667in" svg:height="0.4166666666666667in"><draw:image xlink:href="Pictures/209.svg" xlink:type="simple" xlink:show="embed" xlink:actuate="onLoad"/></draw:frame></text:p>
          </table:table-cell>
          <table:table-cell table:style-name="TableRowCell" office:value-type="string">
            <text:p text:style-name="Table_20_Contents">DBInsertAfter,DBAfter,DBInsert</text:p>
          </table:table-cell>
        </table:table-row>
        <table:table-row>
          <table:table-cell table:style-name="TableRowCell" office:value-type="string">
            <text:p text:style-name="Table_20_Contents">AisInfoHide</text:p>
          </table:table-cell>
          <table:table-cell table:style-name="TableRowCell" office:value-type="string">
            <text:p text:style-name="Table_20_Contents"><text:a xlink:type="simple" xlink:href="../../viewer/style/icons.less#L134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11" svg:width="0.41667in" svg:height="0.4166666666666667in"><draw:image xlink:href="Pictures/210.svg" xlink:type="simple" xlink:show="embed" xlink:actuate="onLoad"/></draw:frame></text:p>
          </table:table-cell>
          <table:table-cell table:style-name="TableRowCell" office:value-type="string">
            <text:p text:style-name="Table_20_Contents">AisInfoHide</text:p>
          </table:table-cell>
        </table:table-row>
        <table:table-row>
          <table:table-cell table:style-name="TableRowCell" office:value-type="string">
            <text:p text:style-name="Table_20_Contents">AisNearest</text:p>
          </table:table-cell>
          <table:table-cell table:style-name="TableRowCell" office:value-type="string">
            <text:p text:style-name="Table_20_Contents"><text:a xlink:type="simple" xlink:href="../../viewer/style/icons.less#L140" office:name=""><text:span text:style-name="Definition">ais-nearest.svg</text:span></text:a></text:p>
          </table:table-cell>
          <table:table-cell table:style-name="TableRowCell" office:value-type="string">
            <text:p text:style-name="Table_20_Contents"><draw:frame draw:name="img212" svg:width="0.41667in" svg:height="0.4166666666666667in"><draw:image xlink:href="Pictures/211.svg" xlink:type="simple" xlink:show="embed" xlink:actuate="onLoad"/></draw:frame></text:p>
          </table:table-cell>
          <table:table-cell table:style-name="TableRowCell" office:value-type="string">
            <text:p text:style-name="Table_20_Contents">AisNearest</text:p>
          </table:table-cell>
        </table:table-row>
        <table:table-row>
          <table:table-cell table:style-name="TableRowCell" office:value-type="string">
            <text:p text:style-name="Table_20_Contents">Anchor</text:p>
          </table:table-cell>
          <table:table-cell table:style-name="TableRowCell" office:value-type="string">
            <text:p text:style-name="Table_20_Contents"><text:a xlink:type="simple" xlink:href="../../viewer/style/icons.less#L210" office:name=""><text:span text:style-name="Definition">anchor.svg</text:span></text:a></text:p>
          </table:table-cell>
          <table:table-cell table:style-name="TableRowCell" office:value-type="string">
            <text:p text:style-name="Table_20_Contents"><draw:frame draw:name="img213" svg:width="0.41667in" svg:height="0.4166666666666667in"><draw:image xlink:href="Pictures/212.svg" xlink:type="simple" xlink:show="embed" xlink:actuate="onLoad"/></draw:frame></text:p>
          </table:table-cell>
          <table:table-cell table:style-name="TableRowCell" office:value-type="string">
            <text:p text:style-name="Table_20_Contents">AnchorWatch,code</text:p>
          </table:table-cell>
        </table:table-row>
        <table:table-row>
          <table:table-cell table:style-name="TableRowCell" office:value-type="string">
            <text:p text:style-name="Table_20_Contents">AnchorEnd</text:p>
          </table:table-cell>
          <table:table-cell table:style-name="TableRowCell" office:value-type="string">
            <text:p text:style-name="Table_20_Contents"><text:a xlink:type="simple" xlink:href="../../viewer/style/icons.less#L213" office:name=""><text:span text:style-name="Definition">anchor-end.svg</text:span></text:a></text:p>
          </table:table-cell>
          <table:table-cell table:style-name="TableRowCell" office:value-type="string">
            <text:p text:style-name="Table_20_Contents"><draw:frame draw:name="img214" svg:width="0.41667in" svg:height="0.4166666666666667in"><draw:image xlink:href="Pictures/213.svg" xlink:type="simple" xlink:show="embed" xlink:actuate="onLoad"/></draw:frame></text:p>
          </table:table-cell>
          <table:table-cell table:style-name="TableRowCell" office:value-type="string">
            <text:p text:style-name="Table_20_Contents">StopAnchorWatch</text:p>
          </table:table-cell>
        </table:table-row>
        <table:table-row>
          <table:table-cell table:style-name="TableRowCell" office:value-type="string">
            <text:p text:style-name="Table_20_Contents">Android</text:p>
          </table:table-cell>
          <table:table-cell table:style-name="TableRowCell" office:value-type="string">
            <text:p text:style-name="Table_20_Contents"><text:a xlink:type="simple" xlink:href="../../viewer/style/icons.less#L234" office:name=""><text:span text:style-name="Definition">ic_android.svg</text:span></text:a></text:p>
          </table:table-cell>
          <table:table-cell table:style-name="TableRowCell" office:value-type="string">
            <text:p text:style-name="Table_20_Contents"><draw:frame draw:name="img215" svg:width="0.41667in" svg:height="0.4166666666666667in"><draw:image xlink:href="Pictures/214.svg" xlink:type="simple" xlink:show="embed" xlink:actuate="onLoad"/></draw:frame></text:p>
          </table:table-cell>
          <table:table-cell table:style-name="TableRowCell" office:value-type="string">
            <text:p text:style-name="Table_20_Contents">StatusAndroid</text:p>
          </table:table-cell>
        </table:table-row>
        <table:table-row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<text:a xlink:type="simple" xlink:href="../../viewer/style/icons.less#L77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216" svg:width="0.41667in" svg:height="0.4166666666666667in"><draw:image xlink:href="Pictures/215.svg" xlink:type="simple" xlink:show="embed" xlink:actuate="onLoad"/></draw:frame></text:p>
          </table:table-cell>
          <table:table-cell table:style-name="TableRowCell" office:value-type="string">
            <text:p text:style-name="Table_20_Contents">Back</text:p>
          </table:table-cell>
        </table:table-row>
        <table:table-row>
          <table:table-cell table:style-name="TableRowCell" office:value-type="string">
            <text:p text:style-name="Table_20_Contents">Before</text:p>
          </table:table-cell>
          <table:table-cell table:style-name="TableRowCell" office:value-type="string">
            <text:p text:style-name="Table_20_Contents"><text:a xlink:type="simple" xlink:href="../../viewer/style/icons.less#L297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17" svg:width="0.41667in" svg:height="0.4166666666666667in"><draw:image xlink:href="Pictures/216.svg" xlink:type="simple" xlink:show="embed" xlink:actuate="onLoad"/></draw:frame></text:p>
          </table:table-cell>
          <table:table-cell table:style-name="TableRowCell" office:value-type="string">
            <text:p text:style-name="Table_20_Contents">DBInsertBefore,DBBefore</text:p>
          </table:table-cell>
        </table:table-row>
        <table:table-row>
          <table:table-cell table:style-name="TableRowCell" office:value-type="string">
            <text:p text:style-name="Table_20_Contents">Boat</text:p>
          </table:table-cell>
          <table:table-cell table:style-name="TableRowCell" office:value-type="string">
            <text:p text:style-name="Table_20_Contents"><text:a xlink:type="simple" xlink:href="../../viewer/style/icons.less#L216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18" svg:width="0.41667in" svg:height="0.4166666666666667in"><draw:image xlink:href="Pictures/217.svg" xlink:type="simple" xlink:show="embed" xlink:actuate="onLoad"/></draw:frame></text:p>
          </table:table-cell>
          <table:table-cell table:style-name="TableRowCell" office:value-type="string">
            <text:p text:style-name="Table_20_Contents">DBAnchorBoat,code</text:p>
          </table:table-cell>
        </table:table-row>
        <table:table-row>
          <table:table-cell table:style-name="TableRowCell" office:value-type="string">
            <text:p text:style-name="Table_20_Contents">Browser</text:p>
          </table:table-cell>
          <table:table-cell table:style-name="TableRowCell" office:value-type="string">
            <text:p text:style-name="Table_20_Contents"><text:a xlink:type="simple" xlink:href="../../viewer/style/icons.less#L8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19" svg:width="0.41667in" svg:height="0.4166666666666667in"><draw:image xlink:href="Pictures/218.svg" xlink:type="simple" xlink:show="embed" xlink:actuate="onLoad"/></draw:frame></text:p>
          </table:table-cell>
          <table:table-cell table:style-name="TableRowCell" office:value-type="string">
            <text:p text:style-name="Table_20_Contents">AndroidBrowser,code</text:p>
          </table:table-cell>
        </table:table-row>
        <table:table-row>
          <table:table-cell table:style-name="TableRowCell" office:value-type="string">
            <text:p text:style-name="Table_20_Contents">Cancel</text:p>
          </table:table-cell>
          <table:table-cell table:style-name="TableRowCell" office:value-type="string">
            <text:p text:style-name="Table_20_Contents"><text:a xlink:type="simple" xlink:href="../../viewer/style/icons.less#L74" office:name=""><text:span text:style-name="Definition">ic_clear.svg</text:span></text:a></text:p>
          </table:table-cell>
          <table:table-cell table:style-name="TableRowCell" office:value-type="string">
            <text:p text:style-name="Table_20_Contents"><draw:frame draw:name="img220" svg:width="0.41667in" svg:height="0.4166666666666667in"><draw:image xlink:href="Pictures/219.svg" xlink:type="simple" xlink:show="embed" xlink:actuate="onLoad"/></draw:frame></text:p>
          </table:table-cell>
          <table:table-cell table:style-name="TableRowCell" office:value-type="string">
            <text:p text:style-name="Table_20_Contents">Cancel,MainExit,DBCancel</text:p>
          </table:table-cell>
        </table:table-row>
        <table:table-row>
          <table:table-cell table:style-name="TableRowCell" office:value-type="string">
            <text:p text:style-name="Table_20_Contents">Center</text:p>
          </table:table-cell>
          <table:table-cell table:style-name="TableRowCell" office:value-type="string">
            <text:p text:style-name="Table_20_Contents"><text:a xlink:type="simple" xlink:href="../../viewer/style/icons.less#L107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221" svg:width="0.41667in" svg:height="0.4166666666666667in"><draw:image xlink:href="Pictures/220.svg" xlink:type="simple" xlink:show="embed" xlink:actuate="onLoad"/></draw:frame></text:p>
          </table:table-cell>
          <table:table-cell table:style-name="TableRowCell" office:value-type="string">
            <text:p text:style-name="Table_20_Contents">AisInfoLocate,GpsCenter,DBAnchorCenter,DBCenter</text:p>
          </table:table-cell>
        </table:table-row>
        <table:table-row>
          <table:table-cell table:style-name="TableRowCell" office:value-type="string">
            <text:p text:style-name="Table_20_Contents">CenterAction</text:p>
          </table:table-cell>
          <table:table-cell table:style-name="TableRowCell" office:value-type="string">
            <text:p text:style-name="Table_20_Contents"><text:a xlink:type="simple" xlink:href="../../viewer/style/icons.less#L204" office:name=""><text:span text:style-name="Definition">center-action.svg</text:span></text:a></text:p>
          </table:table-cell>
          <table:table-cell table:style-name="TableRowCell" office:value-type="string">
            <text:p text:style-name="Table_20_Contents"><draw:frame draw:name="img222" svg:width="0.41667in" svg:height="0.4166666666666667in"><draw:image xlink:href="Pictures/221.svg" xlink:type="simple" xlink:show="embed" xlink:actuate="onLoad"/></draw:frame></text:p>
          </table:table-cell>
          <table:table-cell table:style-name="TableRowCell" office:value-type="string">
            <text:p text:style-name="Table_20_Contents">CenterAction</text:p>
          </table:table-cell>
        </table:table-row>
        <table:table-row>
          <table:table-cell table:style-name="TableRowCell" office:value-type="string">
            <text:p text:style-name="Table_20_Contents">ChartScheme</text:p>
          </table:table-cell>
          <table:table-cell table:style-name="TableRowCell" office:value-type="string">
            <text:p text:style-name="Table_20_Contents"><text:a xlink:type="simple" xlink:href="../../viewer/style/icons.less#L342" office:name=""><text:span text:style-name="Definition">table_convert.svg</text:span></text:a></text:p>
          </table:table-cell>
          <table:table-cell table:style-name="TableRowCell" office:value-type="string">
            <text:p text:style-name="Table_20_Contents"><draw:frame draw:name="img223" svg:width="0.41667in" svg:height="0.4166666666666667in"><draw:image xlink:href="Pictures/222.svg" xlink:type="simple" xlink:show="embed" xlink:actuate="onLoad"/></draw:frame></text:p>
          </table:table-cell>
          <table:table-cell table:style-name="TableRowCell" office:value-type="string">
            <text:p text:style-name="Table_20_Contents">DBScheme</text:p>
          </table:table-cell>
        </table:table-row>
        <table:table-row>
          <table:table-cell table:style-name="TableRowCell" office:value-type="string">
            <text:p text:style-name="Table_20_Contents">Charts</text:p>
          </table:table-cell>
          <table:table-cell table:style-name="TableRowCell" office:value-type="string">
            <text:p text:style-name="Table_20_Contents"><text:a xlink:type="simple" xlink:href="../../viewer/style/icons.less#L10" office:name=""><text:span text:style-name="Definition">map2.svg</text:span></text:a></text:p>
          </table:table-cell>
          <table:table-cell table:style-name="TableRowCell" office:value-type="string">
            <text:p text:style-name="Table_20_Contents"><draw:frame draw:name="img224" svg:width="0.41667in" svg:height="0.4166666666666667in"><draw:image xlink:href="Pictures/223.svg" xlink:type="simple" xlink:show="embed" xlink:actuate="onLoad"/></draw:frame></text:p>
          </table:table-cell>
          <table:table-cell table:style-name="TableRowCell" office:value-type="string">
            <text:p text:style-name="Table_20_Contents">ChartsView,DBOpenChart,code</text:p>
          </table:table-cell>
        </table:table-row>
        <table:table-row>
          <table:table-cell table:style-name="TableRowCell" office:value-type="string">
            <text:p text:style-name="Table_20_Contents">Checked</text:p>
          </table:table-cell>
          <table:table-cell table:style-name="TableRowCell" office:value-type="string">
            <text:p text:style-name="Table_20_Contents"><text:a xlink:type="simple" xlink:href="../../viewer/style/icons.less#L366" office:name=""><text:span text:style-name="Definition">checkbox-marked-outline.svg</text:span></text:a></text:p>
          </table:table-cell>
          <table:table-cell table:style-name="TableRowCell" office:value-type="string">
            <text:p text:style-name="Table_20_Contents"><draw:frame draw:name="img225" svg:width="0.41667in" svg:height="0.4166666666666667in"><draw:image xlink:href="Pictures/22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Connect</text:p>
          </table:table-cell>
          <table:table-cell table:style-name="TableRowCell" office:value-type="string">
            <text:p text:style-name="Table_20_Contents"><text:a xlink:type="simple" xlink:href="../../viewer/style/icons.less#L338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6" svg:width="0.41667in" svg:height="0.4166666666666667in"><draw:image xlink:href="Pictures/225.svg" xlink:type="simple" xlink:show="embed" xlink:actuate="onLoad"/></draw:frame></text:p>
          </table:table-cell>
          <table:table-cell table:style-name="TableRowCell" office:value-type="string">
            <text:p text:style-name="Table_20_Contents">DBConnect</text:p>
          </table:table-cell>
        </table:table-row>
        <table:table-row>
          <table:table-cell table:style-name="TableRowCell" office:value-type="string">
            <text:p text:style-name="Table_20_Contents">Connected</text:p>
          </table:table-cell>
          <table:table-cell table:style-name="TableRowCell" office:value-type="string">
            <text:p text:style-name="Table_20_Contents"><text:a xlink:type="simple" xlink:href="../../viewer/style/icons.less#L31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27" svg:width="0.41667in" svg:height="0.4166666666666667in"><draw:image xlink:href="Pictures/226.svg" xlink:type="simple" xlink:show="embed" xlink:actuate="onLoad"/></draw:frame></text:p>
          </table:table-cell>
          <table:table-cell table:style-name="TableRowCell" office:value-type="string">
            <text:p text:style-name="Table_20_Contents">Connected</text:p>
          </table:table-cell>
        </table:table-row>
        <table:table-row>
          <table:table-cell table:style-name="TableRowCell" office:value-type="string">
            <text:p text:style-name="Table_20_Contents">Copy</text:p>
          </table:table-cell>
          <table:table-cell table:style-name="TableRowCell" office:value-type="string">
            <text:p text:style-name="Table_20_Contents"><text:a xlink:type="simple" xlink:href="../../viewer/style/icons.less#L294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228" svg:width="0.41667in" svg:height="0.4166666666666667in"><draw:image xlink:href="Pictures/227.svg" xlink:type="simple" xlink:show="embed" xlink:actuate="onLoad"/></draw:frame></text:p>
          </table:table-cell>
          <table:table-cell table:style-name="TableRowCell" office:value-type="string">
            <text:p text:style-name="Table_20_Contents">DBCopy</text:p>
          </table:table-cell>
        </table:table-row>
        <table:table-row>
          <table:table-cell table:style-name="TableRowCell" office:value-type="string">
            <text:p text:style-name="Table_20_Contents">CourseUp</text:p>
          </table:table-cell>
          <table:table-cell table:style-name="TableRowCell" office:value-type="string">
            <text:p text:style-name="Table_20_Contents"><text:a xlink:type="simple" xlink:href="../../viewer/style/icons.less#L167" office:name=""><text:span text:style-name="Definition">compass.svg</text:span></text:a></text:p>
          </table:table-cell>
          <table:table-cell table:style-name="TableRowCell" office:value-type="string">
            <text:p text:style-name="Table_20_Contents"><draw:frame draw:name="img229" svg:width="0.41667in" svg:height="0.4166666666666667in"><draw:image xlink:href="Pictures/228.svg" xlink:type="simple" xlink:show="embed" xlink:actuate="onLoad"/></draw:frame></text:p>
          </table:table-cell>
          <table:table-cell table:style-name="TableRowCell" office:value-type="string">
            <text:p text:style-name="Table_20_Contents">CourseUp</text:p>
          </table:table-cell>
        </table:table-row>
        <table:table-row>
          <table:table-cell table:style-name="TableRowCell" office:value-type="string">
            <text:p text:style-name="Table_20_Contents">Debug</text:p>
          </table:table-cell>
          <table:table-cell table:style-name="TableRowCell" office:value-type="string">
            <text:p text:style-name="Table_20_Contents"><text:a xlink:type="simple" xlink:href="../../viewer/style/icons.less#L246" office:name=""><text:span text:style-name="Definition">bug_report.svg</text:span></text:a></text:p>
          </table:table-cell>
          <table:table-cell table:style-name="TableRowCell" office:value-type="string">
            <text:p text:style-name="Table_20_Contents"><draw:frame draw:name="img230" svg:width="0.41667in" svg:height="0.4166666666666667in"><draw:image xlink:href="Pictures/229.svg" xlink:type="simple" xlink:show="embed" xlink:actuate="onLoad"/></draw:frame></text:p>
          </table:table-cell>
          <table:table-cell table:style-name="TableRowCell" office:value-type="string">
            <text:p text:style-name="Table_20_Contents">StatusDebug</text:p>
          </table:table-cell>
        </table:table-row>
        <table:table-row>
          <table:table-cell table:style-name="TableRowCell" office:value-type="string">
            <text:p text:style-name="Table_20_Contents">Delete</text:p>
          </table:table-cell>
          <table:table-cell table:style-name="TableRowCell" office:value-type="string">
            <text:p text:style-name="Table_20_Contents"><text:a xlink:type="simple" xlink:href="../../viewer/style/icons.less#L288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231" svg:width="0.41667in" svg:height="0.4166666666666667in"><draw:image xlink:href="Pictures/230.svg" xlink:type="simple" xlink:show="embed" xlink:actuate="onLoad"/></draw:frame></text:p>
          </table:table-cell>
          <table:table-cell table:style-name="TableRowCell" office:value-type="string">
            <text:p text:style-name="Table_20_Contents">DBDelete,DBWpaRemove,DBClear,DBDiscard,DBCleanTrack</text:p>
          </table:table-cell>
        </table:table-row>
        <table:table-row>
          <table:table-cell table:style-name="TableRowCell" office:value-type="string">
            <text:p text:style-name="Table_20_Contents">Dim</text:p>
          </table:table-cell>
          <table:table-cell table:style-name="TableRowCell" office:value-type="string">
            <text:p text:style-name="Table_20_Contents"><text:a xlink:type="simple" xlink:href="../../viewer/style/icons.less#L110" office:name=""><text:span text:style-name="Definition">brightness_low.svg</text:span></text:a></text:p>
          </table:table-cell>
          <table:table-cell table:style-name="TableRowCell" office:value-type="string">
            <text:p text:style-name="Table_20_Contents"><draw:frame draw:name="img232" svg:width="0.41667in" svg:height="0.4166666666666667in"><draw:image xlink:href="Pictures/231.svg" xlink:type="simple" xlink:show="embed" xlink:actuate="onLoad"/></draw:frame></text:p>
          </table:table-cell>
          <table:table-cell table:style-name="TableRowCell" office:value-type="string">
            <text:p text:style-name="Table_20_Contents">Dim</text:p>
          </table:table-cell>
        </table:table-row>
        <table:table-row>
          <table:table-cell table:style-name="TableRowCell" office:value-type="string">
            <text:p text:style-name="Table_20_Contents">Disable</text:p>
          </table:table-cell>
          <table:table-cell table:style-name="TableRowCell" office:value-type="string">
            <text:p text:style-name="Table_20_Contents"><text:a xlink:type="simple" xlink:href="../../viewer/style/icons.less#L303" office:name=""><text:span text:style-name="Definition">ic_hide.svg</text:span></text:a></text:p>
          </table:table-cell>
          <table:table-cell table:style-name="TableRowCell" office:value-type="string">
            <text:p text:style-name="Table_20_Contents"><draw:frame draw:name="img233" svg:width="0.41667in" svg:height="0.4166666666666667in"><draw:image xlink:href="Pictures/232.svg" xlink:type="simple" xlink:show="embed" xlink:actuate="onLoad"/></draw:frame></text:p>
          </table:table-cell>
          <table:table-cell table:style-name="TableRowCell" office:value-type="string">
            <text:p text:style-name="Table_20_Contents">DBDisable</text:p>
          </table:table-cell>
        </table:table-row>
        <table:table-row>
          <table:table-cell table:style-name="TableRowCell" office:value-type="string">
            <text:p text:style-name="Table_20_Contents">Disconnect</text:p>
          </table:table-cell>
          <table:table-cell table:style-name="TableRowCell" office:value-type="string">
            <text:p text:style-name="Table_20_Contents"><text:a xlink:type="simple" xlink:href="../../viewer/style/icons.less#L335" office:name=""><text:span text:style-name="Definition">plug-disconnect.svg</text:span></text:a></text:p>
          </table:table-cell>
          <table:table-cell table:style-name="TableRowCell" office:value-type="string">
            <text:p text:style-name="Table_20_Contents"><draw:frame draw:name="img234" svg:width="0.41667in" svg:height="0.4166666666666667in"><draw:image xlink:href="Pictures/233.svg" xlink:type="simple" xlink:show="embed" xlink:actuate="onLoad"/></draw:frame></text:p>
          </table:table-cell>
          <table:table-cell table:style-name="TableRowCell" office:value-type="string">
            <text:p text:style-name="Table_20_Contents">DBDisconnect,code</text:p>
          </table:table-cell>
        </table:table-row>
        <table:table-row>
          <table:table-cell table:style-name="TableRowCell" office:value-type="string">
            <text:p text:style-name="Table_20_Contents">Download</text:p>
          </table:table-cell>
          <table:table-cell table:style-name="TableRowCell" office:value-type="string">
            <text:p text:style-name="Table_20_Contents"><text:a xlink:type="simple" xlink:href="../../viewer/style/icons.less#L285" office:name=""><text:span text:style-name="Definition">ic_file_download.svg</text:span></text:a></text:p>
          </table:table-cell>
          <table:table-cell table:style-name="TableRowCell" office:value-type="string">
            <text:p text:style-name="Table_20_Contents"><draw:frame draw:name="img235" svg:width="0.41667in" svg:height="0.4166666666666667in"><draw:image xlink:href="Pictures/234.svg" xlink:type="simple" xlink:show="embed" xlink:actuate="onLoad"/></draw:frame></text:p>
          </table:table-cell>
          <table:table-cell table:style-name="TableRowCell" office:value-type="string">
            <text:p text:style-name="Table_20_Contents">DBDownload</text:p>
          </table:table-cell>
        </table:table-row>
        <table:table-row>
          <table:table-cell table:style-name="TableRowCell" office:value-type="string">
            <text:p text:style-name="Table_20_Contents">Edit</text:p>
          </table:table-cell>
          <table:table-cell table:style-name="TableRowCell" office:value-type="string">
            <text:p text:style-name="Table_20_Contents"><text:a xlink:type="simple" xlink:href="../../viewer/style/icons.less#L25" office:name=""><text:span text:style-name="Definition">ic_edit.svg</text:span></text:a></text:p>
          </table:table-cell>
          <table:table-cell table:style-name="TableRowCell" office:value-type="string">
            <text:p text:style-name="Table_20_Contents"><draw:frame draw:name="img236" svg:width="0.41667in" svg:height="0.4166666666666667in"><draw:image xlink:href="Pictures/235.svg" xlink:type="simple" xlink:show="embed" xlink:actuate="onLoad"/></draw:frame></text:p>
          </table:table-cell>
          <table:table-cell table:style-name="TableRowCell" office:value-type="string">
            <text:p text:style-name="Table_20_Contents">WpEdit,Edit,DBRename,DBEditCss,DBConfig,code</text:p>
          </table:table-cell>
        </table:table-row>
        <table:table-row>
          <table:table-cell table:style-name="TableRowCell" office:value-type="string">
            <text:p text:style-name="Table_20_Contents">EditPage</text:p>
          </table:table-cell>
          <table:table-cell table:style-name="TableRowCell" office:value-type="string">
            <text:p text:style-name="Table_20_Contents"><text:a xlink:type="simple" xlink:href="../../viewer/style/icons.less#L219" office:name=""><text:span text:style-name="Definition">tune.svg</text:span></text:a></text:p>
          </table:table-cell>
          <table:table-cell table:style-name="TableRowCell" office:value-type="string">
            <text:p text:style-name="Table_20_Contents"><draw:frame draw:name="img237" svg:width="0.41667in" svg:height="0.4166666666666667in"><draw:image xlink:href="Pictures/236.svg" xlink:type="simple" xlink:show="embed" xlink:actuate="onLoad"/></draw:frame></text:p>
          </table:table-cell>
          <table:table-cell table:style-name="TableRowCell" office:value-type="string">
            <text:p text:style-name="Table_20_Contents">EditPage</text:p>
          </table:table-cell>
        </table:table-row>
        <table:table-row>
          <table:table-cell table:style-name="TableRowCell" office:value-type="string">
            <text:p text:style-name="Table_20_Contents">Empty</text:p>
          </table:table-cell>
          <table:table-cell table:style-name="TableRowCell" office:value-type="string">
            <text:p text:style-name="Table_20_Contents"><text:a xlink:type="simple" xlink:href="../../viewer/style/icons.less#L357" office:name=""><text:span text:style-name="Definition">None</text:span></text:a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EmptyRoute</text:p>
          </table:table-cell>
          <table:table-cell table:style-name="TableRowCell" office:value-type="string">
            <text:p text:style-name="Table_20_Contents"><text:a xlink:type="simple" xlink:href="../../viewer/style/icons.less#L316" office:name=""><text:span text:style-name="Definition">delete_sweep.svg</text:span></text:a></text:p>
          </table:table-cell>
          <table:table-cell table:style-name="TableRowCell" office:value-type="string">
            <text:p text:style-name="Table_20_Contents"><draw:frame draw:name="img238" svg:width="0.41667in" svg:height="0.4166666666666667in"><draw:image xlink:href="Pictures/237.svg" xlink:type="simple" xlink:show="embed" xlink:actuate="onLoad"/></draw:frame></text:p>
          </table:table-cell>
          <table:table-cell table:style-name="TableRowCell" office:value-type="string">
            <text:p text:style-name="Table_20_Contents">DBEmptyRoute</text:p>
          </table:table-cell>
        </table:table-row>
        <table:table-row>
          <table:table-cell table:style-name="TableRowCell" office:value-type="string">
            <text:p text:style-name="Table_20_Contents">Expand</text:p>
          </table:table-cell>
          <table:table-cell table:style-name="TableRowCell" office:value-type="string">
            <text:p text:style-name="Table_20_Contents"><text:a xlink:type="simple" xlink:href="../../viewer/style/icons.less#L40" office:name=""><text:span text:style-name="Definition">expand-all-200.svg</text:span></text:a></text:p>
          </table:table-cell>
          <table:table-cell table:style-name="TableRowCell" office:value-type="string">
            <text:p text:style-name="Table_20_Contents"><draw:frame draw:name="img239" svg:width="0.41667in" svg:height="0.4166666666666667in"><draw:image xlink:href="Pictures/238.svg" xlink:type="simple" xlink:show="embed" xlink:actuate="onLoad"/></draw:frame></text:p>
          </table:table-cell>
          <table:table-cell table:style-name="TableRowCell" office:value-type="string">
            <text:p text:style-name="Table_20_Contents">StatusAll</text:p>
          </table:table-cell>
        </table:table-row>
        <table:table-row>
          <table:table-cell table:style-name="TableRowCell" office:value-type="string">
            <text:p text:style-name="Table_20_Contents">FullScreen</text:p>
          </table:table-cell>
          <table:table-cell table:style-name="TableRowCell" office:value-type="string">
            <text:p text:style-name="Table_20_Contents"><text:a xlink:type="simple" xlink:href="../../viewer/style/icons.less#L125" office:name=""><text:span text:style-name="Definition">fullscreen.svg</text:span></text:a></text:p>
          </table:table-cell>
          <table:table-cell table:style-name="TableRowCell" office:value-type="string">
            <text:p text:style-name="Table_20_Contents"><draw:frame draw:name="img240" svg:width="0.41667in" svg:height="0.4166666666666667in"><draw:image xlink:href="Pictures/239.svg" xlink:type="simple" xlink:show="embed" xlink:actuate="onLoad"/></draw:frame></text:p>
          </table:table-cell>
          <table:table-cell table:style-name="TableRowCell" office:value-type="string">
            <text:p text:style-name="Table_20_Contents">FullScreen</text:p>
          </table:table-cell>
        </table:table-row>
        <table:table-row>
          <table:table-cell table:style-name="TableRowCell" office:value-type="string">
            <text:p text:style-name="Table_20_Contents">Help</text:p>
          </table:table-cell>
          <table:table-cell table:style-name="TableRowCell" office:value-type="string">
            <text:p text:style-name="Table_20_Contents"><text:a xlink:type="simple" xlink:href="../../viewer/style/icons.less#L276" office:name=""><text:span text:style-name="Definition">ic_help_outline.svg</text:span></text:a></text:p>
          </table:table-cell>
          <table:table-cell table:style-name="TableRowCell" office:value-type="string">
            <text:p text:style-name="Table_20_Contents"><draw:frame draw:name="img241" svg:width="0.41667in" svg:height="0.4166666666666667in"><draw:image xlink:href="Pictures/240.svg" xlink:type="simple" xlink:show="embed" xlink:actuate="onLoad"/></draw:frame></text:p>
          </table:table-cell>
          <table:table-cell table:style-name="TableRowCell" office:value-type="string">
            <text:p text:style-name="Table_20_Contents">Help</text:p>
          </table:table-cell>
        </table:table-row>
        <table:table-row>
          <table:table-cell table:style-name="TableRowCell" office:value-type="string">
            <text:p text:style-name="Table_20_Contents">Hide</text:p>
          </table:table-cell>
          <table:table-cell table:style-name="TableRowCell" office:value-type="string">
            <text:p text:style-name="Table_20_Contents"><text:a xlink:type="simple" xlink:href="../../viewer/style/icons.less#L312" office:name=""><text:span text:style-name="Definition">visibility_off.svg</text:span></text:a></text:p>
          </table:table-cell>
          <table:table-cell table:style-name="TableRowCell" office:value-type="string">
            <text:p text:style-name="Table_20_Contents"><draw:frame draw:name="img242" svg:width="0.41667in" svg:height="0.4166666666666667in"><draw:image xlink:href="Pictures/241.svg" xlink:type="simple" xlink:show="embed" xlink:actuate="onLoad"/></draw:frame></text:p>
          </table:table-cell>
          <table:table-cell table:style-name="TableRowCell" office:value-type="string">
            <text:p text:style-name="Table_20_Contents">DBHide</text:p>
          </table:table-cell>
        </table:table-row>
        <table:table-row>
          <table:table-cell table:style-name="TableRowCell" office:value-type="string">
            <text:p text:style-name="Table_20_Contents">HideOverlays</text:p>
          </table:table-cell>
          <table:table-cell table:style-name="TableRowCell" office:value-type="string">
            <text:p text:style-name="Table_20_Contents"><text:a xlink:type="simple" xlink:href="../../viewer/style/icons.less#L19" office:name=""><text:span text:style-name="Definition">layers-black-off.svg</text:span></text:a></text:p>
          </table:table-cell>
          <table:table-cell table:style-name="TableRowCell" office:value-type="string">
            <text:p text:style-name="Table_20_Contents"><draw:frame draw:name="img243" svg:width="0.41667in" svg:height="0.4166666666666667in"><draw:image xlink:href="Pictures/242.svg" xlink:type="simple" xlink:show="embed" xlink:actuate="onLoad"/></draw:frame></text:p>
          </table:table-cell>
          <table:table-cell table:style-name="TableRowCell" office:value-type="string">
            <text:p text:style-name="Table_20_Contents">DBHideOverlays,DBHideAllOverlays</text:p>
          </table:table-cell>
        </table:table-row>
        <table:table-row>
          <table:table-cell table:style-name="TableRowCell" office:value-type="string">
            <text:p text:style-name="Table_20_Contents">ITDirectory</text:p>
          </table:table-cell>
          <table:table-cell table:style-name="TableRowCell" office:value-type="string">
            <text:p text:style-name="Table_20_Contents"><text:a xlink:type="simple" xlink:href="../../viewer/style/icons.less#L402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244" svg:width="0.41667in" svg:height="0.4166666666666667in"><draw:image xlink:href="Pictures/24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Html</text:p>
          </table:table-cell>
          <table:table-cell table:style-name="TableRowCell" office:value-type="string">
            <text:p text:style-name="Table_20_Contents"><text:a xlink:type="simple" xlink:href="../../viewer/style/icons.less#L396" office:name=""><text:span text:style-name="Definition">internet-web-browser.svg</text:span></text:a></text:p>
          </table:table-cell>
          <table:table-cell table:style-name="TableRowCell" office:value-type="string">
            <text:p text:style-name="Table_20_Contents"><draw:frame draw:name="img245" svg:width="0.41667in" svg:height="0.4166666666666667in"><draw:image xlink:href="Pictures/24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Other</text:p>
          </table:table-cell>
          <table:table-cell table:style-name="TableRowCell" office:value-type="string">
            <text:p text:style-name="Table_20_Contents"><text:a xlink:type="simple" xlink:href="../../viewer/style/icons.less#L405" office:name=""><text:span text:style-name="Definition">draft.svg</text:span></text:a></text:p>
          </table:table-cell>
          <table:table-cell table:style-name="TableRowCell" office:value-type="string">
            <text:p text:style-name="Table_20_Contents"><draw:frame draw:name="img246" svg:width="0.41667in" svg:height="0.4166666666666667in"><draw:image xlink:href="Pictures/24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Server</text:p>
          </table:table-cell>
          <table:table-cell table:style-name="TableRowCell" office:value-type="string">
            <text:p text:style-name="Table_20_Contents"><text:a xlink:type="simple" xlink:href="../../viewer/style/icons.less#L390" office:name=""><text:span text:style-name="Definition">plug.svg</text:span></text:a></text:p>
          </table:table-cell>
          <table:table-cell table:style-name="TableRowCell" office:value-type="string">
            <text:p text:style-name="Table_20_Contents"><draw:frame draw:name="img247" svg:width="0.41667in" svg:height="0.4166666666666667in"><draw:image xlink:href="Pictures/24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Text</text:p>
          </table:table-cell>
          <table:table-cell table:style-name="TableRowCell" office:value-type="string">
            <text:p text:style-name="Table_20_Contents"><text:a xlink:type="simple" xlink:href="../../viewer/style/icons.less#L399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48" svg:width="0.41667in" svg:height="0.4166666666666667in"><draw:image xlink:href="Pictures/24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TUserSpecial</text:p>
          </table:table-cell>
          <table:table-cell table:style-name="TableRowCell" office:value-type="string">
            <text:p text:style-name="Table_20_Contents"><text:a xlink:type="simple" xlink:href="../../viewer/style/icons.less#L393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249" svg:width="0.41667in" svg:height="0.4166666666666667in"><draw:image xlink:href="Pictures/248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Images</text:p>
          </table:table-cell>
          <table:table-cell table:style-name="TableRowCell" office:value-type="string">
            <text:p text:style-name="Table_20_Contents"><text:a xlink:type="simple" xlink:href="../../viewer/style/icons.less#L4" office:name=""><text:span text:style-name="Definition">image-icon.svg</text:span></text:a></text:p>
          </table:table-cell>
          <table:table-cell table:style-name="TableRowCell" office:value-type="string">
            <text:p text:style-name="Table_20_Contents"><draw:frame draw:name="img250" svg:width="0.41667in" svg:height="0.4166666666666667in"><draw:image xlink:href="Pictures/249.svg" xlink:type="simple" xlink:show="embed" xlink:actuate="onLoad"/></draw:frame></text:p>
          </table:table-cell>
          <table:table-cell table:style-name="TableRowCell" office:value-type="string">
            <text:p text:style-name="Table_20_Contents">AddonConfigImages,code</text:p>
          </table:table-cell>
        </table:table-row>
        <table:table-row>
          <table:table-cell table:style-name="TableRowCell" office:value-type="string">
            <text:p text:style-name="Table_20_Contents">Imports</text:p>
          </table:table-cell>
          <table:table-cell table:style-name="TableRowCell" office:value-type="string">
            <text:p text:style-name="Table_20_Contents"><text:a xlink:type="simple" xlink:href="../../viewer/style/icons.less#L13" office:name=""><text:span text:style-name="Definition">swap_horiz.svg</text:span></text:a></text:p>
          </table:table-cell>
          <table:table-cell table:style-name="TableRowCell" office:value-type="string">
            <text:p text:style-name="Table_20_Contents"><draw:frame draw:name="img251" svg:width="0.41667in" svg:height="0.4166666666666667in"><draw:image xlink:href="Pictures/250.svg" xlink:type="simple" xlink:show="embed" xlink:actuate="onLoad"/></draw:frame></text:p>
          </table:table-cell>
          <table:table-cell table:style-name="TableRowCell" office:value-type="string">
            <text:p text:style-name="Table_20_Contents">ImportsView</text:p>
          </table:table-cell>
        </table:table-row>
        <table:table-row>
          <table:table-cell table:style-name="TableRowCell" office:value-type="string">
            <text:p text:style-name="Table_20_Contents">Info</text:p>
          </table:table-cell>
          <table:table-cell table:style-name="TableRowCell" office:value-type="string">
            <text:p text:style-name="Table_20_Contents"><text:a xlink:type="simple" xlink:href="../../viewer/style/icons.less#L28" office:name=""><text:span text:style-name="Definition">ic_info.svg</text:span></text:a></text:p>
          </table:table-cell>
          <table:table-cell table:style-name="TableRowCell" office:value-type="string">
            <text:p text:style-name="Table_20_Contents"><draw:frame draw:name="img252" svg:width="0.41667in" svg:height="0.4166666666666667in"><draw:image xlink:href="Pictures/251.svg" xlink:type="simple" xlink:show="embed" xlink:actuate="onLoad"/></draw:frame></text:p>
          </table:table-cell>
          <table:table-cell table:style-name="TableRowCell" office:value-type="string">
            <text:p text:style-name="Table_20_Contents">MainInfo,DBInfo</text:p>
          </table:table-cell>
        </table:table-row>
        <table:table-row>
          <table:table-cell table:style-name="TableRowCell" office:value-type="string">
            <text:p text:style-name="Table_20_Contents">InvertRoute</text:p>
          </table:table-cell>
          <table:table-cell table:style-name="TableRowCell" office:value-type="string">
            <text:p text:style-name="Table_20_Contents"><text:a xlink:type="simple" xlink:href="../../viewer/style/icons.less#L319" office:name=""><text:span text:style-name="Definition">invertroute.svg</text:span></text:a></text:p>
          </table:table-cell>
          <table:table-cell table:style-name="TableRowCell" office:value-type="string">
            <text:p text:style-name="Table_20_Contents"><draw:frame draw:name="img253" svg:width="0.41667in" svg:height="0.4166666666666667in"><draw:image xlink:href="Pictures/252.svg" xlink:type="simple" xlink:show="embed" xlink:actuate="onLoad"/></draw:frame></text:p>
          </table:table-cell>
          <table:table-cell table:style-name="TableRowCell" office:value-type="string">
            <text:p text:style-name="Table_20_Contents">DBInvertRoute</text:p>
          </table:table-cell>
        </table:table-row>
        <table:table-row>
          <table:table-cell table:style-name="TableRowCell" office:value-type="string">
            <text:p text:style-name="Table_20_Contents">Items</text:p>
          </table:table-cell>
          <table:table-cell table:style-name="TableRowCell" office:value-type="string">
            <text:p text:style-name="Table_20_Contents"><text:a xlink:type="simple" xlink:href="../../viewer/style/icons.less#L92" office:name=""><text:span text:style-name="Definition">list-200.svg</text:span></text:a></text:p>
          </table:table-cell>
          <table:table-cell table:style-name="TableRowCell" office:value-type="string">
            <text:p text:style-name="Table_20_Contents"><draw:frame draw:name="img254" svg:width="0.41667in" svg:height="0.4166666666666667in"><draw:image xlink:href="Pictures/253.svg" xlink:type="simple" xlink:show="embed" xlink:actuate="onLoad"/></draw:frame></text:p>
          </table:table-cell>
          <table:table-cell table:style-name="TableRowCell" office:value-type="string">
            <text:p text:style-name="Table_20_Contents">AisItems,StoredRoutes,SettingsItems,TrackItems</text:p>
          </table:table-cell>
        </table:table-row>
        <table:table-row>
          <table:table-cell table:style-name="TableRowCell" office:value-type="string">
            <text:p text:style-name="Table_20_Contents">JSChanged</text:p>
          </table:table-cell>
          <table:table-cell table:style-name="TableRowCell" office:value-type="string">
            <text:p text:style-name="Table_20_Contents"><text:a xlink:type="simple" xlink:href="../../viewer/style/icons.less#L423" office:name=""><text:span text:style-name="Definition">javascript.svg</text:span></text:a></text:p>
          </table:table-cell>
          <table:table-cell table:style-name="TableRowCell" office:value-type="string">
            <text:p text:style-name="Table_20_Contents"><draw:frame draw:name="img255" svg:width="0.41667in" svg:height="0.4166666666666667in"><draw:image xlink:href="Pictures/25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ayout</text:p>
          </table:table-cell>
          <table:table-cell table:style-name="TableRowCell" office:value-type="string">
            <text:p text:style-name="Table_20_Contents"><text:a xlink:type="simple" xlink:href="../../viewer/style/icons.less#L222" office:name=""><text:span text:style-name="Definition">ballot.svg</text:span></text:a></text:p>
          </table:table-cell>
          <table:table-cell table:style-name="TableRowCell" office:value-type="string">
            <text:p text:style-name="Table_20_Contents"><draw:frame draw:name="img256" svg:width="0.41667in" svg:height="0.4166666666666667in"><draw:image xlink:href="Pictures/255.svg" xlink:type="simple" xlink:show="embed" xlink:actuate="onLoad"/></draw:frame></text:p>
          </table:table-cell>
          <table:table-cell table:style-name="TableRowCell" office:value-type="string">
            <text:p text:style-name="Table_20_Contents">Layout,LayoutFinished,DBEditLayout,code</text:p>
          </table:table-cell>
        </table:table-row>
        <table:table-row>
          <table:table-cell table:style-name="TableRowCell" office:value-type="string">
            <text:p text:style-name="Table_20_Contents">LayoutOff</text:p>
          </table:table-cell>
          <table:table-cell table:style-name="TableRowCell" office:value-type="string">
            <text:p text:style-name="Table_20_Contents"><text:a xlink:type="simple" xlink:href="../../viewer/style/icons.less#L258" office:name=""><text:span text:style-name="Definition">ballot-off.svg</text:span></text:a></text:p>
          </table:table-cell>
          <table:table-cell table:style-name="TableRowCell" office:value-type="string">
            <text:p text:style-name="Table_20_Contents"><draw:frame draw:name="img257" svg:width="0.41667in" svg:height="0.4166666666666667in"><draw:image xlink:href="Pictures/256.svg" xlink:type="simple" xlink:show="embed" xlink:actuate="onLoad"/></draw:frame></text:p>
          </table:table-cell>
          <table:table-cell table:style-name="TableRowCell" office:value-type="string">
            <text:p text:style-name="Table_20_Contents">SettingsLayoutOff</text:p>
          </table:table-cell>
        </table:table-row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Table_20_Contents"><text:a xlink:type="simple" xlink:href="../../viewer/style/icons.less#L410" office:name=""><text:span text:style-name="Definition">navigate_before.svg</text:span></text:a></text:p>
          </table:table-cell>
          <table:table-cell table:style-name="TableRowCell" office:value-type="string">
            <text:p text:style-name="Table_20_Contents"><draw:frame draw:name="img258" svg:width="0.41667in" svg:height="0.4166666666666667in"><draw:image xlink:href="Pictures/257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Lock</text:p>
          </table:table-cell>
          <table:table-cell table:style-name="TableRowCell" office:value-type="string">
            <text:p text:style-name="Table_20_Contents"><text:a xlink:type="simple" xlink:href="../../viewer/style/icons.less#L101" office:name=""><text:span text:style-name="Definition">update_disabled.svg</text:span></text:a></text:p>
          </table:table-cell>
          <table:table-cell table:style-name="TableRowCell" office:value-type="string">
            <text:p text:style-name="Table_20_Contents"><draw:frame draw:name="img259" svg:width="0.41667in" svg:height="0.4166666666666667in"><draw:image xlink:href="Pictures/258.svg" xlink:type="simple" xlink:show="embed" xlink:actuate="onLoad"/></draw:frame></text:p>
          </table:table-cell>
          <table:table-cell table:style-name="TableRowCell" office:value-type="string">
            <text:p text:style-name="Table_20_Contents">AisLock</text:p>
          </table:table-cell>
        </table:table-row>
        <table:table-row>
          <table:table-cell table:style-name="TableRowCell" office:value-type="string">
            <text:p text:style-name="Table_20_Contents">LockMarker</text:p>
          </table:table-cell>
          <table:table-cell table:style-name="TableRowCell" office:value-type="string">
            <text:p text:style-name="Table_20_Contents"><text:a xlink:type="simple" xlink:href="../../viewer/style/icons.less#L164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260" svg:width="0.41667in" svg:height="0.4166666666666667in"><draw:image xlink:href="Pictures/259.svg" xlink:type="simple" xlink:show="embed" xlink:actuate="onLoad"/></draw:frame></text:p>
          </table:table-cell>
          <table:table-cell table:style-name="TableRowCell" office:value-type="string">
            <text:p text:style-name="Table_20_Contents">LockMarker</text:p>
          </table:table-cell>
        </table:table-row>
        <table:table-row>
          <table:table-cell table:style-name="TableRowCell" office:value-type="string">
            <text:p text:style-name="Table_20_Contents">LockPos</text:p>
          </table:table-cell>
          <table:table-cell table:style-name="TableRowCell" office:value-type="string">
            <text:p text:style-name="Table_20_Contents"><text:a xlink:type="simple" xlink:href="../../viewer/style/icons.less#L207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1" svg:width="0.41667in" svg:height="0.4166666666666667in"><draw:image xlink:href="Pictures/260.svg" xlink:type="simple" xlink:show="embed" xlink:actuate="onLoad"/></draw:frame></text:p>
          </table:table-cell>
          <table:table-cell table:style-name="TableRowCell" office:value-type="string">
            <text:p text:style-name="Table_20_Contents">LockPos</text:p>
          </table:table-cell>
        </table:table-row>
        <table:table-row>
          <table:table-cell table:style-name="TableRowCell" office:value-type="string">
            <text:p text:style-name="Table_20_Contents">Log</text:p>
          </table:table-cell>
          <table:table-cell table:style-name="TableRowCell" office:value-type="string">
            <text:p text:style-name="Table_20_Contents"><text:a xlink:type="simple" xlink:href="../../viewer/style/icons.less#L243" office:name=""><text:span text:style-name="Definition">ic_text_snippet.svg</text:span></text:a></text:p>
          </table:table-cell>
          <table:table-cell table:style-name="TableRowCell" office:value-type="string">
            <text:p text:style-name="Table_20_Contents"><draw:frame draw:name="img262" svg:width="0.41667in" svg:height="0.4166666666666667in"><draw:image xlink:href="Pictures/261.svg" xlink:type="simple" xlink:show="embed" xlink:actuate="onLoad"/></draw:frame></text:p>
          </table:table-cell>
          <table:table-cell table:style-name="TableRowCell" office:value-type="string">
            <text:p text:style-name="Table_20_Contents">StatusLog,DBLog</text:p>
          </table:table-cell>
        </table:table-row>
        <table:table-row>
          <table:table-cell table:style-name="TableRowCell" office:value-type="string">
            <text:p text:style-name="Table_20_Contents">MNCatNav</text:p>
          </table:table-cell>
          <table:table-cell table:style-name="TableRowCell" office:value-type="string">
            <text:p text:style-name="Table_20_Contents"><text:a xlink:type="simple" xlink:href="../../viewer/style/icons.less#L383" office:name=""><text:span text:style-name="Definition">boat.svg</text:span></text:a></text:p>
          </table:table-cell>
          <table:table-cell table:style-name="TableRowCell" office:value-type="string">
            <text:p text:style-name="Table_20_Contents"><draw:frame draw:name="img263" svg:width="0.41667in" svg:height="0.4166666666666667in"><draw:image xlink:href="Pictures/262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atSet</text:p>
          </table:table-cell>
          <table:table-cell table:style-name="TableRowCell" office:value-type="string">
            <text:p text:style-name="Table_20_Contents"><text:a xlink:type="simple" xlink:href="../../viewer/style/icons.less#L386" office:name=""><text:span text:style-name="Definition">build-200.svg</text:span></text:a></text:p>
          </table:table-cell>
          <table:table-cell table:style-name="TableRowCell" office:value-type="string">
            <text:p text:style-name="Table_20_Contents"><draw:frame draw:name="img264" svg:width="0.41667in" svg:height="0.4166666666666667in"><draw:image xlink:href="Pictures/263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Collapsed</text:p>
          </table:table-cell>
          <table:table-cell table:style-name="TableRowCell" office:value-type="string">
            <text:p text:style-name="Table_20_Contents"><text:a xlink:type="simple" xlink:href="../../viewer/style/icons.less#L375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5" svg:width="0.41667in" svg:height="0.4166666666666667in"><draw:image xlink:href="Pictures/26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NExpanded</text:p>
          </table:table-cell>
          <table:table-cell table:style-name="TableRowCell" office:value-type="string">
            <text:p text:style-name="Table_20_Contents"><text:a xlink:type="simple" xlink:href="../../viewer/style/icons.less#L379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266" svg:width="0.41667in" svg:height="0.4166666666666667in"><draw:image xlink:href="Pictures/26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OB</text:p>
          </table:table-cell>
          <table:table-cell table:style-name="TableRowCell" office:value-type="string">
            <text:p text:style-name="Table_20_Contents"><text:a xlink:type="simple" xlink:href="../../viewer/style/icons.less#L225" office:name=""><text:span text:style-name="Definition">drowning.svg</text:span></text:a></text:p>
          </table:table-cell>
          <table:table-cell table:style-name="TableRowCell" office:value-type="string">
            <text:p text:style-name="Table_20_Contents"><draw:frame draw:name="img267" svg:width="0.41667in" svg:height="0.4166666666666667in"><draw:image xlink:href="Pictures/266.svg" xlink:type="simple" xlink:show="embed" xlink:actuate="onLoad"/></draw:frame></text:p>
          </table:table-cell>
          <table:table-cell table:style-name="TableRowCell" office:value-type="string">
            <text:p text:style-name="Table_20_Contents">MOB</text:p>
          </table:table-cell>
        </table:table-row>
        <table:table-row>
          <table:table-cell table:style-name="TableRowCell" office:value-type="string">
            <text:p text:style-name="Table_20_Contents">MainNav</text:p>
          </table:table-cell>
          <table:table-cell table:style-name="TableRowCell" office:value-type="string">
            <text:p text:style-name="Table_20_Contents"><text:a xlink:type="simple" xlink:href="../../viewer/style/icons.less#L273" office:name=""><text:span text:style-name="Definition">menu-200.svg</text:span></text:a></text:p>
          </table:table-cell>
          <table:table-cell table:style-name="TableRowCell" office:value-type="string">
            <text:p text:style-name="Table_20_Contents"><draw:frame draw:name="img268" svg:width="0.41667in" svg:height="0.4166666666666667in"><draw:image xlink:href="Pictures/267.svg" xlink:type="simple" xlink:show="embed" xlink:actuate="onLoad"/></draw:frame></text:p>
          </table:table-cell>
          <table:table-cell table:style-name="TableRowCell" office:value-type="string">
            <text:p text:style-name="Table_20_Contents">MainNav</text:p>
          </table:table-cell>
        </table:table-row>
        <table:table-row>
          <table:table-cell table:style-name="TableRowCell" office:value-type="string">
            <text:p text:style-name="Table_20_Contents">Measure</text:p>
          </table:table-cell>
          <table:table-cell table:style-name="TableRowCell" office:value-type="string">
            <text:p text:style-name="Table_20_Contents"><text:a xlink:type="simple" xlink:href="../../viewer/style/icons.less#L346" office:name=""><text:span text:style-name="Definition">straighten.svg</text:span></text:a></text:p>
          </table:table-cell>
          <table:table-cell table:style-name="TableRowCell" office:value-type="string">
            <text:p text:style-name="Table_20_Contents"><draw:frame draw:name="img269" svg:width="0.41667in" svg:height="0.4166666666666667in"><draw:image xlink:href="Pictures/268.svg" xlink:type="simple" xlink:show="embed" xlink:actuate="onLoad"/></draw:frame></text:p>
          </table:table-cell>
          <table:table-cell table:style-name="TableRowCell" office:value-type="string">
            <text:p text:style-name="Table_20_Contents">ABShowMeasure,Measure,MeasureAdd,code</text:p>
          </table:table-cell>
        </table:table-row>
        <table:table-row>
          <table:table-cell table:style-name="TableRowCell" office:value-type="string">
            <text:p text:style-name="Table_20_Contents">MeasureFlag</text:p>
          </table:table-cell>
          <table:table-cell table:style-name="TableRowCell" office:value-type="string">
            <text:p text:style-name="Table_20_Contents"><text:a xlink:type="simple" xlink:href="../../viewer/style/icons.less#L352" office:name=""><text:span text:style-name="Definition">outlined_flag.svg</text:span></text:a></text:p>
          </table:table-cell>
          <table:table-cell table:style-name="TableRowCell" office:value-type="string">
            <text:p text:style-name="Table_20_Contents"><draw:frame draw:name="img270" svg:width="0.41667in" svg:height="0.4166666666666667in"><draw:image xlink:href="Pictures/26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MeasureOff</text:p>
          </table:table-cell>
          <table:table-cell table:style-name="TableRowCell" office:value-type="string">
            <text:p text:style-name="Table_20_Contents"><text:a xlink:type="simple" xlink:href="../../viewer/style/icons.less#L349" office:name=""><text:span text:style-name="Definition">straighten-off.svg</text:span></text:a></text:p>
          </table:table-cell>
          <table:table-cell table:style-name="TableRowCell" office:value-type="string">
            <text:p text:style-name="Table_20_Contents"><draw:frame draw:name="img271" svg:width="0.41667in" svg:height="0.4166666666666667in"><draw:image xlink:href="Pictures/270.svg" xlink:type="simple" xlink:show="embed" xlink:actuate="onLoad"/></draw:frame></text:p>
          </table:table-cell>
          <table:table-cell table:style-name="TableRowCell" office:value-type="string">
            <text:p text:style-name="Table_20_Contents">MeasureOff</text:p>
          </table:table-cell>
        </table:table-row>
        <table:table-row>
          <table:table-cell table:style-name="TableRowCell" office:value-type="string">
            <text:p text:style-name="Table_20_Contents">More</text:p>
          </table:table-cell>
          <table:table-cell table:style-name="TableRowCell" office:value-type="string">
            <text:p text:style-name="Table_20_Contents"><text:a xlink:type="simple" xlink:href="../../viewer/style/icons.less#L360" office:name=""><text:span text:style-name="Definition">ic_chevron_right.svg</text:span></text:a></text:p>
          </table:table-cell>
          <table:table-cell table:style-name="TableRowCell" office:value-type="string">
            <text:p text:style-name="Table_20_Contents"><draw:frame draw:name="img272" svg:width="0.41667in" svg:height="0.4166666666666667in"><draw:image xlink:href="Pictures/27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NavAdd</text:p>
          </table:table-cell>
          <table:table-cell table:style-name="TableRowCell" office:value-type="string">
            <text:p text:style-name="Table_20_Contents"><text:a xlink:type="simple" xlink:href="../../viewer/style/icons.less#L170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3" svg:width="0.41667in" svg:height="0.4166666666666667in"><draw:image xlink:href="Pictures/272.svg" xlink:type="simple" xlink:show="embed" xlink:actuate="onLoad"/></draw:frame></text:p>
          </table:table-cell>
          <table:table-cell table:style-name="TableRowCell" office:value-type="string">
            <text:p text:style-name="Table_20_Contents">NavAdd,DBInsertRouteBefore</text:p>
          </table:table-cell>
        </table:table-row>
        <table:table-row>
          <table:table-cell table:style-name="TableRowCell" office:value-type="string">
            <text:p text:style-name="Table_20_Contents">NavAddAfter</text:p>
          </table:table-cell>
          <table:table-cell table:style-name="TableRowCell" office:value-type="string">
            <text:p text:style-name="Table_20_Contents"><text:a xlink:type="simple" xlink:href="../../viewer/style/icons.less#L173" office:name=""><text:span text:style-name="Definition">wpplus.svg</text:span></text:a></text:p>
          </table:table-cell>
          <table:table-cell table:style-name="TableRowCell" office:value-type="string">
            <text:p text:style-name="Table_20_Contents"><draw:frame draw:name="img274" svg:width="0.41667in" svg:height="0.4166666666666667in"><draw:image xlink:href="Pictures/273.svg" xlink:type="simple" xlink:show="embed" xlink:actuate="onLoad"/></draw:frame></text:p>
          </table:table-cell>
          <table:table-cell table:style-name="TableRowCell" office:value-type="string">
            <text:p text:style-name="Table_20_Contents">NavAddAfter,DBInsertRouteAfter</text:p>
          </table:table-cell>
        </table:table-row>
        <table:table-row>
          <table:table-cell table:style-name="TableRowCell" office:value-type="string">
            <text:p text:style-name="Table_20_Contents">NavDelete</text:p>
          </table:table-cell>
          <table:table-cell table:style-name="TableRowCell" office:value-type="string">
            <text:p text:style-name="Table_20_Contents"><text:a xlink:type="simple" xlink:href="../../viewer/style/icons.less#L177" office:name=""><text:span text:style-name="Definition">wpminus.svg</text:span></text:a></text:p>
          </table:table-cell>
          <table:table-cell table:style-name="TableRowCell" office:value-type="string">
            <text:p text:style-name="Table_20_Contents"><draw:frame draw:name="img275" svg:width="0.41667in" svg:height="0.4166666666666667in"><draw:image xlink:href="Pictures/274.svg" xlink:type="simple" xlink:show="embed" xlink:actuate="onLoad"/></draw:frame></text:p>
          </table:table-cell>
          <table:table-cell table:style-name="TableRowCell" office:value-type="string">
            <text:p text:style-name="Table_20_Contents">NavDelete</text:p>
          </table:table-cell>
        </table:table-row>
        <table:table-row>
          <table:table-cell table:style-name="TableRowCell" office:value-type="string">
            <text:p text:style-name="Table_20_Contents">NavGoto</text:p>
          </table:table-cell>
          <table:table-cell table:style-name="TableRowCell" office:value-type="string">
            <text:p text:style-name="Table_20_Contents"><text:a xlink:type="simple" xlink:href="../../viewer/style/icons.less#L180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276" svg:width="0.41667in" svg:height="0.4166666666666667in"><draw:image xlink:href="Pictures/275.svg" xlink:type="simple" xlink:show="embed" xlink:actuate="onLoad"/></draw:frame></text:p>
          </table:table-cell>
          <table:table-cell table:style-name="TableRowCell" office:value-type="string">
            <text:p text:style-name="Table_20_Contents">NavGoto,DBStartRoute</text:p>
          </table:table-cell>
        </table:table-row>
        <table:table-row>
          <table:table-cell table:style-name="TableRowCell" office:value-type="string">
            <text:p text:style-name="Table_20_Contents">NavMapWidgets</text:p>
          </table:table-cell>
          <table:table-cell table:style-name="TableRowCell" office:value-type="string">
            <text:p text:style-name="Table_20_Contents"><text:a xlink:type="simple" xlink:href="../../viewer/style/icons.less#L261" office:name=""><text:span text:style-name="Definition">assistant_nav.svg</text:span></text:a></text:p>
          </table:table-cell>
          <table:table-cell table:style-name="TableRowCell" office:value-type="string">
            <text:p text:style-name="Table_20_Contents"><draw:frame draw:name="img277" svg:width="0.41667in" svg:height="0.4166666666666667in"><draw:image xlink:href="Pictures/276.svg" xlink:type="simple" xlink:show="embed" xlink:actuate="onLoad"/></draw:frame></text:p>
          </table:table-cell>
          <table:table-cell table:style-name="TableRowCell" office:value-type="string">
            <text:p text:style-name="Table_20_Contents">NavMapWidgets</text:p>
          </table:table-cell>
        </table:table-row>
        <table:table-row>
          <table:table-cell table:style-name="TableRowCell" office:value-type="string">
            <text:p text:style-name="Table_20_Contents">NavNext</text:p>
          </table:table-cell>
          <table:table-cell table:style-name="TableRowCell" office:value-type="string">
            <text:p text:style-name="Table_20_Contents"><text:a xlink:type="simple" xlink:href="../../viewer/style/icons.less#L161" office:name=""><text:span text:style-name="Definition">nextwp.svg</text:span></text:a></text:p>
          </table:table-cell>
          <table:table-cell table:style-name="TableRowCell" office:value-type="string">
            <text:p text:style-name="Table_20_Contents"><draw:frame draw:name="img278" svg:width="0.41667in" svg:height="0.4166666666666667in"><draw:image xlink:href="Pictures/277.svg" xlink:type="simple" xlink:show="embed" xlink:actuate="onLoad"/></draw:frame></text:p>
          </table:table-cell>
          <table:table-cell table:style-name="TableRowCell" office:value-type="string">
            <text:p text:style-name="Table_20_Contents">NavNext</text:p>
          </table:table-cell>
        </table:table-row>
        <table:table-row>
          <table:table-cell table:style-name="TableRowCell" office:value-type="string">
            <text:p text:style-name="Table_20_Contents">NavRestart</text:p>
          </table:table-cell>
          <table:table-cell table:style-name="TableRowCell" office:value-type="string">
            <text:p text:style-name="Table_20_Contents"><text:a xlink:type="simple" xlink:href="../../viewer/style/icons.less#L155" office:name=""><text:span text:style-name="Definition">navrestart.svg</text:span></text:a></text:p>
          </table:table-cell>
          <table:table-cell table:style-name="TableRowCell" office:value-type="string">
            <text:p text:style-name="Table_20_Contents"><draw:frame draw:name="img279" svg:width="0.41667in" svg:height="0.4166666666666667in"><draw:image xlink:href="Pictures/278.svg" xlink:type="simple" xlink:show="embed" xlink:actuate="onLoad"/></draw:frame></text:p>
          </table:table-cell>
          <table:table-cell table:style-name="TableRowCell" office:value-type="string">
            <text:p text:style-name="Table_20_Contents">NavRestart</text:p>
          </table:table-cell>
        </table:table-row>
        <table:table-row>
          <table:table-cell table:style-name="TableRowCell" office:value-type="string">
            <text:p text:style-name="Table_20_Contents">NavStop</text:p>
          </table:table-cell>
          <table:table-cell table:style-name="TableRowCell" office:value-type="string">
            <text:p text:style-name="Table_20_Contents"><text:a xlink:type="simple" xlink:href="../../viewer/style/icons.less#L183" office:name=""><text:span text:style-name="Definition">stop-nav.svg</text:span></text:a></text:p>
          </table:table-cell>
          <table:table-cell table:style-name="TableRowCell" office:value-type="string">
            <text:p text:style-name="Table_20_Contents"><draw:frame draw:name="img280" svg:width="0.41667in" svg:height="0.4166666666666667in"><draw:image xlink:href="Pictures/279.svg" xlink:type="simple" xlink:show="embed" xlink:actuate="onLoad"/></draw:frame></text:p>
          </table:table-cell>
          <table:table-cell table:style-name="TableRowCell" office:value-type="string">
            <text:p text:style-name="Table_20_Contents">StopNav,code</text:p>
          </table:table-cell>
        </table:table-row>
        <table:table-row>
          <table:table-cell table:style-name="TableRowCell" office:value-type="string">
            <text:p text:style-name="Table_20_Contents">Navigation</text:p>
          </table:table-cell>
          <table:table-cell table:style-name="TableRowCell" office:value-type="string">
            <text:p text:style-name="Table_20_Contents"><text:a xlink:type="simple" xlink:href="../../viewer/style/icons.less#L195" office:name=""><text:span text:style-name="Definition">navigation.svg</text:span></text:a></text:p>
          </table:table-cell>
          <table:table-cell table:style-name="TableRowCell" office:value-type="string">
            <text:p text:style-name="Table_20_Contents"><draw:frame draw:name="img281" svg:width="0.41667in" svg:height="0.4166666666666667in"><draw:image xlink:href="Pictures/280.svg" xlink:type="simple" xlink:show="embed" xlink:actuate="onLoad"/></draw:frame></text:p>
          </table:table-cell>
          <table:table-cell table:style-name="TableRowCell" office:value-type="string">
            <text:p text:style-name="Table_20_Contents">NavActions</text:p>
          </table:table-cell>
        </table:table-row>
        <table:table-row>
          <table:table-cell table:style-name="TableRowCell" office:value-type="string">
            <text:p text:style-name="Table_20_Contents">Night</text:p>
          </table:table-cell>
          <table:table-cell table:style-name="TableRowCell" office:value-type="string">
            <text:p text:style-name="Table_20_Contents"><text:a xlink:type="simple" xlink:href="../../viewer/style/icons.less#L119" office:name=""><text:span text:style-name="Definition">night.svg</text:span></text:a></text:p>
          </table:table-cell>
          <table:table-cell table:style-name="TableRowCell" office:value-type="string">
            <text:p text:style-name="Table_20_Contents"><draw:frame draw:name="img282" svg:width="0.41667in" svg:height="0.4166666666666667in"><draw:image xlink:href="Pictures/281.svg" xlink:type="simple" xlink:show="embed" xlink:actuate="onLoad"/></draw:frame></text:p>
          </table:table-cell>
          <table:table-cell table:style-name="TableRowCell" office:value-type="string">
            <text:p text:style-name="Table_20_Contents">Night</text:p>
          </table:table-cell>
        </table:table-row>
        <table:table-row>
          <table:table-cell table:style-name="TableRowCell" office:value-type="string">
            <text:p text:style-name="Table_20_Contents">Num1</text:p>
          </table:table-cell>
          <table:table-cell table:style-name="TableRowCell" office:value-type="string">
            <text:p text:style-name="Table_20_Contents"><text:a xlink:type="simple" xlink:href="../../viewer/style/icons.less#L43" office:name=""><text:span text:style-name="Definition">num-1.svg</text:span></text:a></text:p>
          </table:table-cell>
          <table:table-cell table:style-name="TableRowCell" office:value-type="string">
            <text:p text:style-name="Table_20_Contents"><draw:frame draw:name="img283" svg:width="0.41667in" svg:height="0.4166666666666667in"><draw:image xlink:href="Pictures/282.svg" xlink:type="simple" xlink:show="embed" xlink:actuate="onLoad"/></draw:frame></text:p>
          </table:table-cell>
          <table:table-cell table:style-name="TableRowCell" office:value-type="string">
            <text:p text:style-name="Table_20_Contents">Gps1</text:p>
          </table:table-cell>
        </table:table-row>
        <table:table-row>
          <table:table-cell table:style-name="TableRowCell" office:value-type="string">
            <text:p text:style-name="Table_20_Contents">Num10</text:p>
          </table:table-cell>
          <table:table-cell table:style-name="TableRowCell" office:value-type="string">
            <text:p text:style-name="Table_20_Contents"><text:a xlink:type="simple" xlink:href="../../viewer/style/icons.less#L70" office:name=""><text:span text:style-name="Definition">num-10.svg</text:span></text:a></text:p>
          </table:table-cell>
          <table:table-cell table:style-name="TableRowCell" office:value-type="string">
            <text:p text:style-name="Table_20_Contents"><draw:frame draw:name="img284" svg:width="0.41667in" svg:height="0.4166666666666667in"><draw:image xlink:href="Pictures/283.svg" xlink:type="simple" xlink:show="embed" xlink:actuate="onLoad"/></draw:frame></text:p>
          </table:table-cell>
          <table:table-cell table:style-name="TableRowCell" office:value-type="string">
            <text:p text:style-name="Table_20_Contents">Gps10</text:p>
          </table:table-cell>
        </table:table-row>
        <table:table-row>
          <table:table-cell table:style-name="TableRowCell" office:value-type="string">
            <text:p text:style-name="Table_20_Contents">Num2</text:p>
          </table:table-cell>
          <table:table-cell table:style-name="TableRowCell" office:value-type="string">
            <text:p text:style-name="Table_20_Contents"><text:a xlink:type="simple" xlink:href="../../viewer/style/icons.less#L46" office:name=""><text:span text:style-name="Definition">num-2.svg</text:span></text:a></text:p>
          </table:table-cell>
          <table:table-cell table:style-name="TableRowCell" office:value-type="string">
            <text:p text:style-name="Table_20_Contents"><draw:frame draw:name="img285" svg:width="0.41667in" svg:height="0.4166666666666667in"><draw:image xlink:href="Pictures/284.svg" xlink:type="simple" xlink:show="embed" xlink:actuate="onLoad"/></draw:frame></text:p>
          </table:table-cell>
          <table:table-cell table:style-name="TableRowCell" office:value-type="string">
            <text:p text:style-name="Table_20_Contents">Gps2</text:p>
          </table:table-cell>
        </table:table-row>
        <table:table-row>
          <table:table-cell table:style-name="TableRowCell" office:value-type="string">
            <text:p text:style-name="Table_20_Contents">Num3</text:p>
          </table:table-cell>
          <table:table-cell table:style-name="TableRowCell" office:value-type="string">
            <text:p text:style-name="Table_20_Contents"><text:a xlink:type="simple" xlink:href="../../viewer/style/icons.less#L49" office:name=""><text:span text:style-name="Definition">num-3.svg</text:span></text:a></text:p>
          </table:table-cell>
          <table:table-cell table:style-name="TableRowCell" office:value-type="string">
            <text:p text:style-name="Table_20_Contents"><draw:frame draw:name="img286" svg:width="0.41667in" svg:height="0.4166666666666667in"><draw:image xlink:href="Pictures/285.svg" xlink:type="simple" xlink:show="embed" xlink:actuate="onLoad"/></draw:frame></text:p>
          </table:table-cell>
          <table:table-cell table:style-name="TableRowCell" office:value-type="string">
            <text:p text:style-name="Table_20_Contents">Gps3</text:p>
          </table:table-cell>
        </table:table-row>
        <table:table-row>
          <table:table-cell table:style-name="TableRowCell" office:value-type="string">
            <text:p text:style-name="Table_20_Contents">Num4</text:p>
          </table:table-cell>
          <table:table-cell table:style-name="TableRowCell" office:value-type="string">
            <text:p text:style-name="Table_20_Contents"><text:a xlink:type="simple" xlink:href="../../viewer/style/icons.less#L52" office:name=""><text:span text:style-name="Definition">num-4.svg</text:span></text:a></text:p>
          </table:table-cell>
          <table:table-cell table:style-name="TableRowCell" office:value-type="string">
            <text:p text:style-name="Table_20_Contents"><draw:frame draw:name="img287" svg:width="0.41667in" svg:height="0.4166666666666667in"><draw:image xlink:href="Pictures/286.svg" xlink:type="simple" xlink:show="embed" xlink:actuate="onLoad"/></draw:frame></text:p>
          </table:table-cell>
          <table:table-cell table:style-name="TableRowCell" office:value-type="string">
            <text:p text:style-name="Table_20_Contents">Gps4</text:p>
          </table:table-cell>
        </table:table-row>
        <table:table-row>
          <table:table-cell table:style-name="TableRowCell" office:value-type="string">
            <text:p text:style-name="Table_20_Contents">Num5</text:p>
          </table:table-cell>
          <table:table-cell table:style-name="TableRowCell" office:value-type="string">
            <text:p text:style-name="Table_20_Contents"><text:a xlink:type="simple" xlink:href="../../viewer/style/icons.less#L55" office:name=""><text:span text:style-name="Definition">num-5.svg</text:span></text:a></text:p>
          </table:table-cell>
          <table:table-cell table:style-name="TableRowCell" office:value-type="string">
            <text:p text:style-name="Table_20_Contents"><draw:frame draw:name="img288" svg:width="0.41667in" svg:height="0.4166666666666667in"><draw:image xlink:href="Pictures/287.svg" xlink:type="simple" xlink:show="embed" xlink:actuate="onLoad"/></draw:frame></text:p>
          </table:table-cell>
          <table:table-cell table:style-name="TableRowCell" office:value-type="string">
            <text:p text:style-name="Table_20_Contents">Gps5</text:p>
          </table:table-cell>
        </table:table-row>
        <table:table-row>
          <table:table-cell table:style-name="TableRowCell" office:value-type="string">
            <text:p text:style-name="Table_20_Contents">Num6</text:p>
          </table:table-cell>
          <table:table-cell table:style-name="TableRowCell" office:value-type="string">
            <text:p text:style-name="Table_20_Contents"><text:a xlink:type="simple" xlink:href="../../viewer/style/icons.less#L58" office:name=""><text:span text:style-name="Definition">num-6.svg</text:span></text:a></text:p>
          </table:table-cell>
          <table:table-cell table:style-name="TableRowCell" office:value-type="string">
            <text:p text:style-name="Table_20_Contents"><draw:frame draw:name="img289" svg:width="0.41667in" svg:height="0.4166666666666667in"><draw:image xlink:href="Pictures/288.svg" xlink:type="simple" xlink:show="embed" xlink:actuate="onLoad"/></draw:frame></text:p>
          </table:table-cell>
          <table:table-cell table:style-name="TableRowCell" office:value-type="string">
            <text:p text:style-name="Table_20_Contents">Gps6</text:p>
          </table:table-cell>
        </table:table-row>
        <table:table-row>
          <table:table-cell table:style-name="TableRowCell" office:value-type="string">
            <text:p text:style-name="Table_20_Contents">Num7</text:p>
          </table:table-cell>
          <table:table-cell table:style-name="TableRowCell" office:value-type="string">
            <text:p text:style-name="Table_20_Contents"><text:a xlink:type="simple" xlink:href="../../viewer/style/icons.less#L61" office:name=""><text:span text:style-name="Definition">num-7.svg</text:span></text:a></text:p>
          </table:table-cell>
          <table:table-cell table:style-name="TableRowCell" office:value-type="string">
            <text:p text:style-name="Table_20_Contents"><draw:frame draw:name="img290" svg:width="0.41667in" svg:height="0.4166666666666667in"><draw:image xlink:href="Pictures/289.svg" xlink:type="simple" xlink:show="embed" xlink:actuate="onLoad"/></draw:frame></text:p>
          </table:table-cell>
          <table:table-cell table:style-name="TableRowCell" office:value-type="string">
            <text:p text:style-name="Table_20_Contents">Gps7</text:p>
          </table:table-cell>
        </table:table-row>
        <table:table-row>
          <table:table-cell table:style-name="TableRowCell" office:value-type="string">
            <text:p text:style-name="Table_20_Contents">Num8</text:p>
          </table:table-cell>
          <table:table-cell table:style-name="TableRowCell" office:value-type="string">
            <text:p text:style-name="Table_20_Contents"><text:a xlink:type="simple" xlink:href="../../viewer/style/icons.less#L64" office:name=""><text:span text:style-name="Definition">num-8.svg</text:span></text:a></text:p>
          </table:table-cell>
          <table:table-cell table:style-name="TableRowCell" office:value-type="string">
            <text:p text:style-name="Table_20_Contents"><draw:frame draw:name="img291" svg:width="0.41667in" svg:height="0.4166666666666667in"><draw:image xlink:href="Pictures/290.svg" xlink:type="simple" xlink:show="embed" xlink:actuate="onLoad"/></draw:frame></text:p>
          </table:table-cell>
          <table:table-cell table:style-name="TableRowCell" office:value-type="string">
            <text:p text:style-name="Table_20_Contents">Gps8</text:p>
          </table:table-cell>
        </table:table-row>
        <table:table-row>
          <table:table-cell table:style-name="TableRowCell" office:value-type="string">
            <text:p text:style-name="Table_20_Contents">Num9</text:p>
          </table:table-cell>
          <table:table-cell table:style-name="TableRowCell" office:value-type="string">
            <text:p text:style-name="Table_20_Contents"><text:a xlink:type="simple" xlink:href="../../viewer/style/icons.less#L67" office:name=""><text:span text:style-name="Definition">num-9.svg</text:span></text:a></text:p>
          </table:table-cell>
          <table:table-cell table:style-name="TableRowCell" office:value-type="string">
            <text:p text:style-name="Table_20_Contents"><draw:frame draw:name="img292" svg:width="0.41667in" svg:height="0.4166666666666667in"><draw:image xlink:href="Pictures/291.svg" xlink:type="simple" xlink:show="embed" xlink:actuate="onLoad"/></draw:frame></text:p>
          </table:table-cell>
          <table:table-cell table:style-name="TableRowCell" office:value-type="string">
            <text:p text:style-name="Table_20_Contents">Gps9</text:p>
          </table:table-cell>
        </table:table-row>
        <table:table-row>
          <table:table-cell table:style-name="TableRowCell" office:value-type="string">
            <text:p text:style-name="Table_20_Contents">Ok</text:p>
          </table:table-cell>
          <table:table-cell table:style-name="TableRowCell" office:value-type="string">
            <text:p text:style-name="Table_20_Contents"><text:a xlink:type="simple" xlink:href="../../viewer/style/icons.less#L282" office:name=""><text:span text:style-name="Definition">ic_done.svg</text:span></text:a></text:p>
          </table:table-cell>
          <table:table-cell table:style-name="TableRowCell" office:value-type="string">
            <text:p text:style-name="Table_20_Contents"><draw:frame draw:name="img293" svg:width="0.41667in" svg:height="0.4166666666666667in"><draw:image xlink:href="Pictures/292.svg" xlink:type="simple" xlink:show="embed" xlink:actuate="onLoad"/></draw:frame></text:p>
          </table:table-cell>
          <table:table-cell table:style-name="TableRowCell" office:value-type="string">
            <text:p text:style-name="Table_20_Contents">DBOk,DBUpdate,DBAccept</text:p>
          </table:table-cell>
        </table:table-row>
        <table:table-row>
          <table:table-cell table:style-name="TableRowCell" office:value-type="string">
            <text:p text:style-name="Table_20_Contents">Open</text:p>
          </table:table-cell>
          <table:table-cell table:style-name="TableRowCell" office:value-type="string">
            <text:p text:style-name="Table_20_Contents"><text:a xlink:type="simple" xlink:href="../../viewer/style/icons.less#L267" office:name=""><text:span text:style-name="Definition">ic_open.svg</text:span></text:a></text:p>
          </table:table-cell>
          <table:table-cell table:style-name="TableRowCell" office:value-type="string">
            <text:p text:style-name="Table_20_Contents"><draw:frame draw:name="img294" svg:width="0.41667in" svg:height="0.4166666666666667in"><draw:image xlink:href="Pictures/293.svg" xlink:type="simple" xlink:show="embed" xlink:actuate="onLoad"/></draw:frame></text:p>
          </table:table-cell>
          <table:table-cell table:style-name="TableRowCell" office:value-type="string">
            <text:p text:style-name="Table_20_Contents">SettingsLoad,DBLoadRoute,DBActivate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<text:a xlink:type="simple" xlink:href="../../viewer/style/icons.less#L279" office:name=""><text:span text:style-name="Definition">more_left.svg</text:span></text:a></text:p>
          </table:table-cell>
          <table:table-cell table:style-name="TableRowCell" office:value-type="string">
            <text:p text:style-name="Table_20_Contents"><draw:frame draw:name="img295" svg:width="0.41667in" svg:height="0.4166666666666667in"><draw:image xlink:href="Pictures/294.svg" xlink:type="simple" xlink:show="embed" xlink:actuate="onLoad"/></draw:frame></text:p>
          </table:table-cell>
          <table:table-cell table:style-name="TableRowCell" office:value-type="string">
            <text:p text:style-name="Table_20_Contents">Overflow</text:p>
          </table:table-cell>
        </table:table-row>
        <table:table-row>
          <table:table-cell table:style-name="TableRowCell" office:value-type="string">
            <text:p text:style-name="Table_20_Contents">Overlays</text:p>
          </table:table-cell>
          <table:table-cell table:style-name="TableRowCell" office:value-type="string">
            <text:p text:style-name="Table_20_Contents"><text:a xlink:type="simple" xlink:href="../../viewer/style/icons.less#L16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296" svg:width="0.41667in" svg:height="0.4166666666666667in"><draw:image xlink:href="Pictures/295.svg" xlink:type="simple" xlink:show="embed" xlink:actuate="onLoad"/></draw:frame></text:p>
          </table:table-cell>
          <table:table-cell table:style-name="TableRowCell" office:value-type="string">
            <text:p text:style-name="Table_20_Contents">OverlaysView,DBShowOverlays,DBShowAllOverlays,DBOverlays,code</text:p>
          </table:table-cell>
        </table:table-row>
        <table:table-row>
          <table:table-cell table:style-name="TableRowCell" office:value-type="string">
            <text:p text:style-name="Table_20_Contents">Plugins</text:p>
          </table:table-cell>
          <table:table-cell table:style-name="TableRowCell" office:value-type="string">
            <text:p text:style-name="Table_20_Contents"><text:a xlink:type="simple" xlink:href="../../viewer/style/icons.less#L37" office:name=""><text:span text:style-name="Definition">extension.svg</text:span></text:a></text:p>
          </table:table-cell>
          <table:table-cell table:style-name="TableRowCell" office:value-type="string">
            <text:p text:style-name="Table_20_Contents"><draw:frame draw:name="img297" svg:width="0.41667in" svg:height="0.4166666666666667in"><draw:image xlink:href="Pictures/29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Plus</text:p>
          </table:table-cell>
          <table:table-cell table:style-name="TableRowCell" office:value-type="string">
            <text:p text:style-name="Table_20_Contents"><text:a xlink:type="simple" xlink:href="../../viewer/style/icons.less#L80" office:name=""><text:span text:style-name="Definition">ic_add.svg</text:span></text:a></text:p>
          </table:table-cell>
          <table:table-cell table:style-name="TableRowCell" office:value-type="string">
            <text:p text:style-name="Table_20_Contents"><draw:frame draw:name="img298" svg:width="0.41667in" svg:height="0.4166666666666667in"><draw:image xlink:href="Pictures/297.svg" xlink:type="simple" xlink:show="embed" xlink:actuate="onLoad"/></draw:frame></text:p>
          </table:table-cell>
          <table:table-cell table:style-name="TableRowCell" office:value-type="string">
            <text:p text:style-name="Table_20_Contents">AddonConfigPlus,StatusAdd,RouteAdd,CreateFile,DBAdd,DBNew,DBNewRoute,DBAddSub</text:p>
          </table:table-cell>
        </table:table-row>
        <table:table-row>
          <table:table-cell table:style-name="TableRowCell" office:value-type="string">
            <text:p text:style-name="Table_20_Contents">Propose</text:p>
          </table:table-cell>
          <table:table-cell table:style-name="TableRowCell" office:value-type="string">
            <text:p text:style-name="Table_20_Contents"><text:a xlink:type="simple" xlink:href="../../viewer/style/icons.less#L331" office:name=""><text:span text:style-name="Definition">prompt_suggestion.svg</text:span></text:a></text:p>
          </table:table-cell>
          <table:table-cell table:style-name="TableRowCell" office:value-type="string">
            <text:p text:style-name="Table_20_Contents"><draw:frame draw:name="img299" svg:width="0.41667in" svg:height="0.4166666666666667in"><draw:image xlink:href="Pictures/298.svg" xlink:type="simple" xlink:show="embed" xlink:actuate="onLoad"/></draw:frame></text:p>
          </table:table-cell>
          <table:table-cell table:style-name="TableRowCell" office:value-type="string">
            <text:p text:style-name="Table_20_Contents">DBPropose</text:p>
          </table:table-cell>
        </table:table-row>
        <table:table-row>
          <table:table-cell table:style-name="TableRowCell" office:value-type="string">
            <text:p text:style-name="Table_20_Contents">QRCode</text:p>
          </table:table-cell>
          <table:table-cell table:style-name="TableRowCell" office:value-type="string">
            <text:p text:style-name="Table_20_Contents"><text:a xlink:type="simple" xlink:href="../../viewer/style/icons.less#L237" office:name=""><text:span text:style-name="Definition">qrcode.svg</text:span></text:a></text:p>
          </table:table-cell>
          <table:table-cell table:style-name="TableRowCell" office:value-type="string">
            <text:p text:style-name="Table_20_Contents"><draw:frame draw:name="img300" svg:width="0.41667in" svg:height="0.4166666666666667in"><draw:image xlink:href="Pictures/299.svg" xlink:type="simple" xlink:show="embed" xlink:actuate="onLoad"/></draw:frame></text:p>
          </table:table-cell>
          <table:table-cell table:style-name="TableRowCell" office:value-type="string">
            <text:p text:style-name="Table_20_Contents">StatusAddresses</text:p>
          </table:table-cell>
        </table:table-row>
        <table:table-row>
          <table:table-cell table:style-name="TableRowCell" office:value-type="string">
            <text:p text:style-name="Table_20_Contents">RadioChecked</text:p>
          </table:table-cell>
          <table:table-cell table:style-name="TableRowCell" office:value-type="string">
            <text:p text:style-name="Table_20_Contents"><text:a xlink:type="simple" xlink:href="../../viewer/style/icons.less#L372" office:name=""><text:span text:style-name="Definition">radio_button_checked.svg</text:span></text:a></text:p>
          </table:table-cell>
          <table:table-cell table:style-name="TableRowCell" office:value-type="string">
            <text:p text:style-name="Table_20_Contents"><draw:frame draw:name="img301" svg:width="0.41667in" svg:height="0.4166666666666667in"><draw:image xlink:href="Pictures/300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adioUnchecked</text:p>
          </table:table-cell>
          <table:table-cell table:style-name="TableRowCell" office:value-type="string">
            <text:p text:style-name="Table_20_Contents"><text:a xlink:type="simple" xlink:href="../../viewer/style/icons.less#L369" office:name=""><text:span text:style-name="Definition">radio_button_unchecked.svg</text:span></text:a></text:p>
          </table:table-cell>
          <table:table-cell table:style-name="TableRowCell" office:value-type="string">
            <text:p text:style-name="Table_20_Contents"><draw:frame draw:name="img302" svg:width="0.41667in" svg:height="0.4166666666666667in"><draw:image xlink:href="Pictures/301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eload</text:p>
          </table:table-cell>
          <table:table-cell table:style-name="TableRowCell" office:value-type="string">
            <text:p text:style-name="Table_20_Contents"><text:a xlink:type="simple" xlink:href="../../viewer/style/icons.less#L131" office:name=""><text:span text:style-name="Definition">ic_refresh.svg</text:span></text:a></text:p>
          </table:table-cell>
          <table:table-cell table:style-name="TableRowCell" office:value-type="string">
            <text:p text:style-name="Table_20_Contents"><draw:frame draw:name="img303" svg:width="0.41667in" svg:height="0.4166666666666667in"><draw:image xlink:href="Pictures/302.svg" xlink:type="simple" xlink:show="embed" xlink:actuate="onLoad"/></draw:frame></text:p>
          </table:table-cell>
          <table:table-cell table:style-name="TableRowCell" office:value-type="string">
            <text:p text:style-name="Table_20_Contents">ReloadUI,StatusRestart,DBReload,DBRestart,DBAutoReload</text:p>
          </table:table-cell>
        </table:table-row>
        <table:table-row>
          <table:table-cell table:style-name="TableRowCell" office:value-type="string">
            <text:p text:style-name="Table_20_Contents">RemoteChannel</text:p>
          </table:table-cell>
          <table:table-cell table:style-name="TableRowCell" office:value-type="string">
            <text:p text:style-name="Table_20_Contents"><text:a xlink:type="simple" xlink:href="../../viewer/style/icons.less#L122" office:name=""><text:span text:style-name="Definition">settings_remote.svg</text:span></text:a></text:p>
          </table:table-cell>
          <table:table-cell table:style-name="TableRowCell" office:value-type="string">
            <text:p text:style-name="Table_20_Contents"><draw:frame draw:name="img304" svg:width="0.41667in" svg:height="0.4166666666666667in"><draw:image xlink:href="Pictures/303.svg" xlink:type="simple" xlink:show="embed" xlink:actuate="onLoad"/></draw:frame></text:p>
          </table:table-cell>
          <table:table-cell table:style-name="TableRowCell" office:value-type="string">
            <text:p text:style-name="Table_20_Contents">RemoteChannel</text:p>
          </table:table-cell>
        </table:table-row>
        <table:table-row>
          <table:table-cell table:style-name="TableRowCell" office:value-type="string">
            <text:p text:style-name="Table_20_Contents">RenumberRoute</text:p>
          </table:table-cell>
          <table:table-cell table:style-name="TableRowCell" office:value-type="string">
            <text:p text:style-name="Table_20_Contents"><text:a xlink:type="simple" xlink:href="../../viewer/style/icons.less#L322" office:name=""><text:span text:style-name="Definition">format_list_numbered.svg</text:span></text:a></text:p>
          </table:table-cell>
          <table:table-cell table:style-name="TableRowCell" office:value-type="string">
            <text:p text:style-name="Table_20_Contents"><draw:frame draw:name="img305" svg:width="0.41667in" svg:height="0.4166666666666667in"><draw:image xlink:href="Pictures/304.svg" xlink:type="simple" xlink:show="embed" xlink:actuate="onLoad"/></draw:frame></text:p>
          </table:table-cell>
          <table:table-cell table:style-name="TableRowCell" office:value-type="string">
            <text:p text:style-name="Table_20_Contents">DBRenumberRoute</text:p>
          </table:table-cell>
        </table:table-row>
        <table:table-row>
          <table:table-cell table:style-name="TableRowCell" office:value-type="string">
            <text:p text:style-name="Table_20_Contents">Reset</text:p>
          </table:table-cell>
          <table:table-cell table:style-name="TableRowCell" office:value-type="string">
            <text:p text:style-name="Table_20_Contents"><text:a xlink:type="simple" xlink:href="../../viewer/style/icons.less#L252" office:name=""><text:span text:style-name="Definition">ic_delete.svg</text:span></text:a></text:p>
          </table:table-cell>
          <table:table-cell table:style-name="TableRowCell" office:value-type="string">
            <text:p text:style-name="Table_20_Contents"><draw:frame draw:name="img306" svg:width="0.41667in" svg:height="0.4166666666666667in"><draw:image xlink:href="Pictures/305.svg" xlink:type="simple" xlink:show="embed" xlink:actuate="onLoad"/></draw:frame></text:p>
          </table:table-cell>
          <table:table-cell table:style-name="TableRowCell" office:value-type="string">
            <text:p text:style-name="Table_20_Contents">SettingsDefaults,DefaultValue,DBReset</text:p>
          </table:table-cell>
        </table:table-row>
        <table:table-row>
          <table:table-cell table:style-name="TableRowCell" office:value-type="string">
            <text:p text:style-name="Table_20_Contents">Right</text:p>
          </table:table-cell>
          <table:table-cell table:style-name="TableRowCell" office:value-type="string">
            <text:p text:style-name="Table_20_Contents"><text:a xlink:type="simple" xlink:href="../../viewer/style/icons.less#L413" office:name=""><text:span text:style-name="Definition">navigate_next.svg</text:span></text:a></text:p>
          </table:table-cell>
          <table:table-cell table:style-name="TableRowCell" office:value-type="string">
            <text:p text:style-name="Table_20_Contents"><draw:frame draw:name="img307" svg:width="0.41667in" svg:height="0.4166666666666667in"><draw:image xlink:href="Pictures/306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Route</text:p>
          </table:table-cell>
          <table:table-cell table:style-name="TableRowCell" office:value-type="string">
            <text:p text:style-name="Table_20_Contents"><text:a xlink:type="simple" xlink:href="../../viewer/style/icons.less#L22" office:name=""><text:span text:style-name="Definition">route.svg</text:span></text:a></text:p>
          </table:table-cell>
          <table:table-cell table:style-name="TableRowCell" office:value-type="string">
            <text:p text:style-name="Table_20_Contents"><draw:frame draw:name="img308" svg:width="0.41667in" svg:height="0.4166666666666667in"><draw:image xlink:href="Pictures/307.svg" xlink:type="simple" xlink:show="embed" xlink:actuate="onLoad"/></draw:frame></text:p>
          </table:table-cell>
          <table:table-cell table:style-name="TableRowCell" office:value-type="string">
            <text:p text:style-name="Table_20_Contents">ShowRoutePanel,ToRoute,DBRoutePoints,DBFeatureNewRoute,DBEditRoute,code</text:p>
          </table:table-cell>
        </table:table-row>
        <table:table-row>
          <table:table-cell table:style-name="TableRowCell" office:value-type="string">
            <text:p text:style-name="Table_20_Contents">RouteMenu</text:p>
          </table:table-cell>
          <table:table-cell table:style-name="TableRowCell" office:value-type="string">
            <text:p text:style-name="Table_20_Contents"><text:a xlink:type="simple" xlink:href="../../viewer/style/icons.less#L189" office:name=""><text:span text:style-name="Definition">menu_open.svg</text:span></text:a></text:p>
          </table:table-cell>
          <table:table-cell table:style-name="TableRowCell" office:value-type="string">
            <text:p text:style-name="Table_20_Contents"><draw:frame draw:name="img309" svg:width="0.41667in" svg:height="0.4166666666666667in"><draw:image xlink:href="Pictures/308.svg" xlink:type="simple" xlink:show="embed" xlink:actuate="onLoad"/></draw:frame></text:p>
          </table:table-cell>
          <table:table-cell table:style-name="TableRowCell" office:value-type="string">
            <text:p text:style-name="Table_20_Contents">RouteMenu</text:p>
          </table:table-cell>
        </table:table-row>
        <table:table-row>
          <table:table-cell table:style-name="TableRowCell" office:value-type="string">
            <text:p text:style-name="Table_20_Contents">Satellite</text:p>
          </table:table-cell>
          <table:table-cell table:style-name="TableRowCell" office:value-type="string">
            <text:p text:style-name="Table_20_Contents"><text:a xlink:type="simple" xlink:href="../../viewer/style/icons.less#L428" office:name=""><text:span text:style-name="Definition">satellite-alt-200.svg</text:span></text:a></text:p>
          </table:table-cell>
          <table:table-cell table:style-name="TableRowCell" office:value-type="string">
            <text:p text:style-name="Table_20_Contents"><draw:frame draw:name="img310" svg:width="0.41667in" svg:height="0.4166666666666667in"><draw:image xlink:href="Pictures/309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Save</text:p>
          </table:table-cell>
          <table:table-cell table:style-name="TableRowCell" office:value-type="string">
            <text:p text:style-name="Table_20_Contents"><text:a xlink:type="simple" xlink:href="../../viewer/style/icons.less#L270" office:name=""><text:span text:style-name="Definition">save.svg</text:span></text:a></text:p>
          </table:table-cell>
          <table:table-cell table:style-name="TableRowCell" office:value-type="string">
            <text:p text:style-name="Table_20_Contents"><draw:frame draw:name="img311" svg:width="0.41667in" svg:height="0.4166666666666667in"><draw:image xlink:href="Pictures/310.svg" xlink:type="simple" xlink:show="embed" xlink:actuate="onLoad"/></draw:frame></text:p>
          </table:table-cell>
          <table:table-cell table:style-name="TableRowCell" office:value-type="string">
            <text:p text:style-name="Table_20_Contents">SettingsSave,DBSave</text:p>
          </table:table-cell>
        </table:table-row>
        <table:table-row>
          <table:table-cell table:style-name="TableRowCell" office:value-type="string">
            <text:p text:style-name="Table_20_Contents">SaveAs</text:p>
          </table:table-cell>
          <table:table-cell table:style-name="TableRowCell" office:value-type="string">
            <text:p text:style-name="Table_20_Contents"><text:a xlink:type="simple" xlink:href="../../viewer/style/icons.less#L291" office:name=""><text:span text:style-name="Definition">content_copy.svg</text:span></text:a></text:p>
          </table:table-cell>
          <table:table-cell table:style-name="TableRowCell" office:value-type="string">
            <text:p text:style-name="Table_20_Contents"><draw:frame draw:name="img312" svg:width="0.41667in" svg:height="0.4166666666666667in"><draw:image xlink:href="Pictures/311.svg" xlink:type="simple" xlink:show="embed" xlink:actuate="onLoad"/></draw:frame></text:p>
          </table:table-cell>
          <table:table-cell table:style-name="TableRowCell" office:value-type="string">
            <text:p text:style-name="Table_20_Contents">DBSaveAs</text:p>
          </table:table-cell>
        </table:table-row>
        <table:table-row>
          <table:table-cell table:style-name="TableRowCell" office:value-type="string">
            <text:p text:style-name="Table_20_Contents">Search</text:p>
          </table:table-cell>
          <table:table-cell table:style-name="TableRowCell" office:value-type="string">
            <text:p text:style-name="Table_20_Contents"><text:a xlink:type="simple" xlink:href="../../viewer/style/icons.less#L104" office:name=""><text:span text:style-name="Definition">search.svg</text:span></text:a></text:p>
          </table:table-cell>
          <table:table-cell table:style-name="TableRowCell" office:value-type="string">
            <text:p text:style-name="Table_20_Contents"><draw:frame draw:name="img313" svg:width="0.41667in" svg:height="0.4166666666666667in"><draw:image xlink:href="Pictures/312.svg" xlink:type="simple" xlink:show="embed" xlink:actuate="onLoad"/></draw:frame></text:p>
          </table:table-cell>
          <table:table-cell table:style-name="TableRowCell" office:value-type="string">
            <text:p text:style-name="Table_20_Contents">AisSearch</text:p>
          </table:table-cell>
        </table:table-row>
        <table:table-row>
          <table:table-cell table:style-name="TableRowCell" office:value-type="string">
            <text:p text:style-name="Table_20_Contents">Section</text:p>
          </table:table-cell>
          <table:table-cell table:style-name="TableRowCell" office:value-type="string">
            <text:p text:style-name="Table_20_Contents"><text:a xlink:type="simple" xlink:href="../../viewer/style/icons.less#L249" office:name=""><text:span text:style-name="Definition">category-200.svg</text:span></text:a></text:p>
          </table:table-cell>
          <table:table-cell table:style-name="TableRowCell" office:value-type="string">
            <text:p text:style-name="Table_20_Contents"><draw:frame draw:name="img314" svg:width="0.41667in" svg:height="0.4166666666666667in"><draw:image xlink:href="Pictures/313.svg" xlink:type="simple" xlink:show="embed" xlink:actuate="onLoad"/></draw:frame></text:p>
          </table:table-cell>
          <table:table-cell table:style-name="TableRowCell" office:value-type="string">
            <text:p text:style-name="Table_20_Contents">SectionView</text:p>
          </table:table-cell>
        </table:table-row>
        <table:table-row>
          <table:table-cell table:style-name="TableRowCell" office:value-type="string">
            <text:p text:style-name="Table_20_Contents">SelectChart</text:p>
          </table:table-cell>
          <table:table-cell table:style-name="TableRowCell" office:value-type="string">
            <text:p text:style-name="Table_20_Contents"><text:a xlink:type="simple" xlink:href="../../viewer/style/icons.less#L192" office:name=""><text:span text:style-name="Definition">layers-black.svg</text:span></text:a></text:p>
          </table:table-cell>
          <table:table-cell table:style-name="TableRowCell" office:value-type="string">
            <text:p text:style-name="Table_20_Contents"><draw:frame draw:name="img315" svg:width="0.41667in" svg:height="0.4166666666666667in"><draw:image xlink:href="Pictures/314.svg" xlink:type="simple" xlink:show="embed" xlink:actuate="onLoad"/></draw:frame></text:p>
          </table:table-cell>
          <table:table-cell table:style-name="TableRowCell" office:value-type="string">
            <text:p text:style-name="Table_20_Contents">NavSelectChart</text:p>
          </table:table-cell>
        </table:table-row>
        <table:table-row>
          <table:table-cell table:style-name="TableRowCell" office:value-type="string">
            <text:p text:style-name="Table_20_Contents">Server</text:p>
          </table:table-cell>
          <table:table-cell table:style-name="TableRowCell" office:value-type="string">
            <text:p text:style-name="Table_20_Contents"><text:a xlink:type="simple" xlink:href="../../viewer/style/icons.less#L89" office:name=""><text:span text:style-name="Definition">database-200.svg</text:span></text:a></text:p>
          </table:table-cell>
          <table:table-cell table:style-name="TableRowCell" office:value-type="string">
            <text:p text:style-name="Table_20_Contents"><draw:frame draw:name="img316" svg:width="0.41667in" svg:height="0.4166666666666667in"><draw:image xlink:href="Pictures/315.svg" xlink:type="simple" xlink:show="embed" xlink:actuate="onLoad"/></draw:frame></text:p>
          </table:table-cell>
          <table:table-cell table:style-name="TableRowCell" office:value-type="string">
            <text:p text:style-name="Table_20_Contents">ServerView</text:p>
          </table:table-cell>
        </table:table-row>
        <table:table-row>
          <table:table-cell table:style-name="TableRowCell" office:value-type="string">
            <text:p text:style-name="Table_20_Contents">Settings</text:p>
          </table:table-cell>
          <table:table-cell table:style-name="TableRowCell" office:value-type="string">
            <text:p text:style-name="Table_20_Contents"><text:a xlink:type="simple" xlink:href="../../viewer/style/icons.less#L95" office:name=""><text:span text:style-name="Definition">ic_settings.svg</text:span></text:a></text:p>
          </table:table-cell>
          <table:table-cell table:style-name="TableRowCell" office:value-type="string">
            <text:p text:style-name="Table_20_Contents"><draw:frame draw:name="img317" svg:width="0.41667in" svg:height="0.4166666666666667in"><draw:image xlink:href="Pictures/316.svg" xlink:type="simple" xlink:show="embed" xlink:actuate="onLoad"/></draw:frame></text:p>
          </table:table-cell>
          <table:table-cell table:style-name="TableRowCell" office:value-type="string">
            <text:p text:style-name="Table_20_Contents">ShowSettings,code</text:p>
          </table:table-cell>
        </table:table-row>
        <table:table-row>
          <table:table-cell table:style-name="TableRowCell" office:value-type="string">
            <text:p text:style-name="Table_20_Contents">Shutdown</text:p>
          </table:table-cell>
          <table:table-cell table:style-name="TableRowCell" office:value-type="string">
            <text:p text:style-name="Table_20_Contents"><text:a xlink:type="simple" xlink:href="../../viewer/style/icons.less#L240" office:name=""><text:span text:style-name="Definition">ic_power.svg</text:span></text:a></text:p>
          </table:table-cell>
          <table:table-cell table:style-name="TableRowCell" office:value-type="string">
            <text:p text:style-name="Table_20_Contents"><draw:frame draw:name="img318" svg:width="0.41667in" svg:height="0.4166666666666667in"><draw:image xlink:href="Pictures/317.svg" xlink:type="simple" xlink:show="embed" xlink:actuate="onLoad"/></draw:frame></text:p>
          </table:table-cell>
          <table:table-cell table:style-name="TableRowCell" office:value-type="string">
            <text:p text:style-name="Table_20_Contents">StatusShutdown</text:p>
          </table:table-cell>
        </table:table-row>
        <table:table-row>
          <table:table-cell table:style-name="TableRowCell" office:value-type="string">
            <text:p text:style-name="Table_20_Contents">Sort</text:p>
          </table:table-cell>
          <table:table-cell table:style-name="TableRowCell" office:value-type="string">
            <text:p text:style-name="Table_20_Contents"><text:a xlink:type="simple" xlink:href="../../viewer/style/icons.less#L98" office:name=""><text:span text:style-name="Definition">sort.svg</text:span></text:a></text:p>
          </table:table-cell>
          <table:table-cell table:style-name="TableRowCell" office:value-type="string">
            <text:p text:style-name="Table_20_Contents"><draw:frame draw:name="img319" svg:width="0.41667in" svg:height="0.4166666666666667in"><draw:image xlink:href="Pictures/318.svg" xlink:type="simple" xlink:show="embed" xlink:actuate="onLoad"/></draw:frame></text:p>
          </table:table-cell>
          <table:table-cell table:style-name="TableRowCell" office:value-type="string">
            <text:p text:style-name="Table_20_Contents">AisSort</text:p>
          </table:table-cell>
        </table:table-row>
        <table:table-row>
          <table:table-cell table:style-name="TableRowCell" office:value-type="string">
            <text:p text:style-name="Table_20_Contents">Split</text:p>
          </table:table-cell>
          <table:table-cell table:style-name="TableRowCell" office:value-type="string">
            <text:p text:style-name="Table_20_Contents"><text:a xlink:type="simple" xlink:href="../../viewer/style/icons.less#L128" office:name=""><text:span text:style-name="Definition">vertical_split.svg</text:span></text:a></text:p>
          </table:table-cell>
          <table:table-cell table:style-name="TableRowCell" office:value-type="string">
            <text:p text:style-name="Table_20_Contents"><draw:frame draw:name="img320" svg:width="0.41667in" svg:height="0.4166666666666667in"><draw:image xlink:href="Pictures/319.svg" xlink:type="simple" xlink:show="embed" xlink:actuate="onLoad"/></draw:frame></text:p>
          </table:table-cell>
          <table:table-cell table:style-name="TableRowCell" office:value-type="string">
            <text:p text:style-name="Table_20_Contents">Split</text:p>
          </table:table-cell>
        </table:table-row>
        <table:table-row>
          <table:table-cell table:style-name="TableRowCell" office:value-type="string">
            <text:p text:style-name="Table_20_Contents">SplitReset</text:p>
          </table:table-cell>
          <table:table-cell table:style-name="TableRowCell" office:value-type="string">
            <text:p text:style-name="Table_20_Contents"><text:a xlink:type="simple" xlink:href="../../viewer/style/icons.less#L255" office:name=""><text:span text:style-name="Definition">reset_split.svg</text:span></text:a></text:p>
          </table:table-cell>
          <table:table-cell table:style-name="TableRowCell" office:value-type="string">
            <text:p text:style-name="Table_20_Contents"><draw:frame draw:name="img321" svg:width="0.41667in" svg:height="0.4166666666666667in"><draw:image xlink:href="Pictures/320.svg" xlink:type="simple" xlink:show="embed" xlink:actuate="onLoad"/></draw:frame></text:p>
          </table:table-cell>
          <table:table-cell table:style-name="TableRowCell" office:value-type="string">
            <text:p text:style-name="Table_20_Contents">SettingsSplitReset</text:p>
          </table:table-cell>
        </table:table-row>
        <table:table-row>
          <table:table-cell table:style-name="TableRowCell" office:value-type="string">
            <text:p text:style-name="Table_20_Contents">Start</text:p>
          </table:table-cell>
          <table:table-cell table:style-name="TableRowCell" office:value-type="string">
            <text:p text:style-name="Table_20_Contents"><text:a xlink:type="simple" xlink:href="../../viewer/style/icons.less#L309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22" svg:width="0.41667in" svg:height="0.4166666666666667in"><draw:image xlink:href="Pictures/321.svg" xlink:type="simple" xlink:show="embed" xlink:actuate="onLoad"/></draw:frame></text:p>
          </table:table-cell>
          <table:table-cell table:style-name="TableRowCell" office:value-type="string">
            <text:p text:style-name="Table_20_Contents">DBCompute</text:p>
          </table:table-cell>
        </table:table-row>
        <table:table-row>
          <table:table-cell table:style-name="TableRowCell" office:value-type="string">
            <text:p text:style-name="Table_20_Contents">Stop</text:p>
          </table:table-cell>
          <table:table-cell table:style-name="TableRowCell" office:value-type="string">
            <text:p text:style-name="Table_20_Contents"><text:a xlink:type="simple" xlink:href="../../viewer/style/icons.less#L306" office:name=""><text:span text:style-name="Definition">stop_circle.svg</text:span></text:a></text:p>
          </table:table-cell>
          <table:table-cell table:style-name="TableRowCell" office:value-type="string">
            <text:p text:style-name="Table_20_Contents"><draw:frame draw:name="img323" svg:width="0.41667in" svg:height="0.4166666666666667in"><draw:image xlink:href="Pictures/322.svg" xlink:type="simple" xlink:show="embed" xlink:actuate="onLoad"/></draw:frame></text:p>
          </table:table-cell>
          <table:table-cell table:style-name="TableRowCell" office:value-type="string">
            <text:p text:style-name="Table_20_Contents">DBStop</text:p>
          </table:table-cell>
        </table:table-row>
        <table:table-row>
          <table:table-cell table:style-name="TableRowCell" office:value-type="string">
            <text:p text:style-name="Table_20_Contents">Sync</text:p>
          </table:table-cell>
          <table:table-cell table:style-name="TableRowCell" office:value-type="string">
            <text:p text:style-name="Table_20_Contents"><text:a xlink:type="simple" xlink:href="../../viewer/style/icons.less#L116" office:name=""><text:span text:style-name="Definition">sync.svg</text:span></text:a></text:p>
          </table:table-cell>
          <table:table-cell table:style-name="TableRowCell" office:value-type="string">
            <text:p text:style-name="Table_20_Contents"><draw:frame draw:name="img324" svg:width="0.41667in" svg:height="0.4166666666666667in"><draw:image xlink:href="Pictures/323.svg" xlink:type="simple" xlink:show="embed" xlink:actuate="onLoad"/></draw:frame></text:p>
          </table:table-cell>
          <table:table-cell table:style-name="TableRowCell" office:value-type="string">
            <text:p text:style-name="Table_20_Contents">SyncRoutes</text:p>
          </table:table-cell>
        </table:table-row>
        <table:table-row>
          <table:table-cell table:style-name="TableRowCell" office:value-type="string">
            <text:p text:style-name="Table_20_Contents">Track</text:p>
          </table:table-cell>
          <table:table-cell table:style-name="TableRowCell" office:value-type="string">
            <text:p text:style-name="Table_20_Contents"><text:a xlink:type="simple" xlink:href="../../viewer/style/icons.less#L34" office:name=""><text:span text:style-name="Definition">track.svg</text:span></text:a></text:p>
          </table:table-cell>
          <table:table-cell table:style-name="TableRowCell" office:value-type="string">
            <text:p text:style-name="Table_20_Contents"><draw:frame draw:name="img325" svg:width="0.41667in" svg:height="0.4166666666666667in"><draw:image xlink:href="Pictures/324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Checked</text:p>
          </table:table-cell>
          <table:table-cell table:style-name="TableRowCell" office:value-type="string">
            <text:p text:style-name="Table_20_Contents"><text:a xlink:type="simple" xlink:href="../../viewer/style/icons.less#L363" office:name=""><text:span text:style-name="Definition">checkbox-blank-outline.svg</text:span></text:a></text:p>
          </table:table-cell>
          <table:table-cell table:style-name="TableRowCell" office:value-type="string">
            <text:p text:style-name="Table_20_Contents"><draw:frame draw:name="img326" svg:width="0.41667in" svg:height="0.4166666666666667in"><draw:image xlink:href="Pictures/325.svg" xlink:type="simple" xlink:show="embed" xlink:actuate="onLoad"/></draw:frame></text:p>
          </table:table-cell>
          <table:table-cell table:style-name="TableRowCell" office:value-type="string">
            <text:p text:style-name="Table_20_Contents">code</text:p>
          </table:table-cell>
        </table:table-row>
        <table:table-row>
          <table:table-cell table:style-name="TableRowCell" office:value-type="string">
            <text:p text:style-name="Table_20_Contents">Undo</text:p>
          </table:table-cell>
          <table:table-cell table:style-name="TableRowCell" office:value-type="string">
            <text:p text:style-name="Table_20_Contents"><text:a xlink:type="simple" xlink:href="../../viewer/style/icons.less#L264" office:name=""><text:span text:style-name="Definition">ic_undo.svg</text:span></text:a></text:p>
          </table:table-cell>
          <table:table-cell table:style-name="TableRowCell" office:value-type="string">
            <text:p text:style-name="Table_20_Contents"><draw:frame draw:name="img327" svg:width="0.41667in" svg:height="0.4166666666666667in"><draw:image xlink:href="Pictures/326.svg" xlink:type="simple" xlink:show="embed" xlink:actuate="onLoad"/></draw:frame></text:p>
          </table:table-cell>
          <table:table-cell table:style-name="TableRowCell" office:value-type="string">
            <text:p text:style-name="Table_20_Contents">RevertLayout</text:p>
          </table:table-cell>
        </table:table-row>
        <table:table-row>
          <table:table-cell table:style-name="TableRowCell" office:value-type="string">
            <text:p text:style-name="Table_20_Contents">Upload</text:p>
          </table:table-cell>
          <table:table-cell table:style-name="TableRowCell" office:value-type="string">
            <text:p text:style-name="Table_20_Contents"><text:a xlink:type="simple" xlink:href="../../viewer/style/icons.less#L113" office:name=""><text:span text:style-name="Definition">ic_file_upload.svg</text:span></text:a></text:p>
          </table:table-cell>
          <table:table-cell table:style-name="TableRowCell" office:value-type="string">
            <text:p text:style-name="Table_20_Contents"><draw:frame draw:name="img328" svg:width="0.41667in" svg:height="0.4166666666666667in"><draw:image xlink:href="Pictures/327.svg" xlink:type="simple" xlink:show="embed" xlink:actuate="onLoad"/></draw:frame></text:p>
          </table:table-cell>
          <table:table-cell table:style-name="TableRowCell" office:value-type="string">
            <text:p text:style-name="Table_20_Contents">Upload</text:p>
          </table:table-cell>
        </table:table-row>
        <table:table-row>
          <table:table-cell table:style-name="TableRowCell" office:value-type="string">
            <text:p text:style-name="Table_20_Contents">User</text:p>
          </table:table-cell>
          <table:table-cell table:style-name="TableRowCell" office:value-type="string">
            <text:p text:style-name="Table_20_Contents"><text:a xlink:type="simple" xlink:href="../../viewer/style/icons.less#L7" office:name=""><text:span text:style-name="Definition">folder_shared.svg</text:span></text:a></text:p>
          </table:table-cell>
          <table:table-cell table:style-name="TableRowCell" office:value-type="string">
            <text:p text:style-name="Table_20_Contents"><draw:frame draw:name="img329" svg:width="0.41667in" svg:height="0.4166666666666667in"><draw:image xlink:href="Pictures/328.svg" xlink:type="simple" xlink:show="embed" xlink:actuate="onLoad"/></draw:frame></text:p>
          </table:table-cell>
          <table:table-cell table:style-name="TableRowCell" office:value-type="string">
            <text:p text:style-name="Table_20_Contents">AddonConfigUser,code</text:p>
          </table:table-cell>
        </table:table-row>
        <table:table-row>
          <table:table-cell table:style-name="TableRowCell" office:value-type="string">
            <text:p text:style-name="Table_20_Contents">View</text:p>
          </table:table-cell>
          <table:table-cell table:style-name="TableRowCell" office:value-type="string">
            <text:p text:style-name="Table_20_Contents"><text:a xlink:type="simple" xlink:href="../../viewer/style/icons.less#L83" office:name=""><text:span text:style-name="Definition">visibility.svg</text:span></text:a></text:p>
          </table:table-cell>
          <table:table-cell table:style-name="TableRowCell" office:value-type="string">
            <text:p text:style-name="Table_20_Contents"><draw:frame draw:name="img330" svg:width="0.41667in" svg:height="0.4166666666666667in"><draw:image xlink:href="Pictures/329.svg" xlink:type="simple" xlink:show="embed" xlink:actuate="onLoad"/></draw:frame></text:p>
          </table:table-cell>
          <table:table-cell table:style-name="TableRowCell" office:value-type="string">
            <text:p text:style-name="Table_20_Contents">DBPreview,DBView,code</text:p>
          </table:table-cell>
        </table:table-row>
        <table:table-row>
          <table:table-cell table:style-name="TableRowCell" office:value-type="string">
            <text:p text:style-name="Table_20_Contents">Waypoint</text:p>
          </table:table-cell>
          <table:table-cell table:style-name="TableRowCell" office:value-type="string">
            <text:p text:style-name="Table_20_Contents"><text:a xlink:type="simple" xlink:href="../../viewer/style/icons.less#L418" office:name=""><text:span text:style-name="Definition">waypoint.svg</text:span></text:a></text:p>
          </table:table-cell>
          <table:table-cell table:style-name="TableRowCell" office:value-type="string">
            <text:p text:style-name="Table_20_Contents"><draw:frame draw:name="img331" svg:width="0.41667in" svg:height="0.4166666666666667in"><draw:image xlink:href="Pictures/330.svg" xlink:type="simple" xlink:show="embed" xlink:actuate="onLoad"/></draw:frame></text:p>
          </table:table-cell>
          <table:table-cell table:style-name="TableRowCell" office:value-type="string">
            <text:p text:style-name="Table_20_Contents">ABShowWpButtons,code</text:p>
          </table:table-cell>
        </table:table-row>
        <table:table-row>
          <table:table-cell table:style-name="TableRowCell" office:value-type="string">
            <text:p text:style-name="Table_20_Contents">Wifi</text:p>
          </table:table-cell>
          <table:table-cell table:style-name="TableRowCell" office:value-type="string">
            <text:p text:style-name="Table_20_Contents"><text:a xlink:type="simple" xlink:href="../../viewer/style/icons.less#L228" office:name=""><text:span text:style-name="Definition">wifi.svg</text:span></text:a></text:p>
          </table:table-cell>
          <table:table-cell table:style-name="TableRowCell" office:value-type="string">
            <text:p text:style-name="Table_20_Contents"><draw:frame draw:name="img332" svg:width="0.41667in" svg:height="0.4166666666666667in"><draw:image xlink:href="Pictures/331.svg" xlink:type="simple" xlink:show="embed" xlink:actuate="onLoad"/></draw:frame></text:p>
          </table:table-cell>
          <table:table-cell table:style-name="TableRowCell" office:value-type="string">
            <text:p text:style-name="Table_20_Contents">StatusWpa,DBWpaEnable</text:p>
          </table:table-cell>
        </table:table-row>
        <table:table-row>
          <table:table-cell table:style-name="TableRowCell" office:value-type="string">
            <text:p text:style-name="Table_20_Contents">WifiOff</text:p>
          </table:table-cell>
          <table:table-cell table:style-name="TableRowCell" office:value-type="string">
            <text:p text:style-name="Table_20_Contents"><text:a xlink:type="simple" xlink:href="../../viewer/style/icons.less#L231" office:name=""><text:span text:style-name="Definition">wifi_off.svg</text:span></text:a></text:p>
          </table:table-cell>
          <table:table-cell table:style-name="TableRowCell" office:value-type="string">
            <text:p text:style-name="Table_20_Contents"><draw:frame draw:name="img333" svg:width="0.41667in" svg:height="0.4166666666666667in"><draw:image xlink:href="Pictures/332.svg" xlink:type="simple" xlink:show="embed" xlink:actuate="onLoad"/></draw:frame></text:p>
          </table:table-cell>
          <table:table-cell table:style-name="TableRowCell" office:value-type="string">
            <text:p text:style-name="Table_20_Contents">DBWpaDisable</text:p>
          </table:table-cell>
        </table:table-row>
        <table:table-row>
          <table:table-cell table:style-name="TableRowCell" office:value-type="string">
            <text:p text:style-name="Table_20_Contents">WpGoto</text:p>
          </table:table-cell>
          <table:table-cell table:style-name="TableRowCell" office:value-type="string">
            <text:p text:style-name="Table_20_Contents"><text:a xlink:type="simple" xlink:href="../../viewer/style/icons.less#L152" office:name=""><text:span text:style-name="Definition">wpgoto.svg</text:span></text:a></text:p>
          </table:table-cell>
          <table:table-cell table:style-name="TableRowCell" office:value-type="string">
            <text:p text:style-name="Table_20_Contents"><draw:frame draw:name="img334" svg:width="0.41667in" svg:height="0.4166666666666667in"><draw:image xlink:href="Pictures/333.svg" xlink:type="simple" xlink:show="embed" xlink:actuate="onLoad"/></draw:frame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WpLocate</text:p>
          </table:table-cell>
          <table:table-cell table:style-name="TableRowCell" office:value-type="string">
            <text:p text:style-name="Table_20_Contents"><text:a xlink:type="simple" xlink:href="../../viewer/style/icons.less#L143" office:name=""><text:span text:style-name="Definition">center.svg</text:span></text:a></text:p>
          </table:table-cell>
          <table:table-cell table:style-name="TableRowCell" office:value-type="string">
            <text:p text:style-name="Table_20_Contents"><draw:frame draw:name="img335" svg:width="0.41667in" svg:height="0.4166666666666667in"><draw:image xlink:href="Pictures/334.svg" xlink:type="simple" xlink:show="embed" xlink:actuate="onLoad"/></draw:frame></text:p>
          </table:table-cell>
          <table:table-cell table:style-name="TableRowCell" office:value-type="string">
            <text:p text:style-name="Table_20_Contents">WpLocate,NavToCenter</text:p>
          </table:table-cell>
        </table:table-row>
        <table:table-row>
          <table:table-cell table:style-name="TableRowCell" office:value-type="string">
            <text:p text:style-name="Table_20_Contents">WpNext</text:p>
          </table:table-cell>
          <table:table-cell table:style-name="TableRowCell" office:value-type="string">
            <text:p text:style-name="Table_20_Contents"><text:a xlink:type="simple" xlink:href="../../viewer/style/icons.less#L149" office:name=""><text:span text:style-name="Definition">ic_arrow_forward.svg</text:span></text:a></text:p>
          </table:table-cell>
          <table:table-cell table:style-name="TableRowCell" office:value-type="string">
            <text:p text:style-name="Table_20_Contents"><draw:frame draw:name="img336" svg:width="0.41667in" svg:height="0.4166666666666667in"><draw:image xlink:href="Pictures/335.svg" xlink:type="simple" xlink:show="embed" xlink:actuate="onLoad"/></draw:frame></text:p>
          </table:table-cell>
          <table:table-cell table:style-name="TableRowCell" office:value-type="string">
            <text:p text:style-name="Table_20_Contents">WpNext</text:p>
          </table:table-cell>
        </table:table-row>
        <table:table-row>
          <table:table-cell table:style-name="TableRowCell" office:value-type="string">
            <text:p text:style-name="Table_20_Contents">WpPrevious</text:p>
          </table:table-cell>
          <table:table-cell table:style-name="TableRowCell" office:value-type="string">
            <text:p text:style-name="Table_20_Contents"><text:a xlink:type="simple" xlink:href="../../viewer/style/icons.less#L146" office:name=""><text:span text:style-name="Definition">ic_arrow_back.svg</text:span></text:a></text:p>
          </table:table-cell>
          <table:table-cell table:style-name="TableRowCell" office:value-type="string">
            <text:p text:style-name="Table_20_Contents"><draw:frame draw:name="img337" svg:width="0.41667in" svg:height="0.4166666666666667in"><draw:image xlink:href="Pictures/336.svg" xlink:type="simple" xlink:show="embed" xlink:actuate="onLoad"/></draw:frame></text:p>
          </table:table-cell>
          <table:table-cell table:style-name="TableRowCell" office:value-type="string">
            <text:p text:style-name="Table_20_Contents">WpPrevious</text:p>
          </table:table-cell>
        </table:table-row>
        <table:table-row>
          <table:table-cell table:style-name="TableRowCell" office:value-type="string">
            <text:p text:style-name="Table_20_Contents">WpRestart</text:p>
          </table:table-cell>
          <table:table-cell table:style-name="TableRowCell" office:value-type="string">
            <text:p text:style-name="Table_20_Contents"><text:a xlink:type="simple" xlink:href="../../viewer/style/icons.less#L158" office:name=""><text:span text:style-name="Definition">wprestart.svg</text:span></text:a></text:p>
          </table:table-cell>
          <table:table-cell table:style-name="TableRowCell" office:value-type="string">
            <text:p text:style-name="Table_20_Contents"><draw:frame draw:name="img338" svg:width="0.41667in" svg:height="0.4166666666666667in"><draw:image xlink:href="Pictures/337.svg" xlink:type="simple" xlink:show="embed" xlink:actuate="onLoad"/></draw:frame></text:p>
          </table:table-cell>
          <table:table-cell table:style-name="TableRowCell" office:value-type="string">
            <text:p text:style-name="Table_20_Contents">WpRestart</text:p>
          </table:table-cell>
        </table:table-row>
        <table:table-row>
          <table:table-cell table:style-name="TableRowCell" office:value-type="string">
            <text:p text:style-name="Table_20_Contents">WpStop</text:p>
          </table:table-cell>
          <table:table-cell table:style-name="TableRowCell" office:value-type="string">
            <text:p text:style-name="Table_20_Contents"><text:a xlink:type="simple" xlink:href="../../viewer/style/icons.less#L186" office:name=""><text:span text:style-name="Definition">stop-wp.svg</text:span></text:a></text:p>
          </table:table-cell>
          <table:table-cell table:style-name="TableRowCell" office:value-type="string">
            <text:p text:style-name="Table_20_Contents"><draw:frame draw:name="img339" svg:width="0.41667in" svg:height="0.4166666666666667in"><draw:image xlink:href="Pictures/338.svg" xlink:type="simple" xlink:show="embed" xlink:actuate="onLoad"/></draw:frame></text:p>
          </table:table-cell>
          <table:table-cell table:style-name="TableRowCell" office:value-type="string">
            <text:p text:style-name="Table_20_Contents">StopWp</text:p>
          </table:table-cell>
        </table:table-row>
        <table:table-row>
          <table:table-cell table:style-name="TableRowCell" office:value-type="string">
            <text:p text:style-name="Table_20_Contents">WpaConnect</text:p>
          </table:table-cell>
          <table:table-cell table:style-name="TableRowCell" office:value-type="string">
            <text:p text:style-name="Table_20_Contents"><text:a xlink:type="simple" xlink:href="../../viewer/style/icons.less#L326" office:name=""><text:span text:style-name="Definition">play_arrow.svg</text:span></text:a></text:p>
          </table:table-cell>
          <table:table-cell table:style-name="TableRowCell" office:value-type="string">
            <text:p text:style-name="Table_20_Contents"><draw:frame draw:name="img340" svg:width="0.41667in" svg:height="0.4166666666666667in"><draw:image xlink:href="Pictures/339.svg" xlink:type="simple" xlink:show="embed" xlink:actuate="onLoad"/></draw:frame></text:p>
          </table:table-cell>
          <table:table-cell table:style-name="TableRowCell" office:value-type="string">
            <text:p text:style-name="Table_20_Contents">DBWpaConnect</text:p>
          </table:table-cell>
        </table:table-row>
        <table:table-row>
          <table:table-cell table:style-name="TableRowCell" office:value-type="string">
            <text:p text:style-name="Table_20_Contents">ZoomIn</text:p>
          </table:table-cell>
          <table:table-cell table:style-name="TableRowCell" office:value-type="string">
            <text:p text:style-name="Table_20_Contents"><text:a xlink:type="simple" xlink:href="../../viewer/style/icons.less#L198" office:name=""><text:span text:style-name="Definition">ic_zoom_in.svg</text:span></text:a></text:p>
          </table:table-cell>
          <table:table-cell table:style-name="TableRowCell" office:value-type="string">
            <text:p text:style-name="Table_20_Contents"><draw:frame draw:name="img341" svg:width="0.41667in" svg:height="0.4166666666666667in"><draw:image xlink:href="Pictures/340.svg" xlink:type="simple" xlink:show="embed" xlink:actuate="onLoad"/></draw:frame></text:p>
          </table:table-cell>
          <table:table-cell table:style-name="TableRowCell" office:value-type="string">
            <text:p text:style-name="Table_20_Contents">ZoomIn</text:p>
          </table:table-cell>
        </table:table-row>
        <table:table-row>
          <table:table-cell table:style-name="TableRowCell" office:value-type="string">
            <text:p text:style-name="Table_20_Contents">ZoomOut</text:p>
          </table:table-cell>
          <table:table-cell table:style-name="TableRowCell" office:value-type="string">
            <text:p text:style-name="Table_20_Contents"><text:a xlink:type="simple" xlink:href="../../viewer/style/icons.less#L201" office:name=""><text:span text:style-name="Definition">ic_zoom_out.svg</text:span></text:a></text:p>
          </table:table-cell>
          <table:table-cell table:style-name="TableRowCell" office:value-type="string">
            <text:p text:style-name="Table_20_Contents"><draw:frame draw:name="img342" svg:width="0.41667in" svg:height="0.4166666666666667in"><draw:image xlink:href="Pictures/341.svg" xlink:type="simple" xlink:show="embed" xlink:actuate="onLoad"/></draw:frame></text:p>
          </table:table-cell>
          <table:table-cell table:style-name="TableRowCell" office:value-type="string">
            <text:p text:style-name="Table_20_Contents">ZoomOut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5-19T16:35:53Z</meta:creation-date>
    <dc:date>2026-05-19T16:35:53Z</dc:date>
  </office:meta>
</office:document-meta>
</file>