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svg+xml" manifest:full-path="Pictures/335.svg"/>
  <manifest:file-entry manifest:media-type="image/svg+xml" manifest:full-path="Pictures/334.svg"/>
  <manifest:file-entry manifest:media-type="image/svg+xml" manifest:full-path="Pictures/333.svg"/>
  <manifest:file-entry manifest:media-type="image/svg+xml" manifest:full-path="Pictures/332.svg"/>
  <manifest:file-entry manifest:media-type="image/svg+xml" manifest:full-path="Pictures/331.svg"/>
  <manifest:file-entry manifest:media-type="image/svg+xml" manifest:full-path="Pictures/330.svg"/>
  <manifest:file-entry manifest:media-type="image/svg+xml" manifest:full-path="Pictures/329.svg"/>
  <manifest:file-entry manifest:media-type="image/svg+xml" manifest:full-path="Pictures/328.svg"/>
  <manifest:file-entry manifest:media-type="image/svg+xml" manifest:full-path="Pictures/327.svg"/>
  <manifest:file-entry manifest:media-type="image/svg+xml" manifest:full-path="Pictures/326.svg"/>
  <manifest:file-entry manifest:media-type="image/svg+xml" manifest:full-path="Pictures/325.svg"/>
  <manifest:file-entry manifest:media-type="image/svg+xml" manifest:full-path="Pictures/324.svg"/>
  <manifest:file-entry manifest:media-type="image/svg+xml" manifest:full-path="Pictures/323.svg"/>
  <manifest:file-entry manifest:media-type="image/svg+xml" manifest:full-path="Pictures/322.svg"/>
  <manifest:file-entry manifest:media-type="image/svg+xml" manifest:full-path="Pictures/321.svg"/>
  <manifest:file-entry manifest:media-type="image/svg+xml" manifest:full-path="Pictures/320.svg"/>
  <manifest:file-entry manifest:media-type="image/svg+xml" manifest:full-path="Pictures/319.svg"/>
  <manifest:file-entry manifest:media-type="image/svg+xml" manifest:full-path="Pictures/318.svg"/>
  <manifest:file-entry manifest:media-type="image/svg+xml" manifest:full-path="Pictures/317.svg"/>
  <manifest:file-entry manifest:media-type="image/svg+xml" manifest:full-path="Pictures/316.svg"/>
  <manifest:file-entry manifest:media-type="image/svg+xml" manifest:full-path="Pictures/315.svg"/>
  <manifest:file-entry manifest:media-type="image/svg+xml" manifest:full-path="Pictures/314.svg"/>
  <manifest:file-entry manifest:media-type="image/svg+xml" manifest:full-path="Pictures/313.svg"/>
  <manifest:file-entry manifest:media-type="image/svg+xml" manifest:full-path="Pictures/312.svg"/>
  <manifest:file-entry manifest:media-type="image/svg+xml" manifest:full-path="Pictures/311.svg"/>
  <manifest:file-entry manifest:media-type="image/svg+xml" manifest:full-path="Pictures/310.svg"/>
  <manifest:file-entry manifest:media-type="image/svg+xml" manifest:full-path="Pictures/309.svg"/>
  <manifest:file-entry manifest:media-type="image/svg+xml" manifest:full-path="Pictures/308.svg"/>
  <manifest:file-entry manifest:media-type="image/svg+xml" manifest:full-path="Pictures/307.svg"/>
  <manifest:file-entry manifest:media-type="image/svg+xml" manifest:full-path="Pictures/306.svg"/>
  <manifest:file-entry manifest:media-type="image/svg+xml" manifest:full-path="Pictures/305.svg"/>
  <manifest:file-entry manifest:media-type="image/svg+xml" manifest:full-path="Pictures/304.svg"/>
  <manifest:file-entry manifest:media-type="image/svg+xml" manifest:full-path="Pictures/303.svg"/>
  <manifest:file-entry manifest:media-type="image/svg+xml" manifest:full-path="Pictures/302.svg"/>
  <manifest:file-entry manifest:media-type="image/svg+xml" manifest:full-path="Pictures/301.svg"/>
  <manifest:file-entry manifest:media-type="image/svg+xml" manifest:full-path="Pictures/300.svg"/>
  <manifest:file-entry manifest:media-type="image/svg+xml" manifest:full-path="Pictures/299.svg"/>
  <manifest:file-entry manifest:media-type="image/svg+xml" manifest:full-path="Pictures/298.svg"/>
  <manifest:file-entry manifest:media-type="image/svg+xml" manifest:full-path="Pictures/297.svg"/>
  <manifest:file-entry manifest:media-type="image/svg+xml" manifest:full-path="Pictures/296.svg"/>
  <manifest:file-entry manifest:media-type="image/svg+xml" manifest:full-path="Pictures/295.svg"/>
  <manifest:file-entry manifest:media-type="image/svg+xml" manifest:full-path="Pictures/294.svg"/>
  <manifest:file-entry manifest:media-type="image/svg+xml" manifest:full-path="Pictures/293.svg"/>
  <manifest:file-entry manifest:media-type="image/svg+xml" manifest:full-path="Pictures/292.svg"/>
  <manifest:file-entry manifest:media-type="image/svg+xml" manifest:full-path="Pictures/291.svg"/>
  <manifest:file-entry manifest:media-type="image/svg+xml" manifest:full-path="Pictures/290.svg"/>
  <manifest:file-entry manifest:media-type="image/svg+xml" manifest:full-path="Pictures/289.svg"/>
  <manifest:file-entry manifest:media-type="image/svg+xml" manifest:full-path="Pictures/288.svg"/>
  <manifest:file-entry manifest:media-type="image/svg+xml" manifest:full-path="Pictures/287.svg"/>
  <manifest:file-entry manifest:media-type="image/svg+xml" manifest:full-path="Pictures/286.svg"/>
  <manifest:file-entry manifest:media-type="image/svg+xml" manifest:full-path="Pictures/285.svg"/>
  <manifest:file-entry manifest:media-type="image/svg+xml" manifest:full-path="Pictures/284.svg"/>
  <manifest:file-entry manifest:media-type="image/svg+xml" manifest:full-path="Pictures/283.svg"/>
  <manifest:file-entry manifest:media-type="image/svg+xml" manifest:full-path="Pictures/282.svg"/>
  <manifest:file-entry manifest:media-type="image/svg+xml" manifest:full-path="Pictures/281.svg"/>
  <manifest:file-entry manifest:media-type="image/svg+xml" manifest:full-path="Pictures/280.svg"/>
  <manifest:file-entry manifest:media-type="image/svg+xml" manifest:full-path="Pictures/279.svg"/>
  <manifest:file-entry manifest:media-type="image/svg+xml" manifest:full-path="Pictures/278.svg"/>
  <manifest:file-entry manifest:media-type="image/svg+xml" manifest:full-path="Pictures/277.svg"/>
  <manifest:file-entry manifest:media-type="image/svg+xml" manifest:full-path="Pictures/276.svg"/>
  <manifest:file-entry manifest:media-type="image/svg+xml" manifest:full-path="Pictures/275.svg"/>
  <manifest:file-entry manifest:media-type="image/svg+xml" manifest:full-path="Pictures/274.svg"/>
  <manifest:file-entry manifest:media-type="image/svg+xml" manifest:full-path="Pictures/273.svg"/>
  <manifest:file-entry manifest:media-type="image/svg+xml" manifest:full-path="Pictures/272.svg"/>
  <manifest:file-entry manifest:media-type="image/svg+xml" manifest:full-path="Pictures/271.svg"/>
  <manifest:file-entry manifest:media-type="image/svg+xml" manifest:full-path="Pictures/270.svg"/>
  <manifest:file-entry manifest:media-type="image/svg+xml" manifest:full-path="Pictures/269.svg"/>
  <manifest:file-entry manifest:media-type="image/svg+xml" manifest:full-path="Pictures/268.svg"/>
  <manifest:file-entry manifest:media-type="image/svg+xml" manifest:full-path="Pictures/267.svg"/>
  <manifest:file-entry manifest:media-type="image/svg+xml" manifest:full-path="Pictures/266.svg"/>
  <manifest:file-entry manifest:media-type="image/svg+xml" manifest:full-path="Pictures/265.svg"/>
  <manifest:file-entry manifest:media-type="image/svg+xml" manifest:full-path="Pictures/264.svg"/>
  <manifest:file-entry manifest:media-type="image/svg+xml" manifest:full-path="Pictures/263.svg"/>
  <manifest:file-entry manifest:media-type="image/svg+xml" manifest:full-path="Pictures/262.svg"/>
  <manifest:file-entry manifest:media-type="image/svg+xml" manifest:full-path="Pictures/261.svg"/>
  <manifest:file-entry manifest:media-type="image/svg+xml" manifest:full-path="Pictures/260.svg"/>
  <manifest:file-entry manifest:media-type="image/svg+xml" manifest:full-path="Pictures/259.svg"/>
  <manifest:file-entry manifest:media-type="image/svg+xml" manifest:full-path="Pictures/258.svg"/>
  <manifest:file-entry manifest:media-type="image/svg+xml" manifest:full-path="Pictures/257.svg"/>
  <manifest:file-entry manifest:media-type="image/svg+xml" manifest:full-path="Pictures/256.svg"/>
  <manifest:file-entry manifest:media-type="image/svg+xml" manifest:full-path="Pictures/255.svg"/>
  <manifest:file-entry manifest:media-type="image/svg+xml" manifest:full-path="Pictures/254.svg"/>
  <manifest:file-entry manifest:media-type="image/svg+xml" manifest:full-path="Pictures/253.svg"/>
  <manifest:file-entry manifest:media-type="image/svg+xml" manifest:full-path="Pictures/252.svg"/>
  <manifest:file-entry manifest:media-type="image/svg+xml" manifest:full-path="Pictures/251.svg"/>
  <manifest:file-entry manifest:media-type="image/svg+xml" manifest:full-path="Pictures/250.svg"/>
  <manifest:file-entry manifest:media-type="image/svg+xml" manifest:full-path="Pictures/249.svg"/>
  <manifest:file-entry manifest:media-type="image/svg+xml" manifest:full-path="Pictures/248.svg"/>
  <manifest:file-entry manifest:media-type="image/svg+xml" manifest:full-path="Pictures/247.svg"/>
  <manifest:file-entry manifest:media-type="image/svg+xml" manifest:full-path="Pictures/246.svg"/>
  <manifest:file-entry manifest:media-type="image/svg+xml" manifest:full-path="Pictures/245.svg"/>
  <manifest:file-entry manifest:media-type="image/svg+xml" manifest:full-path="Pictures/244.svg"/>
  <manifest:file-entry manifest:media-type="image/svg+xml" manifest:full-path="Pictures/243.svg"/>
  <manifest:file-entry manifest:media-type="image/svg+xml" manifest:full-path="Pictures/242.svg"/>
  <manifest:file-entry manifest:media-type="image/svg+xml" manifest:full-path="Pictures/241.svg"/>
  <manifest:file-entry manifest:media-type="image/svg+xml" manifest:full-path="Pictures/240.svg"/>
  <manifest:file-entry manifest:media-type="image/svg+xml" manifest:full-path="Pictures/239.svg"/>
  <manifest:file-entry manifest:media-type="image/svg+xml" manifest:full-path="Pictures/238.svg"/>
  <manifest:file-entry manifest:media-type="image/svg+xml" manifest:full-path="Pictures/237.svg"/>
  <manifest:file-entry manifest:media-type="image/svg+xml" manifest:full-path="Pictures/236.svg"/>
  <manifest:file-entry manifest:media-type="image/svg+xml" manifest:full-path="Pictures/235.svg"/>
  <manifest:file-entry manifest:media-type="image/svg+xml" manifest:full-path="Pictures/234.svg"/>
  <manifest:file-entry manifest:media-type="image/svg+xml" manifest:full-path="Pictures/233.svg"/>
  <manifest:file-entry manifest:media-type="image/svg+xml" manifest:full-path="Pictures/232.svg"/>
  <manifest:file-entry manifest:media-type="image/svg+xml" manifest:full-path="Pictures/231.svg"/>
  <manifest:file-entry manifest:media-type="image/svg+xml" manifest:full-path="Pictures/230.svg"/>
  <manifest:file-entry manifest:media-type="image/svg+xml" manifest:full-path="Pictures/229.svg"/>
  <manifest:file-entry manifest:media-type="image/svg+xml" manifest:full-path="Pictures/228.svg"/>
  <manifest:file-entry manifest:media-type="image/svg+xml" manifest:full-path="Pictures/227.svg"/>
  <manifest:file-entry manifest:media-type="image/svg+xml" manifest:full-path="Pictures/226.svg"/>
  <manifest:file-entry manifest:media-type="image/svg+xml" manifest:full-path="Pictures/225.svg"/>
  <manifest:file-entry manifest:media-type="image/svg+xml" manifest:full-path="Pictures/224.svg"/>
  <manifest:file-entry manifest:media-type="image/svg+xml" manifest:full-path="Pictures/223.svg"/>
  <manifest:file-entry manifest:media-type="image/svg+xml" manifest:full-path="Pictures/222.svg"/>
  <manifest:file-entry manifest:media-type="image/svg+xml" manifest:full-path="Pictures/221.svg"/>
  <manifest:file-entry manifest:media-type="image/svg+xml" manifest:full-path="Pictures/220.svg"/>
  <manifest:file-entry manifest:media-type="image/svg+xml" manifest:full-path="Pictures/219.svg"/>
  <manifest:file-entry manifest:media-type="image/svg+xml" manifest:full-path="Pictures/218.svg"/>
  <manifest:file-entry manifest:media-type="image/svg+xml" manifest:full-path="Pictures/217.svg"/>
  <manifest:file-entry manifest:media-type="image/svg+xml" manifest:full-path="Pictures/216.svg"/>
  <manifest:file-entry manifest:media-type="image/svg+xml" manifest:full-path="Pictures/215.svg"/>
  <manifest:file-entry manifest:media-type="image/svg+xml" manifest:full-path="Pictures/214.svg"/>
  <manifest:file-entry manifest:media-type="image/svg+xml" manifest:full-path="Pictures/213.svg"/>
  <manifest:file-entry manifest:media-type="image/svg+xml" manifest:full-path="Pictures/212.svg"/>
  <manifest:file-entry manifest:media-type="image/svg+xml" manifest:full-path="Pictures/211.svg"/>
  <manifest:file-entry manifest:media-type="image/svg+xml" manifest:full-path="Pictures/210.svg"/>
  <manifest:file-entry manifest:media-type="image/svg+xml" manifest:full-path="Pictures/209.svg"/>
  <manifest:file-entry manifest:media-type="image/svg+xml" manifest:full-path="Pictures/208.svg"/>
  <manifest:file-entry manifest:media-type="image/svg+xml" manifest:full-path="Pictures/207.svg"/>
  <manifest:file-entry manifest:media-type="image/svg+xml" manifest:full-path="Pictures/206.svg"/>
  <manifest:file-entry manifest:media-type="image/svg+xml" manifest:full-path="Pictures/205.svg"/>
  <manifest:file-entry manifest:media-type="image/svg+xml" manifest:full-path="Pictures/204.svg"/>
  <manifest:file-entry manifest:media-type="image/svg+xml" manifest:full-path="Pictures/203.svg"/>
  <manifest:file-entry manifest:media-type="image/svg+xml" manifest:full-path="Pictures/202.svg"/>
  <manifest:file-entry manifest:media-type="image/svg+xml" manifest:full-path="Pictures/201.svg"/>
  <manifest:file-entry manifest:media-type="image/svg+xml" manifest:full-path="Pictures/200.svg"/>
  <manifest:file-entry manifest:media-type="image/svg+xml" manifest:full-path="Pictures/199.svg"/>
  <manifest:file-entry manifest:media-type="image/svg+xml" manifest:full-path="Pictures/198.svg"/>
  <manifest:file-entry manifest:media-type="image/svg+xml" manifest:full-path="Pictures/197.svg"/>
  <manifest:file-entry manifest:media-type="image/svg+xml" manifest:full-path="Pictures/196.svg"/>
  <manifest:file-entry manifest:media-type="image/svg+xml" manifest:full-path="Pictures/195.svg"/>
  <manifest:file-entry manifest:media-type="image/svg+xml" manifest:full-path="Pictures/194.svg"/>
  <manifest:file-entry manifest:media-type="image/svg+xml" manifest:full-path="Pictures/193.svg"/>
  <manifest:file-entry manifest:media-type="image/svg+xml" manifest:full-path="Pictures/192.svg"/>
  <manifest:file-entry manifest:media-type="image/svg+xml" manifest:full-path="Pictures/191.svg"/>
  <manifest:file-entry manifest:media-type="image/svg+xml" manifest:full-path="Pictures/190.svg"/>
  <manifest:file-entry manifest:media-type="image/svg+xml" manifest:full-path="Pictures/189.svg"/>
  <manifest:file-entry manifest:media-type="image/svg+xml" manifest:full-path="Pictures/188.svg"/>
  <manifest:file-entry manifest:media-type="image/svg+xml" manifest:full-path="Pictures/187.svg"/>
  <manifest:file-entry manifest:media-type="image/svg+xml" manifest:full-path="Pictures/186.svg"/>
  <manifest:file-entry manifest:media-type="image/svg+xml" manifest:full-path="Pictures/185.svg"/>
  <manifest:file-entry manifest:media-type="image/svg+xml" manifest:full-path="Pictures/184.svg"/>
  <manifest:file-entry manifest:media-type="image/svg+xml" manifest:full-path="Pictures/183.svg"/>
  <manifest:file-entry manifest:media-type="image/svg+xml" manifest:full-path="Pictures/182.svg"/>
  <manifest:file-entry manifest:media-type="image/svg+xml" manifest:full-path="Pictures/181.svg"/>
  <manifest:file-entry manifest:media-type="image/svg+xml" manifest:full-path="Pictures/180.svg"/>
  <manifest:file-entry manifest:media-type="image/svg+xml" manifest:full-path="Pictures/179.svg"/>
  <manifest:file-entry manifest:media-type="image/svg+xml" manifest:full-path="Pictures/178.svg"/>
  <manifest:file-entry manifest:media-type="image/svg+xml" manifest:full-path="Pictures/177.svg"/>
  <manifest:file-entry manifest:media-type="image/svg+xml" manifest:full-path="Pictures/176.svg"/>
  <manifest:file-entry manifest:media-type="image/svg+xml" manifest:full-path="Pictures/175.svg"/>
  <manifest:file-entry manifest:media-type="image/svg+xml" manifest:full-path="Pictures/174.svg"/>
  <manifest:file-entry manifest:media-type="image/svg+xml" manifest:full-path="Pictures/173.svg"/>
  <manifest:file-entry manifest:media-type="image/svg+xml" manifest:full-path="Pictures/172.svg"/>
  <manifest:file-entry manifest:media-type="image/svg+xml" manifest:full-path="Pictures/171.svg"/>
  <manifest:file-entry manifest:media-type="image/svg+xml" manifest:full-path="Pictures/170.svg"/>
  <manifest:file-entry manifest:media-type="image/svg+xml" manifest:full-path="Pictures/169.svg"/>
  <manifest:file-entry manifest:media-type="image/svg+xml" manifest:full-path="Pictures/168.svg"/>
  <manifest:file-entry manifest:media-type="image/svg+xml" manifest:full-path="Pictures/167.svg"/>
  <manifest:file-entry manifest:media-type="image/svg+xml" manifest:full-path="Pictures/166.svg"/>
  <manifest:file-entry manifest:media-type="image/svg+xml" manifest:full-path="Pictures/165.svg"/>
  <manifest:file-entry manifest:media-type="image/svg+xml" manifest:full-path="Pictures/164.svg"/>
  <manifest:file-entry manifest:media-type="image/svg+xml" manifest:full-path="Pictures/163.svg"/>
  <manifest:file-entry manifest:media-type="image/svg+xml" manifest:full-path="Pictures/162.svg"/>
  <manifest:file-entry manifest:media-type="image/svg+xml" manifest:full-path="Pictures/161.svg"/>
  <manifest:file-entry manifest:media-type="image/svg+xml" manifest:full-path="Pictures/160.svg"/>
  <manifest:file-entry manifest:media-type="image/svg+xml" manifest:full-path="Pictures/159.svg"/>
  <manifest:file-entry manifest:media-type="image/svg+xml" manifest:full-path="Pictures/158.svg"/>
  <manifest:file-entry manifest:media-type="image/svg+xml" manifest:full-path="Pictures/157.svg"/>
  <manifest:file-entry manifest:media-type="image/svg+xml" manifest:full-path="Pictures/156.svg"/>
  <manifest:file-entry manifest:media-type="image/svg+xml" manifest:full-path="Pictures/155.svg"/>
  <manifest:file-entry manifest:media-type="image/svg+xml" manifest:full-path="Pictures/154.svg"/>
  <manifest:file-entry manifest:media-type="image/svg+xml" manifest:full-path="Pictures/153.svg"/>
  <manifest:file-entry manifest:media-type="image/svg+xml" manifest:full-path="Pictures/152.svg"/>
  <manifest:file-entry manifest:media-type="image/svg+xml" manifest:full-path="Pictures/151.svg"/>
  <manifest:file-entry manifest:media-type="image/svg+xml" manifest:full-path="Pictures/150.svg"/>
  <manifest:file-entry manifest:media-type="image/svg+xml" manifest:full-path="Pictures/149.svg"/>
  <manifest:file-entry manifest:media-type="image/svg+xml" manifest:full-path="Pictures/148.svg"/>
  <manifest:file-entry manifest:media-type="image/svg+xml" manifest:full-path="Pictures/147.svg"/>
  <manifest:file-entry manifest:media-type="image/svg+xml" manifest:full-path="Pictures/146.svg"/>
  <manifest:file-entry manifest:media-type="image/svg+xml" manifest:full-path="Pictures/145.svg"/>
  <manifest:file-entry manifest:media-type="image/svg+xml" manifest:full-path="Pictures/144.svg"/>
  <manifest:file-entry manifest:media-type="image/svg+xml" manifest:full-path="Pictures/143.svg"/>
  <manifest:file-entry manifest:media-type="image/svg+xml" manifest:full-path="Pictures/142.svg"/>
  <manifest:file-entry manifest:media-type="image/svg+xml" manifest:full-path="Pictures/141.svg"/>
  <manifest:file-entry manifest:media-type="image/svg+xml" manifest:full-path="Pictures/140.svg"/>
  <manifest:file-entry manifest:media-type="image/svg+xml" manifest:full-path="Pictures/139.svg"/>
  <manifest:file-entry manifest:media-type="image/svg+xml" manifest:full-path="Pictures/138.svg"/>
  <manifest:file-entry manifest:media-type="image/svg+xml" manifest:full-path="Pictures/137.svg"/>
  <manifest:file-entry manifest:media-type="image/svg+xml" manifest:full-path="Pictures/136.svg"/>
  <manifest:file-entry manifest:media-type="image/svg+xml" manifest:full-path="Pictures/135.svg"/>
  <manifest:file-entry manifest:media-type="image/svg+xml" manifest:full-path="Pictures/134.svg"/>
  <manifest:file-entry manifest:media-type="image/svg+xml" manifest:full-path="Pictures/133.svg"/>
  <manifest:file-entry manifest:media-type="image/svg+xml" manifest:full-path="Pictures/132.svg"/>
  <manifest:file-entry manifest:media-type="image/svg+xml" manifest:full-path="Pictures/131.svg"/>
  <manifest:file-entry manifest:media-type="image/svg+xml" manifest:full-path="Pictures/130.svg"/>
  <manifest:file-entry manifest:media-type="image/svg+xml" manifest:full-path="Pictures/129.svg"/>
  <manifest:file-entry manifest:media-type="image/svg+xml" manifest:full-path="Pictures/128.svg"/>
  <manifest:file-entry manifest:media-type="image/svg+xml" manifest:full-path="Pictures/127.svg"/>
  <manifest:file-entry manifest:media-type="image/svg+xml" manifest:full-path="Pictures/126.svg"/>
  <manifest:file-entry manifest:media-type="image/svg+xml" manifest:full-path="Pictures/125.svg"/>
  <manifest:file-entry manifest:media-type="image/svg+xml" manifest:full-path="Pictures/124.svg"/>
  <manifest:file-entry manifest:media-type="image/svg+xml" manifest:full-path="Pictures/123.svg"/>
  <manifest:file-entry manifest:media-type="image/svg+xml" manifest:full-path="Pictures/122.svg"/>
  <manifest:file-entry manifest:media-type="image/svg+xml" manifest:full-path="Pictures/121.svg"/>
  <manifest:file-entry manifest:media-type="image/svg+xml" manifest:full-path="Pictures/120.svg"/>
  <manifest:file-entry manifest:media-type="image/svg+xml" manifest:full-path="Pictures/119.svg"/>
  <manifest:file-entry manifest:media-type="image/svg+xml" manifest:full-path="Pictures/118.svg"/>
  <manifest:file-entry manifest:media-type="image/svg+xml" manifest:full-path="Pictures/117.svg"/>
  <manifest:file-entry manifest:media-type="image/svg+xml" manifest:full-path="Pictures/116.svg"/>
  <manifest:file-entry manifest:media-type="image/svg+xml" manifest:full-path="Pictures/115.svg"/>
  <manifest:file-entry manifest:media-type="image/svg+xml" manifest:full-path="Pictures/114.svg"/>
  <manifest:file-entry manifest:media-type="image/svg+xml" manifest:full-path="Pictures/113.svg"/>
  <manifest:file-entry manifest:media-type="image/svg+xml" manifest:full-path="Pictures/112.svg"/>
  <manifest:file-entry manifest:media-type="image/svg+xml" manifest:full-path="Pictures/111.svg"/>
  <manifest:file-entry manifest:media-type="image/svg+xml" manifest:full-path="Pictures/110.svg"/>
  <manifest:file-entry manifest:media-type="image/svg+xml" manifest:full-path="Pictures/109.svg"/>
  <manifest:file-entry manifest:media-type="image/svg+xml" manifest:full-path="Pictures/108.svg"/>
  <manifest:file-entry manifest:media-type="image/svg+xml" manifest:full-path="Pictures/107.svg"/>
  <manifest:file-entry manifest:media-type="image/svg+xml" manifest:full-path="Pictures/106.svg"/>
  <manifest:file-entry manifest:media-type="image/svg+xml" manifest:full-path="Pictures/105.svg"/>
  <manifest:file-entry manifest:media-type="image/svg+xml" manifest:full-path="Pictures/104.svg"/>
  <manifest:file-entry manifest:media-type="image/svg+xml" manifest:full-path="Pictures/103.svg"/>
  <manifest:file-entry manifest:media-type="image/svg+xml" manifest:full-path="Pictures/102.svg"/>
  <manifest:file-entry manifest:media-type="image/svg+xml" manifest:full-path="Pictures/101.svg"/>
  <manifest:file-entry manifest:media-type="image/svg+xml" manifest:full-path="Pictures/100.svg"/>
  <manifest:file-entry manifest:media-type="image/svg+xml" manifest:full-path="Pictures/99.svg"/>
  <manifest:file-entry manifest:media-type="image/svg+xml" manifest:full-path="Pictures/98.svg"/>
  <manifest:file-entry manifest:media-type="image/svg+xml" manifest:full-path="Pictures/97.svg"/>
  <manifest:file-entry manifest:media-type="image/svg+xml" manifest:full-path="Pictures/96.svg"/>
  <manifest:file-entry manifest:media-type="image/svg+xml" manifest:full-path="Pictures/95.svg"/>
  <manifest:file-entry manifest:media-type="image/svg+xml" manifest:full-path="Pictures/94.svg"/>
  <manifest:file-entry manifest:media-type="image/svg+xml" manifest:full-path="Pictures/93.svg"/>
  <manifest:file-entry manifest:media-type="image/svg+xml" manifest:full-path="Pictures/92.svg"/>
  <manifest:file-entry manifest:media-type="image/svg+xml" manifest:full-path="Pictures/91.svg"/>
  <manifest:file-entry manifest:media-type="image/svg+xml" manifest:full-path="Pictures/90.svg"/>
  <manifest:file-entry manifest:media-type="image/svg+xml" manifest:full-path="Pictures/89.svg"/>
  <manifest:file-entry manifest:media-type="image/svg+xml" manifest:full-path="Pictures/88.svg"/>
  <manifest:file-entry manifest:media-type="image/svg+xml" manifest:full-path="Pictures/87.svg"/>
  <manifest:file-entry manifest:media-type="image/svg+xml" manifest:full-path="Pictures/86.svg"/>
  <manifest:file-entry manifest:media-type="image/svg+xml" manifest:full-path="Pictures/85.svg"/>
  <manifest:file-entry manifest:media-type="image/svg+xml" manifest:full-path="Pictures/84.svg"/>
  <manifest:file-entry manifest:media-type="image/svg+xml" manifest:full-path="Pictures/83.svg"/>
  <manifest:file-entry manifest:media-type="image/svg+xml" manifest:full-path="Pictures/82.svg"/>
  <manifest:file-entry manifest:media-type="image/svg+xml" manifest:full-path="Pictures/81.svg"/>
  <manifest:file-entry manifest:media-type="image/svg+xml" manifest:full-path="Pictures/80.svg"/>
  <manifest:file-entry manifest:media-type="image/svg+xml" manifest:full-path="Pictures/79.svg"/>
  <manifest:file-entry manifest:media-type="image/svg+xml" manifest:full-path="Pictures/78.svg"/>
  <manifest:file-entry manifest:media-type="image/svg+xml" manifest:full-path="Pictures/77.svg"/>
  <manifest:file-entry manifest:media-type="image/svg+xml" manifest:full-path="Pictures/76.svg"/>
  <manifest:file-entry manifest:media-type="image/svg+xml" manifest:full-path="Pictures/75.svg"/>
  <manifest:file-entry manifest:media-type="image/svg+xml" manifest:full-path="Pictures/74.svg"/>
  <manifest:file-entry manifest:media-type="image/svg+xml" manifest:full-path="Pictures/73.svg"/>
  <manifest:file-entry manifest:media-type="image/svg+xml" manifest:full-path="Pictures/72.svg"/>
  <manifest:file-entry manifest:media-type="image/svg+xml" manifest:full-path="Pictures/71.svg"/>
  <manifest:file-entry manifest:media-type="image/svg+xml" manifest:full-path="Pictures/70.svg"/>
  <manifest:file-entry manifest:media-type="image/svg+xml" manifest:full-path="Pictures/69.svg"/>
  <manifest:file-entry manifest:media-type="image/svg+xml" manifest:full-path="Pictures/68.svg"/>
  <manifest:file-entry manifest:media-type="image/svg+xml" manifest:full-path="Pictures/67.svg"/>
  <manifest:file-entry manifest:media-type="image/svg+xml" manifest:full-path="Pictures/66.svg"/>
  <manifest:file-entry manifest:media-type="image/svg+xml" manifest:full-path="Pictures/65.svg"/>
  <manifest:file-entry manifest:media-type="image/svg+xml" manifest:full-path="Pictures/64.svg"/>
  <manifest:file-entry manifest:media-type="image/svg+xml" manifest:full-path="Pictures/63.svg"/>
  <manifest:file-entry manifest:media-type="image/svg+xml" manifest:full-path="Pictures/62.svg"/>
  <manifest:file-entry manifest:media-type="image/svg+xml" manifest:full-path="Pictures/61.svg"/>
  <manifest:file-entry manifest:media-type="image/svg+xml" manifest:full-path="Pictures/60.svg"/>
  <manifest:file-entry manifest:media-type="image/svg+xml" manifest:full-path="Pictures/59.svg"/>
  <manifest:file-entry manifest:media-type="image/svg+xml" manifest:full-path="Pictures/58.svg"/>
  <manifest:file-entry manifest:media-type="image/svg+xml" manifest:full-path="Pictures/57.svg"/>
  <manifest:file-entry manifest:media-type="image/svg+xml" manifest:full-path="Pictures/56.svg"/>
  <manifest:file-entry manifest:media-type="image/svg+xml" manifest:full-path="Pictures/55.svg"/>
  <manifest:file-entry manifest:media-type="image/svg+xml" manifest:full-path="Pictures/54.svg"/>
  <manifest:file-entry manifest:media-type="image/svg+xml" manifest:full-path="Pictures/53.svg"/>
  <manifest:file-entry manifest:media-type="image/svg+xml" manifest:full-path="Pictures/52.svg"/>
  <manifest:file-entry manifest:media-type="image/svg+xml" manifest:full-path="Pictures/51.svg"/>
  <manifest:file-entry manifest:media-type="image/svg+xml" manifest:full-path="Pictures/50.svg"/>
  <manifest:file-entry manifest:media-type="image/svg+xml" manifest:full-path="Pictures/49.svg"/>
  <manifest:file-entry manifest:media-type="image/svg+xml" manifest:full-path="Pictures/48.svg"/>
  <manifest:file-entry manifest:media-type="image/svg+xml" manifest:full-path="Pictures/47.svg"/>
  <manifest:file-entry manifest:media-type="image/svg+xml" manifest:full-path="Pictures/46.svg"/>
  <manifest:file-entry manifest:media-type="image/svg+xml" manifest:full-path="Pictures/45.svg"/>
  <manifest:file-entry manifest:media-type="image/svg+xml" manifest:full-path="Pictures/44.svg"/>
  <manifest:file-entry manifest:media-type="image/svg+xml" manifest:full-path="Pictures/43.svg"/>
  <manifest:file-entry manifest:media-type="image/svg+xml" manifest:full-path="Pictures/42.svg"/>
  <manifest:file-entry manifest:media-type="image/svg+xml" manifest:full-path="Pictures/41.svg"/>
  <manifest:file-entry manifest:media-type="image/svg+xml" manifest:full-path="Pictures/40.svg"/>
  <manifest:file-entry manifest:media-type="image/svg+xml" manifest:full-path="Pictures/39.svg"/>
  <manifest:file-entry manifest:media-type="image/svg+xml" manifest:full-path="Pictures/38.svg"/>
  <manifest:file-entry manifest:media-type="image/svg+xml" manifest:full-path="Pictures/37.svg"/>
  <manifest:file-entry manifest:media-type="image/svg+xml" manifest:full-path="Pictures/36.svg"/>
  <manifest:file-entry manifest:media-type="image/svg+xml" manifest:full-path="Pictures/35.svg"/>
  <manifest:file-entry manifest:media-type="image/svg+xml" manifest:full-path="Pictures/34.svg"/>
  <manifest:file-entry manifest:media-type="image/svg+xml" manifest:full-path="Pictures/33.svg"/>
  <manifest:file-entry manifest:media-type="image/svg+xml" manifest:full-path="Pictures/32.svg"/>
  <manifest:file-entry manifest:media-type="image/svg+xml" manifest:full-path="Pictures/31.svg"/>
  <manifest:file-entry manifest:media-type="image/svg+xml" manifest:full-path="Pictures/30.svg"/>
  <manifest:file-entry manifest:media-type="image/svg+xml" manifest:full-path="Pictures/29.svg"/>
  <manifest:file-entry manifest:media-type="image/svg+xml" manifest:full-path="Pictures/28.svg"/>
  <manifest:file-entry manifest:media-type="image/svg+xml" manifest:full-path="Pictures/27.svg"/>
  <manifest:file-entry manifest:media-type="image/svg+xml" manifest:full-path="Pictures/26.svg"/>
  <manifest:file-entry manifest:media-type="image/svg+xml" manifest:full-path="Pictures/25.svg"/>
  <manifest:file-entry manifest:media-type="image/svg+xml" manifest:full-path="Pictures/24.svg"/>
  <manifest:file-entry manifest:media-type="image/svg+xml" manifest:full-path="Pictures/23.svg"/>
  <manifest:file-entry manifest:media-type="image/svg+xml" manifest:full-path="Pictures/22.svg"/>
  <manifest:file-entry manifest:media-type="image/svg+xml" manifest:full-path="Pictures/21.svg"/>
  <manifest:file-entry manifest:media-type="image/svg+xml" manifest:full-path="Pictures/20.svg"/>
  <manifest:file-entry manifest:media-type="image/svg+xml" manifest:full-path="Pictures/19.svg"/>
  <manifest:file-entry manifest:media-type="image/svg+xml" manifest:full-path="Pictures/18.svg"/>
  <manifest:file-entry manifest:media-type="image/svg+xml" manifest:full-path="Pictures/17.svg"/>
  <manifest:file-entry manifest:media-type="image/svg+xml" manifest:full-path="Pictures/16.svg"/>
  <manifest:file-entry manifest:media-type="image/svg+xml" manifest:full-path="Pictures/15.svg"/>
  <manifest:file-entry manifest:media-type="image/svg+xml" manifest:full-path="Pictures/14.svg"/>
  <manifest:file-entry manifest:media-type="image/svg+xml" manifest:full-path="Pictures/13.svg"/>
  <manifest:file-entry manifest:media-type="image/svg+xml" manifest:full-path="Pictures/12.svg"/>
  <manifest:file-entry manifest:media-type="image/svg+xml" manifest:full-path="Pictures/11.svg"/>
  <manifest:file-entry manifest:media-type="image/svg+xml" manifest:full-path="Pictures/10.svg"/>
  <manifest:file-entry manifest:media-type="image/svg+xml" manifest:full-path="Pictures/9.svg"/>
  <manifest:file-entry manifest:media-type="image/svg+xml" manifest:full-path="Pictures/8.svg"/>
  <manifest:file-entry manifest:media-type="image/svg+xml" manifest:full-path="Pictures/7.svg"/>
  <manifest:file-entry manifest:media-type="image/svg+xml" manifest:full-path="Pictures/6.svg"/>
  <manifest:file-entry manifest:media-type="image/svg+xml" manifest:full-path="Pictures/5.svg"/>
  <manifest:file-entry manifest:media-type="image/svg+xml" manifest:full-path="Pictures/4.svg"/>
  <manifest:file-entry manifest:media-type="image/svg+xml" manifest:full-path="Pictures/3.svg"/>
  <manifest:file-entry manifest:media-type="image/svg+xml" manifest:full-path="Pictures/2.svg"/>
  <manifest:file-entry manifest:media-type="image/svg+xml" manifest:full-path="Pictures/1.svg"/>
  <manifest:file-entry manifest:media-type="image/svg+xml" manifest:full-path="Pictures/0.sv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9362*"/>
    </style:style>
    <style:style style:name="Table1.B" style:family="table-column">
      <style:table-column-properties style:rel-column-width="9362*"/>
    </style:style>
    <style:style style:name="Table1.C" style:family="table-column">
      <style:table-column-properties style:rel-column-width="9362*"/>
    </style:style>
    <style:style style:name="Table1.D" style:family="table-column">
      <style:table-column-properties style:rel-column-width="9362*"/>
    </style:style>
    <style:style style:name="Table1.E" style:family="table-column">
      <style:table-column-properties style:rel-column-width="9362*"/>
    </style:style>
    <style:style style:name="Table1.F" style:family="table-column">
      <style:table-column-properties style:rel-column-width="9362*"/>
    </style:style>
    <style:style style:name="Table1.G" style:family="table-column">
      <style:table-column-properties style:rel-column-width="9362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6383*"/>
    </style:style>
    <style:style style:name="Table2.B" style:family="table-column">
      <style:table-column-properties style:rel-column-width="16383*"/>
    </style:style>
    <style:style style:name="Table2.C" style:family="table-column">
      <style:table-column-properties style:rel-column-width="16383*"/>
    </style:style>
    <style:style style:name="Table2.D" style:family="table-column">
      <style:table-column-properties style:rel-column-width="16383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6383*"/>
    </style:style>
    <style:style style:name="Table3.B" style:family="table-column">
      <style:table-column-properties style:rel-column-width="16383*"/>
    </style:style>
    <style:style style:name="Table3.C" style:family="table-column">
      <style:table-column-properties style:rel-column-width="16383*"/>
    </style:style>
    <style:style style:name="Table3.D" style:family="table-column">
      <style:table-column-properties style:rel-column-width="16383*"/>
    </style:style>
  </office:automatic-styles>
  <office:body>
    <office:text>
      <text:h text:style-name="Heading_20_1" text:outline-level="1"><text:bookmark-start text:name="buttons"/>Buttons<text:bookmark-end text:name="buttons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File</text:p>
            </table:table-cell>
            <table:table-cell table:style-name="TableHeaderRowCell" office:value-type="string">
              <text:p text:style-name="Table_20_Heading">IconName</text:p>
            </table:table-cell>
            <table:table-cell table:style-name="TableHeaderRowCell" office:value-type="string">
              <text:p text:style-name="Table_20_Heading">IconFil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shortText</text:p>
            </table:table-cell>
            <table:table-cell table:style-name="TableHeaderRowCell" office:value-type="string">
              <text:p text:style-name="Table_20_Heading">longText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components/ButtonDefs.ts#L44" office:name=""><text:span text:style-name="Definition"><text:span text:style-name="T1">AddonConfigAddOn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1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AddOns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apps.svg</text:span></text:a></text:p>
          </table:table-cell>
          <table:table-cell table:style-name="TableRowCell" office:value-type="string">
            <text:p text:style-name="Table_20_Contents"><draw:frame draw:name="img1" svg:width="0.41667in" svg:height="0.4166666666666667in"><draw:image xlink:href="Pictures/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" office:name=""><text:span text:style-name="Definition">Conf</text:span></text:a></text:p>
          </table:table-cell>
          <table:table-cell table:style-name="TableRowCell" office:value-type="string">
            <text:p text:style-name="Table_20_Contents">configure ap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" office:name=""><text:span text:style-name="Definition"><text:span text:style-name="T1">AddonConfigImage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7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Images</text:p>
          </table:table-cell>
          <table:table-cell table:style-name="TableRowCell" office:value-type="string">
            <text:p text:style-name="Table_20_Contents"><text:a xlink:type="simple" xlink:href="../../viewer/style/icons.less#L4" office:name=""><text:span text:style-name="Definition">image-icon.svg</text:span></text:a></text:p>
          </table:table-cell>
          <table:table-cell table:style-name="TableRowCell" office:value-type="string">
            <text:p text:style-name="Table_20_Contents"><draw:frame draw:name="img2" svg:width="0.41667in" svg:height="0.4166666666666667in"><draw:image xlink:href="Pictures/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" office:name=""><text:span text:style-name="Definition">Images</text:span></text:a></text:p>
          </table:table-cell>
          <table:table-cell table:style-name="TableRowCell" office:value-type="string">
            <text:p text:style-name="Table_20_Contents">image/icon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" office:name=""><text:span text:style-name="Definition"><text:span text:style-name="T1">AddonConfigPlu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40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3" svg:width="0.41667in" svg:height="0.4166666666666667in"><draw:image xlink:href="Pictures/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" office:name=""><text:span text:style-name="Definition">Add</text:span></text:a></text:p>
          </table:table-cell>
          <table:table-cell table:style-name="TableRowCell" office:value-type="string">
            <text:p text:style-name="Table_20_Contents">add user ap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" office:name=""><text:span text:style-name="Definition"><text:span text:style-name="T1">AddonConfigU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4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User</text:p>
          </table:table-cell>
          <table:table-cell table:style-name="TableRowCell" office:value-type="string">
            <text:p text:style-name="Table_20_Contents"><text:a xlink:type="simple" xlink:href="../../viewer/style/icons.less#L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4" svg:width="0.41667in" svg:height="0.4166666666666667in"><draw:image xlink:href="Pictures/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" office:name=""><text:span text:style-name="Definition">User</text:span></text:a></text:p>
          </table:table-cell>
          <table:table-cell table:style-name="TableRowCell" office:value-type="string">
            <text:p text:style-name="Table_20_Contents">user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2" office:name=""><text:span text:style-name="Definition"><text:span text:style-name="T1">AisInfo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53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AisInfoHide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5" svg:width="0.41667in" svg:height="0.4166666666666667in"><draw:image xlink:href="Pictures/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7" office:name=""><text:span text:style-name="Definition">Hide</text:span></text:a></text:p>
          </table:table-cell>
          <table:table-cell table:style-name="TableRowCell" office:value-type="string">
            <text:p text:style-name="Table_20_Contents">hide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8" office:name=""><text:span text:style-name="Definition"><text:span text:style-name="T1">AisInfoLoc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39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6" svg:width="0.41667in" svg:height="0.4166666666666667in"><draw:image xlink:href="Pictures/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4" office:name=""><text:span text:style-name="Definition">Locate</text:span></text:a></text:p>
          </table:table-cell>
          <table:table-cell table:style-name="TableRowCell" office:value-type="string">
            <text:p text:style-name="Table_20_Contents">center to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<text:span text:style-name="T1">Ai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3" office:name=""><text:span text:style-name="Definition">gui/AisCfg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7" svg:width="0.41667in" svg:height="0.4166666666666667in"><draw:image xlink:href="Pictures/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1" office:name=""><text:span text:style-name="Definition">Targets</text:span></text:a></text:p>
          </table:table-cell>
          <table:table-cell table:style-name="TableRowCell" office:value-type="string">
            <text:p text:style-name="Table_20_Contents">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AisItems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72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6" office:name=""><text:span text:style-name="Definition"><text:span text:style-name="T1">AisLock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9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Lock</text:p>
          </table:table-cell>
          <table:table-cell table:style-name="TableRowCell" office:value-type="string">
            <text:p text:style-name="Table_20_Contents"><text:a xlink:type="simple" xlink:href="../../viewer/style/icons.less#L101" office:name=""><text:span text:style-name="Definition">update_disabled.svg</text:span></text:a></text:p>
          </table:table-cell>
          <table:table-cell table:style-name="TableRowCell" office:value-type="string">
            <text:p text:style-name="Table_20_Contents"><draw:frame draw:name="img8" svg:width="0.41667in" svg:height="0.4166666666666667in"><draw:image xlink:href="Pictures/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5" office:name=""><text:span text:style-name="Definition">Pause</text:span></text:a></text:p>
          </table:table-cell>
          <table:table-cell table:style-name="TableRowCell" office:value-type="string">
            <text:p text:style-name="Table_20_Contents">pause upda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8" office:name=""><text:span text:style-name="Definition"><text:span text:style-name="T1">AisNeares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0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AisNearest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ais-nearest.svg</text:span></text:a></text:p>
          </table:table-cell>
          <table:table-cell table:style-name="TableRowCell" office:value-type="string">
            <text:p text:style-name="Table_20_Contents"><draw:frame draw:name="img9" svg:width="0.41667in" svg:height="0.4166666666666667in"><draw:image xlink:href="Pictures/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9" office:name=""><text:span text:style-name="Definition">Nearest</text:span></text:a></text:p>
          </table:table-cell>
          <table:table-cell table:style-name="TableRowCell" office:value-type="string">
            <text:p text:style-name="Table_20_Contents">nearest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8" office:name=""><text:span text:style-name="Definition">AisNearest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28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0" office:name=""><text:span text:style-name="Definition"><text:span text:style-name="T1">AisSearch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45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Search</text:p>
          </table:table-cell>
          <table:table-cell table:style-name="TableRowCell" office:value-type="string">
            <text:p text:style-name="Table_20_Contents"><text:a xlink:type="simple" xlink:href="../../viewer/style/icons.less#L104" office:name=""><text:span text:style-name="Definition">search.svg</text:span></text:a></text:p>
          </table:table-cell>
          <table:table-cell table:style-name="TableRowCell" office:value-type="string">
            <text:p text:style-name="Table_20_Contents"><draw:frame draw:name="img10" svg:width="0.41667in" svg:height="0.4166666666666667in"><draw:image xlink:href="Pictures/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8" office:name=""><text:span text:style-name="Definition">Search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2" office:name=""><text:span text:style-name="Definition"><text:span text:style-name="T1">AisSor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4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Sort</text:p>
          </table:table-cell>
          <table:table-cell table:style-name="TableRowCell" office:value-type="string">
            <text:p text:style-name="Table_20_Contents"><text:a xlink:type="simple" xlink:href="../../viewer/style/icons.less#L98" office:name=""><text:span text:style-name="Definition">sort.svg</text:span></text:a></text:p>
          </table:table-cell>
          <table:table-cell table:style-name="TableRowCell" office:value-type="string">
            <text:p text:style-name="Table_20_Contents"><draw:frame draw:name="img11" svg:width="0.41667in" svg:height="0.4166666666666667in"><draw:image xlink:href="Pictures/1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2" office:name=""><text:span text:style-name="Definition">So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7" office:name=""><text:span text:style-name="Definition"><text:span text:style-name="T1">AnchorWatch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81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Anchor</text:p>
          </table:table-cell>
          <table:table-cell table:style-name="TableRowCell" office:value-type="string">
            <text:p text:style-name="Table_20_Contents"><text:a xlink:type="simple" xlink:href="../../viewer/style/icons.less#L198" office:name=""><text:span text:style-name="Definition">anchor.svg</text:span></text:a></text:p>
          </table:table-cell>
          <table:table-cell table:style-name="TableRowCell" office:value-type="string">
            <text:p text:style-name="Table_20_Contents"><draw:frame draw:name="img12" svg:width="0.41667in" svg:height="0.4166666666666667in"><draw:image xlink:href="Pictures/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9" office:name=""><text:span text:style-name="Definition">Anchor</text:span></text:a></text:p>
          </table:table-cell>
          <table:table-cell table:style-name="TableRowCell" office:value-type="string">
            <text:p text:style-name="Table_20_Contents">anchor 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9" office:name=""><text:span text:style-name="Definition"><text:span text:style-name="T1">Android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Browser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13" svg:width="0.41667in" svg:height="0.4166666666666667in"><draw:image xlink:href="Pictures/1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5" office:name=""><text:span text:style-name="Definition">Browser</text:span></text:a></text:p>
          </table:table-cell>
          <table:table-cell table:style-name="TableRowCell" office:value-type="string">
            <text:p text:style-name="Table_20_Contents">external brows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" office:name=""><text:span text:style-name="Definition"><text:span text:style-name="T1">Back</text:span></text:span></text:a></text:p>
          </table:table-cell>
          <table:table-cell table:style-name="TableRowCell" office:value-type="string">
            <text:p text:style-name="Table_20_Contents"><text:a xlink:type="simple" xlink:href="../../viewer/gui/AddOnPageButtons.ts#L30" office:name=""><text:span text:style-name="Definition">gui/AddOnPageButtons.ts</text:span></text:a></text:p>
          </table:table-cell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14" svg:width="0.41667in" svg:height="0.4166666666666667in"><draw:image xlink:href="Pictures/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" office:name=""><text:span text:style-name="Definition">Back</text:span></text:a></text:p>
          </table:table-cell>
          <table:table-cell table:style-name="TableRowCell" office:value-type="string">
            <text:p text:style-name="Table_20_Contents">go b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<text:span text:style-name="T1">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50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15" svg:width="0.41667in" svg:height="0.4166666666666667in"><draw:image xlink:href="Pictures/1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" office:name=""><text:span text:style-name="Definition">Cancel</text:span></text:a></text:p>
          </table:table-cell>
          <table:table-cell table:style-name="TableRowCell" office:value-type="string">
            <text:p text:style-name="Table_20_Contents">leave / cance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35" office:name=""><text:span text:style-name="Definition">gui/General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components/UploadHandler.tsx#L313" office:name=""><text:span text:style-name="Definition">components/UploadHandler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15" office:name=""><text:span text:style-name="Definition">components/AnchorWatch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3" office:name=""><text:span text:style-name="Definition"><text:span text:style-name="T1">CenterAction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88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CenterAction</text:p>
          </table:table-cell>
          <table:table-cell table:style-name="TableRowCell" office:value-type="string">
            <text:p text:style-name="Table_20_Contents"><text:a xlink:type="simple" xlink:href="../../viewer/style/icons.less#L192" office:name=""><text:span text:style-name="Definition">center-action.svg</text:span></text:a></text:p>
          </table:table-cell>
          <table:table-cell table:style-name="TableRowCell" office:value-type="string">
            <text:p text:style-name="Table_20_Contents"><draw:frame draw:name="img16" svg:width="0.41667in" svg:height="0.4166666666666667in"><draw:image xlink:href="Pictures/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6" office:name=""><text:span text:style-name="Definition">Action</text:span></text:a></text:p>
          </table:table-cell>
          <table:table-cell table:style-name="TableRowCell" office:value-type="string">
            <text:p text:style-name="Table_20_Contents">map a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2" office:name=""><text:span text:style-name="Definition"><text:span text:style-name="T1">Cha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7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Charts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17" svg:width="0.41667in" svg:height="0.4166666666666667in"><draw:image xlink:href="Pictures/1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5" office:name=""><text:span text:style-name="Definition">Charts</text:span></text:a></text:p>
          </table:table-cell>
          <table:table-cell table:style-name="TableRowCell" office:value-type="string">
            <text:p text:style-name="Table_20_Contents">list char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0" office:name=""><text:span text:style-name="Definition"><text:span text:style-name="T1">Connected</text:span>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41" office:name=""><text:span text:style-name="Definition">gui/GeneralButtons.ts</text:span></text:a></text:p>
          </table:table-cell>
          <table:table-cell table:style-name="TableRowCell" office:value-type="string">
            <text:p text:style-name="Table_20_Contents">Connected</text:p>
          </table:table-cell>
          <table:table-cell table:style-name="TableRowCell" office:value-type="string">
            <text:p text:style-name="Table_20_Contents"><text:a xlink:type="simple" xlink:href="../../viewer/style/icons.less#L31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18" svg:width="0.41667in" svg:height="0.4166666666666667in"><draw:image xlink:href="Pictures/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3" office:name=""><text:span text:style-name="Definition">Conn</text:span></text:a></text:p>
          </table:table-cell>
          <table:table-cell table:style-name="TableRowCell" office:value-type="string">
            <text:p text:style-name="Table_20_Contents">connected m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3" office:name=""><text:span text:style-name="Definition"><text:span text:style-name="T1">CourseUp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32" office:name=""><text:span text:style-name="Definition">gui/NavPage.tsx</text:span></text:a></text:p>
          </table:table-cell>
          <table:table-cell table:style-name="TableRowCell" office:value-type="string">
            <text:p text:style-name="Table_20_Contents">CourseUp</text:p>
          </table:table-cell>
          <table:table-cell table:style-name="TableRowCell" office:value-type="string">
            <text:p text:style-name="Table_20_Contents"><text:a xlink:type="simple" xlink:href="../../viewer/style/icons.less#L161" office:name=""><text:span text:style-name="Definition">compass.svg</text:span></text:a></text:p>
          </table:table-cell>
          <table:table-cell table:style-name="TableRowCell" office:value-type="string">
            <text:p text:style-name="Table_20_Contents"><draw:frame draw:name="img19" svg:width="0.41667in" svg:height="0.4166666666666667in"><draw:image xlink:href="Pictures/1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1" office:name=""><text:span text:style-name="Definition">Course</text:span></text:a></text:p>
          </table:table-cell>
          <table:table-cell table:style-name="TableRowCell" office:value-type="string">
            <text:p text:style-name="Table_20_Contents">course u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3" office:name=""><text:span text:style-name="Definition">CourseUp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75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7" office:name=""><text:span text:style-name="Definition"><text:span text:style-name="T1">CreateFi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277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0" svg:width="0.41667in" svg:height="0.4166666666666667in"><draw:image xlink:href="Pictures/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3" office:name=""><text:span text:style-name="Definition">New</text:span></text:a></text:p>
          </table:table-cell>
          <table:table-cell table:style-name="TableRowCell" office:value-type="string">
            <text:p text:style-name="Table_20_Contents">create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0" office:name=""><text:span text:style-name="Definition"><text:span text:style-name="T1">DBAccep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1" office:name=""><text:span text:style-name="Definition">components/EulaDialog.jsx</text:span></text:a></text:p>
          </table:table-cell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70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21" svg:width="0.41667in" svg:height="0.4166666666666667in"><draw:image xlink:href="Pictures/2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3" office:name=""><text:span text:style-name="Definition">Accep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0" office:name=""><text:span text:style-name="Definition"><text:span text:style-name="T1">DBActiv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41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5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22" svg:width="0.41667in" svg:height="0.4166666666666667in"><draw:image xlink:href="Pictures/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5" office:name=""><text:span text:style-name="Definition">Activ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0" office:name=""><text:span text:style-name="Definition">DBActiva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619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<text:span text:style-name="T1">DB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253" office:name=""><text:span text:style-name="Definition">gui/NavPage.t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3" svg:width="0.41667in" svg:height="0.4166666666666667in"><draw:image xlink:href="Pictures/2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2" office:name=""><text:span text:style-name="Definition">Ad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3" office:name=""><text:span text:style-name="Definition"><text:span text:style-name="T1">DBAddSu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ombinedWidget.jsx#L107" office:name=""><text:span text:style-name="Definition">components/CombinedWidget.j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4" svg:width="0.41667in" svg:height="0.4166666666666667in"><draw:image xlink:href="Pictures/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2" office:name=""><text:span text:style-name="Definition">+Sub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7" office:name=""><text:span text:style-name="Definition"><text:span text:style-name="T1">DB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0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88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5" svg:width="0.41667in" svg:height="0.4166666666666667in"><draw:image xlink:href="Pictures/2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3" office:name=""><text:span text:style-name="Definition">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4" office:name=""><text:span text:style-name="Definition"><text:span text:style-name="T1">DBAnchor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3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Boat</text:p>
          </table:table-cell>
          <table:table-cell table:style-name="TableRowCell" office:value-type="string">
            <text:p text:style-name="Table_20_Contents"><text:a xlink:type="simple" xlink:href="../../viewer/style/icons.less#L204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6" svg:width="0.41667in" svg:height="0.4166666666666667in"><draw:image xlink:href="Pictures/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7" office:name=""><text:span text:style-name="Definition">Boat</text:span></text:a></text:p>
          </table:table-cell>
          <table:table-cell table:style-name="TableRowCell" office:value-type="string">
            <text:p text:style-name="Table_20_Contents">at boat po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8" office:name=""><text:span text:style-name="Definition"><text:span text:style-name="T1">DBAnchorCen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7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27" svg:width="0.41667in" svg:height="0.4166666666666667in"><draw:image xlink:href="Pictures/2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0" office:name=""><text:span text:style-name="Definition">Center</text:span></text:a></text:p>
          </table:table-cell>
          <table:table-cell table:style-name="TableRowCell" office:value-type="string">
            <text:p text:style-name="Table_20_Contents">at map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2" office:name=""><text:span text:style-name="Definition"><text:span text:style-name="T1">DBAuto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78" office:name=""><text:span text:style-name="Definition">components/LogDialog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28" svg:width="0.41667in" svg:height="0.4166666666666667in"><draw:image xlink:href="Pictures/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7" office:name=""><text:span text:style-name="Definition">Aut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3" office:name=""><text:span text:style-name="Definition"><text:span text:style-name="T1">DB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89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Before</text:p>
          </table:table-cell>
          <table:table-cell table:style-name="TableRowCell" office:value-type="string">
            <text:p text:style-name="Table_20_Contents"><text:a xlink:type="simple" xlink:href="../../viewer/style/icons.less#L285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29" svg:width="0.41667in" svg:height="0.4166666666666667in"><draw:image xlink:href="Pictures/2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0" office:name=""><text:span text:style-name="Definition">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<text:span text:style-name="T1">DB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51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30" svg:width="0.41667in" svg:height="0.4166666666666667in"><draw:image xlink:href="Pictures/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4" office:name=""><text:span text:style-name="Definition">Cance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26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0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42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29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6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4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9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0" office:name=""><text:span text:style-name="Definition">components/Eula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0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068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138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5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5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3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8" office:name=""><text:span text:style-name="Definition">components/RemoteChannel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2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9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25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6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9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177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7" office:name=""><text:span text:style-name="Definition"><text:span text:style-name="T1">DB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654" office:name=""><text:span text:style-name="Definition">gui/NavPage.t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31" svg:width="0.41667in" svg:height="0.4166666666666667in"><draw:image xlink:href="Pictures/3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8" office:name=""><text:span text:style-name="Definition">Cen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5" office:name=""><text:span text:style-name="Definition"><text:span text:style-name="T1">DBCleanTrack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02" office:name=""><text:span text:style-name="Definition">gui/NavPage.t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6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2" svg:width="0.41667in" svg:height="0.4166666666666667in"><draw:image xlink:href="Pictures/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1" office:name=""><text:span text:style-name="Definition">Clean trac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7" office:name=""><text:span text:style-name="Definition"><text:span text:style-name="T1">DBClea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7" office:name=""><text:span text:style-name="Definition">components/BasicDialogs.t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6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3" svg:width="0.41667in" svg:height="0.4166666666666667in"><draw:image xlink:href="Pictures/3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3" office:name=""><text:span text:style-name="Definition">Clea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7" office:name=""><text:span text:style-name="Definition">DBClear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23" office:name=""><text:span text:style-name="Definition">components/ItemNam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8" office:name=""><text:span text:style-name="Definition"><text:span text:style-name="T1">DBColorUnse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2" office:name=""><text:span text:style-name="Definition">components/ColorDialog.jsx</text:span></text:a></text:p>
          </table:table-cell>
          <table:table-cell table:style-name="TableRowCell" office:value-type="string">
            <text:p text:style-name="Table_20_Contents">ColorReset</text:p>
          </table:table-cell>
          <table:table-cell table:style-name="TableRowCell" office:value-type="string">
            <text:p text:style-name="Table_20_Contents"><text:a xlink:type="simple" xlink:href="../../viewer/style/icons.less#L318" office:name=""><text:span text:style-name="Definition">format_color_reset.svg</text:span></text:a></text:p>
          </table:table-cell>
          <table:table-cell table:style-name="TableRowCell" office:value-type="string">
            <text:p text:style-name="Table_20_Contents"><draw:frame draw:name="img34" svg:width="0.41667in" svg:height="0.4166666666666667in"><draw:image xlink:href="Pictures/33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1" office:name=""><text:span text:style-name="Definition"><text:span text:style-name="T1">DBCompu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46" office:name=""><text:span text:style-name="Definition">components/TrackConvertDialog.jsx</text:span></text:a></text:p>
          </table:table-cell>
          <table:table-cell table:style-name="TableRowCell" office:value-type="string">
            <text:p text:style-name="Table_20_Contents">Start</text:p>
          </table:table-cell>
          <table:table-cell table:style-name="TableRowCell" office:value-type="string">
            <text:p text:style-name="Table_20_Contents"><text:a xlink:type="simple" xlink:href="../../viewer/style/icons.less#L297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35" svg:width="0.41667in" svg:height="0.4166666666666667in"><draw:image xlink:href="Pictures/3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9" office:name=""><text:span text:style-name="Definition">Comp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6" office:name=""><text:span text:style-name="Definition"><text:span text:style-name="T1">DBConfi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6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36" svg:width="0.41667in" svg:height="0.4166666666666667in"><draw:image xlink:href="Pictures/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2" office:name=""><text:span text:style-name="Definition">Confi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1" office:name=""><text:span text:style-name="Definition"><text:span text:style-name="T1">DB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3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Connect</text:p>
          </table:table-cell>
          <table:table-cell table:style-name="TableRowCell" office:value-type="string">
            <text:p text:style-name="Table_20_Contents"><text:a xlink:type="simple" xlink:href="../../viewer/style/icons.less#L329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37" svg:width="0.41667in" svg:height="0.4166666666666667in"><draw:image xlink:href="Pictures/3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1" office:name=""><text:span text:style-name="Definition">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8" office:name=""><text:span text:style-name="Definition"><text:span text:style-name="T1">DBCopy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9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Copy</text:p>
          </table:table-cell>
          <table:table-cell table:style-name="TableRowCell" office:value-type="string">
            <text:p text:style-name="Table_20_Contents"><text:a xlink:type="simple" xlink:href="../../viewer/style/icons.less#L282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38" svg:width="0.41667in" svg:height="0.4166666666666667in"><draw:image xlink:href="Pictures/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9" office:name=""><text:span text:style-name="Definition">Cop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<text:span text:style-name="T1">DB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79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6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9" svg:width="0.41667in" svg:height="0.4166666666666667in"><draw:image xlink:href="Pictures/3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3" office:name=""><text:span text:style-name="Definition">Dele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73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53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55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2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422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6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6" office:name=""><text:span text:style-name="Definition"><text:span text:style-name="T1">DBDisab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68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Disable</text:p>
          </table:table-cell>
          <table:table-cell table:style-name="TableRowCell" office:value-type="string">
            <text:p text:style-name="Table_20_Contents"><text:a xlink:type="simple" xlink:href="../../viewer/style/icons.less#L291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40" svg:width="0.41667in" svg:height="0.4166666666666667in"><draw:image xlink:href="Pictures/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4" office:name=""><text:span text:style-name="Definition">Dis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7" office:name=""><text:span text:style-name="Definition"><text:span text:style-name="T1">DBDiscar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1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6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41" svg:width="0.41667in" svg:height="0.4166666666666667in"><draw:image xlink:href="Pictures/4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4" office:name=""><text:span text:style-name="Definition">Discard change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7" office:name=""><text:span text:style-name="Definition"><text:span text:style-name="T1">DB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48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Disconnect</text:p>
          </table:table-cell>
          <table:table-cell table:style-name="TableRowCell" office:value-type="string">
            <text:p text:style-name="Table_20_Contents"><text:a xlink:type="simple" xlink:href="../../viewer/style/icons.less#L326" office:name=""><text:span text:style-name="Definition">plug-disconnect.svg</text:span></text:a></text:p>
          </table:table-cell>
          <table:table-cell table:style-name="TableRowCell" office:value-type="string">
            <text:p text:style-name="Table_20_Contents"><draw:frame draw:name="img42" svg:width="0.41667in" svg:height="0.4166666666666667in"><draw:image xlink:href="Pictures/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1" office:name=""><text:span text:style-name="Definition">Dis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4" office:name=""><text:span text:style-name="Definition"><text:span text:style-name="T1">DBDown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50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Download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file_download.svg</text:span></text:a></text:p>
          </table:table-cell>
          <table:table-cell table:style-name="TableRowCell" office:value-type="string">
            <text:p text:style-name="Table_20_Contents"><draw:frame draw:name="img43" svg:width="0.41667in" svg:height="0.4166666666666667in"><draw:image xlink:href="Pictures/4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7" office:name=""><text:span text:style-name="Definition">Down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4" office:name=""><text:span text:style-name="Definition">DBDown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Button.tsx#L107" office:name=""><text:span text:style-name="Definition">components/DownloadButton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3" office:name=""><text:span text:style-name="Definition"><text:span text:style-name="T1">DBEditCs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44" svg:width="0.41667in" svg:height="0.4166666666666667in"><draw:image xlink:href="Pictures/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1" office:name=""><text:span text:style-name="Definition">Edit CS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6" office:name=""><text:span text:style-name="Definition"><text:span text:style-name="T1">DBEditLayou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533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10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45" svg:width="0.41667in" svg:height="0.4166666666666667in"><draw:image xlink:href="Pictures/4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5" office:name=""><text:span text:style-name="Definition">Edi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6" office:name=""><text:span text:style-name="Definition">DBEditLayou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54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1" office:name=""><text:span text:style-name="Definition"><text:span text:style-name="T1">DBEdi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675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46" svg:width="0.41667in" svg:height="0.4166666666666667in"><draw:image xlink:href="Pictures/45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1" office:name=""><text:span text:style-name="Definition">DBEdit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69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3" office:name=""><text:span text:style-name="Definition"><text:span text:style-name="T1">DBEmpty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7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EmptyRoute</text:p>
          </table:table-cell>
          <table:table-cell table:style-name="TableRowCell" office:value-type="string">
            <text:p text:style-name="Table_20_Contents"><text:a xlink:type="simple" xlink:href="../../viewer/style/icons.less#L304" office:name=""><text:span text:style-name="Definition">delete_sweep.svg</text:span></text:a></text:p>
          </table:table-cell>
          <table:table-cell table:style-name="TableRowCell" office:value-type="string">
            <text:p text:style-name="Table_20_Contents"><draw:frame draw:name="img47" svg:width="0.41667in" svg:height="0.4166666666666667in"><draw:image xlink:href="Pictures/4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8" office:name=""><text:span text:style-name="Definition">Empt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3" office:name=""><text:span text:style-name="Definition"><text:span text:style-name="T1">DBFeature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15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48" svg:width="0.41667in" svg:height="0.4166666666666667in"><draw:image xlink:href="Pictures/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5" office:name=""><text:span text:style-name="Definition">New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5" office:name=""><text:span text:style-name="Definition"><text:span text:style-name="T1">DB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46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Hide</text:p>
          </table:table-cell>
          <table:table-cell table:style-name="TableRowCell" office:value-type="string">
            <text:p text:style-name="Table_20_Contents"><text:a xlink:type="simple" xlink:href="../../viewer/style/icons.less#L300" office:name=""><text:span text:style-name="Definition">visibility_off.svg</text:span></text:a></text:p>
          </table:table-cell>
          <table:table-cell table:style-name="TableRowCell" office:value-type="string">
            <text:p text:style-name="Table_20_Contents"><draw:frame draw:name="img49" svg:width="0.41667in" svg:height="0.4166666666666667in"><draw:image xlink:href="Pictures/4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6" office:name=""><text:span text:style-name="Definition">Hid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5" office:name=""><text:span text:style-name="Definition"><text:span text:style-name="T1">DBHide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HideOverlays</text:p>
          </table:table-cell>
          <table:table-cell table:style-name="TableRowCell" office:value-type="string">
            <text:p text:style-name="Table_20_Contents"><text:a xlink:type="simple" xlink:href="../../viewer/style/icons.less#L19" office:name=""><text:span text:style-name="Definition">layers-black-off.svg</text:span></text:a></text:p>
          </table:table-cell>
          <table:table-cell table:style-name="TableRowCell" office:value-type="string">
            <text:p text:style-name="Table_20_Contents"><draw:frame draw:name="img50" svg:width="0.41667in" svg:height="0.4166666666666667in"><draw:image xlink:href="Pictures/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4" office:name=""><text:span text:style-name="Definition">Hide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6" office:name=""><text:span text:style-name="Definition"><text:span text:style-name="T1">DBHide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388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HideOverlays</text:p>
          </table:table-cell>
          <table:table-cell table:style-name="TableRowCell" office:value-type="string">
            <text:p text:style-name="Table_20_Contents"><text:a xlink:type="simple" xlink:href="../../viewer/style/icons.less#L19" office:name=""><text:span text:style-name="Definition">layers-black-off.svg</text:span></text:a></text:p>
          </table:table-cell>
          <table:table-cell table:style-name="TableRowCell" office:value-type="string">
            <text:p text:style-name="Table_20_Contents"><draw:frame draw:name="img51" svg:width="0.41667in" svg:height="0.4166666666666667in"><draw:image xlink:href="Pictures/5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7" office:name=""><text:span text:style-name="Definition">Hide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<text:span text:style-name="T1">DBIgn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716" office:name=""><text:span text:style-name="Definition">components/Settin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../../viewer/style/button_text.less#L354" office:name=""><text:span text:style-name="Definition">Ignore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Ignore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7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1" office:name=""><text:span text:style-name="Definition"><text:span text:style-name="T1">DBInfo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64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Info</text:p>
          </table:table-cell>
          <table:table-cell table:style-name="TableRowCell" office:value-type="string">
            <text:p text:style-name="Table_20_Contents"><text:a xlink:type="simple" xlink:href="../../viewer/style/icons.less#L28" office:name=""><text:span text:style-name="Definition">ic_info.svg</text:span></text:a></text:p>
          </table:table-cell>
          <table:table-cell table:style-name="TableRowCell" office:value-type="string">
            <text:p text:style-name="Table_20_Contents"><draw:frame draw:name="img52" svg:width="0.41667in" svg:height="0.4166666666666667in"><draw:image xlink:href="Pictures/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3" office:name=""><text:span text:style-name="Definition">Inf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1" office:name=""><text:span text:style-name="Definition"><text:span text:style-name="T1">DBInse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88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53" svg:width="0.41667in" svg:height="0.4166666666666667in"><draw:image xlink:href="Pictures/5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6" office:name=""><text:span text:style-name="Definition">Ins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3" office:name=""><text:span text:style-name="Definition"><text:span text:style-name="T1">DBInsert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88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54" svg:width="0.41667in" svg:height="0.4166666666666667in"><draw:image xlink:href="Pictures/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8" office:name=""><text:span text:style-name="Definition">Insert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9" office:name=""><text:span text:style-name="Definition"><text:span text:style-name="T1">DBInsert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0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Before</text:p>
          </table:table-cell>
          <table:table-cell table:style-name="TableRowCell" office:value-type="string">
            <text:p text:style-name="Table_20_Contents"><text:a xlink:type="simple" xlink:href="../../viewer/style/icons.less#L285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55" svg:width="0.41667in" svg:height="0.4166666666666667in"><draw:image xlink:href="Pictures/5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5" office:name=""><text:span text:style-name="Definition">Insert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3" office:name=""><text:span text:style-name="Definition"><text:span text:style-name="T1">DBInsertRoute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6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After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56" svg:width="0.41667in" svg:height="0.4166666666666667in"><draw:image xlink:href="Pictures/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2" office:name=""><text:span text:style-name="Definition">Route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9" office:name=""><text:span text:style-name="Definition"><text:span text:style-name="T1">DBInsertRouteBefor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5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57" svg:width="0.41667in" svg:height="0.4166666666666667in"><draw:image xlink:href="Pictures/5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9" office:name=""><text:span text:style-name="Definition">Route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7" office:name=""><text:span text:style-name="Definition"><text:span text:style-name="T1">DBInve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8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InvertRoute</text:p>
          </table:table-cell>
          <table:table-cell table:style-name="TableRowCell" office:value-type="string">
            <text:p text:style-name="Table_20_Contents"><text:a xlink:type="simple" xlink:href="../../viewer/style/icons.less#L307" office:name=""><text:span text:style-name="Definition">invertroute.svg</text:span></text:a></text:p>
          </table:table-cell>
          <table:table-cell table:style-name="TableRowCell" office:value-type="string">
            <text:p text:style-name="Table_20_Contents"><draw:frame draw:name="img58" svg:width="0.41667in" svg:height="0.4166666666666667in"><draw:image xlink:href="Pictures/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1" office:name=""><text:span text:style-name="Definition">Inv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9" office:name=""><text:span text:style-name="Definition"><text:span text:style-name="T1">DBLoad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3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5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59" svg:width="0.41667in" svg:height="0.4166666666666667in"><draw:image xlink:href="Pictures/5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0" office:name=""><text:span text:style-name="Definition">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3" office:name=""><text:span text:style-name="Definition"><text:span text:style-name="T1">DBLo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24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Log</text:p>
          </table:table-cell>
          <table:table-cell table:style-name="TableRowCell" office:value-type="string">
            <text:p text:style-name="Table_20_Contents"><text:a xlink:type="simple" xlink:href="../../viewer/style/icons.less#L231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60" svg:width="0.41667in" svg:height="0.4166666666666667in"><draw:image xlink:href="Pictures/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3" office:name=""><text:span text:style-name="Definition">Lo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3" office:name=""><text:span text:style-name="Definition">DBLog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00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9" office:name=""><text:span text:style-name="Definition"><text:span text:style-name="T1">DBMeasur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33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37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61" svg:width="0.41667in" svg:height="0.4166666666666667in"><draw:image xlink:href="Pictures/6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4" office:name=""><text:span text:style-name="Definition">Measu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3" office:name=""><text:span text:style-name="Definition"><text:span text:style-name="T1">DBMeasure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33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37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62" svg:width="0.41667in" svg:height="0.4166666666666667in"><draw:image xlink:href="Pictures/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7" office:name=""><text:span text:style-name="Definition">+Measu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7" office:name=""><text:span text:style-name="Definition"><text:span text:style-name="T1">DBMeasureOff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52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Off</text:p>
          </table:table-cell>
          <table:table-cell table:style-name="TableRowCell" office:value-type="string">
            <text:p text:style-name="Table_20_Contents"><text:a xlink:type="simple" xlink:href="../../viewer/style/icons.less#L340" office:name=""><text:span text:style-name="Definition">straighten-off.svg</text:span></text:a></text:p>
          </table:table-cell>
          <table:table-cell table:style-name="TableRowCell" office:value-type="string">
            <text:p text:style-name="Table_20_Contents"><draw:frame draw:name="img63" svg:width="0.41667in" svg:height="0.4166666666666667in"><draw:image xlink:href="Pictures/6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0" office:name=""><text:span text:style-name="Definition">Measu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<text:span text:style-name="T1">DBN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08" office:name=""><text:span text:style-name="Definition">components/UserAppDialog.t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64" svg:width="0.41667in" svg:height="0.4166666666666667in"><draw:image xlink:href="Pictures/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6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New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88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5" office:name=""><text:span text:style-name="Definition"><text:span text:style-name="T1">DB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2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65" svg:width="0.41667in" svg:height="0.4166666666666667in"><draw:image xlink:href="Pictures/6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7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<text:span text:style-name="T1">DBOk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51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70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66" svg:width="0.41667in" svg:height="0.4166666666666667in"><draw:image xlink:href="Pictures/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1" office:name=""><text:span text:style-name="Definition">O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1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9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7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1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07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6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6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3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90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178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6" office:name=""><text:span text:style-name="Definition"><text:span text:style-name="T1">DBOpenCh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5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Charts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67" svg:width="0.41667in" svg:height="0.4166666666666667in"><draw:image xlink:href="Pictures/66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4" office:name=""><text:span text:style-name="Definition"><text:span text:style-name="T1">DB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99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68" svg:width="0.41667in" svg:height="0.4166666666666667in"><draw:image xlink:href="Pictures/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9" office:name=""><text:span text:style-name="Definition">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4" office:name=""><text:span text:style-name="Definition">DBOverlays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93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8" office:name=""><text:span text:style-name="Definition"><text:span text:style-name="T1">DBPre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79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View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69" svg:width="0.41667in" svg:height="0.4166666666666667in"><draw:image xlink:href="Pictures/6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6" office:name=""><text:span text:style-name="Definition">Pre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8" office:name=""><text:span text:style-name="Definition"><text:span text:style-name="T1">DBPropos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38" office:name=""><text:span text:style-name="Definition">components/ItemNameDialog.jsx</text:span></text:a></text:p>
          </table:table-cell>
          <table:table-cell table:style-name="TableRowCell" office:value-type="string">
            <text:p text:style-name="Table_20_Contents">Propose</text:p>
          </table:table-cell>
          <table:table-cell table:style-name="TableRowCell" office:value-type="string">
            <text:p text:style-name="Table_20_Contents"><text:a xlink:type="simple" xlink:href="../../viewer/style/icons.less#L322" office:name=""><text:span text:style-name="Definition">prompt_suggestion.svg</text:span></text:a></text:p>
          </table:table-cell>
          <table:table-cell table:style-name="TableRowCell" office:value-type="string">
            <text:p text:style-name="Table_20_Contents"><draw:frame draw:name="img70" svg:width="0.41667in" svg:height="0.4166666666666667in"><draw:image xlink:href="Pictures/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7" office:name=""><text:span text:style-name="Definition">Propose</text:span></text:a></text:p>
          </table:table-cell>
          <table:table-cell table:style-name="TableRowCell" office:value-type="string">
            <text:p text:style-name="Table_20_Contents">propose new nam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2" office:name=""><text:span text:style-name="Definition"><text:span text:style-name="T1">DB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15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71" svg:width="0.41667in" svg:height="0.4166666666666667in"><draw:image xlink:href="Pictures/7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1" office:name=""><text:span text:style-name="Definition">Re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2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3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2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ErrorListDialog.jsx#L39" office:name=""><text:span text:style-name="Definition">components/ErrorLis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8" office:name=""><text:span text:style-name="Definition"><text:span text:style-name="T1">DBRenam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4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72" svg:width="0.41667in" svg:height="0.4166666666666667in"><draw:image xlink:href="Pictures/7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0" office:name=""><text:span text:style-name="Definition">Rena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8" office:name=""><text:span text:style-name="Definition">DBRenam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7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1" office:name=""><text:span text:style-name="Definition"><text:span text:style-name="T1">DBRenumber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9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RenumberRoute</text:p>
          </table:table-cell>
          <table:table-cell table:style-name="TableRowCell" office:value-type="string">
            <text:p text:style-name="Table_20_Contents"><text:a xlink:type="simple" xlink:href="../../viewer/style/icons.less#L310" office:name=""><text:span text:style-name="Definition">format_list_numbered.svg</text:span></text:a></text:p>
          </table:table-cell>
          <table:table-cell table:style-name="TableRowCell" office:value-type="string">
            <text:p text:style-name="Table_20_Contents"><draw:frame draw:name="img73" svg:width="0.41667in" svg:height="0.4166666666666667in"><draw:image xlink:href="Pictures/7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4" office:name=""><text:span text:style-name="Definition">Renumb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3" office:name=""><text:span text:style-name="Definition"><text:span text:style-name="T1">DBRese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370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40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74" svg:width="0.41667in" svg:height="0.4166666666666667in"><draw:image xlink:href="Pictures/7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0" office:name=""><text:span text:style-name="Definition">Rese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3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5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3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48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3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2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9" office:name=""><text:span text:style-name="Definition"><text:span text:style-name="T1">DBRest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98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75" svg:width="0.41667in" svg:height="0.4166666666666667in"><draw:image xlink:href="Pictures/7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0" office:name=""><text:span text:style-name="Definition">Resta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3" office:name=""><text:span text:style-name="Definition"><text:span text:style-name="T1">DBRoutePoint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5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76" svg:width="0.41667in" svg:height="0.4166666666666667in"><draw:image xlink:href="Pictures/7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3" office:name=""><text:span text:style-name="Definition">Point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0" office:name=""><text:span text:style-name="Definition"><text:span text:style-name="T1">DBSav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90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Save</text:p>
          </table:table-cell>
          <table:table-cell table:style-name="TableRowCell" office:value-type="string">
            <text:p text:style-name="Table_20_Contents"><text:a xlink:type="simple" xlink:href="../../viewer/style/icons.less#L258" office:name=""><text:span text:style-name="Definition">save.svg</text:span></text:a></text:p>
          </table:table-cell>
          <table:table-cell table:style-name="TableRowCell" office:value-type="string">
            <text:p text:style-name="Table_20_Contents"><draw:frame draw:name="img77" svg:width="0.41667in" svg:height="0.4166666666666667in"><draw:image xlink:href="Pictures/7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9" office:name=""><text:span text:style-name="Definition">Sav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0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0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4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6" office:name=""><text:span text:style-name="Definition"><text:span text:style-name="T1">DBSaveA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96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SaveAs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78" svg:width="0.41667in" svg:height="0.4166666666666667in"><draw:image xlink:href="Pictures/7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6" office:name=""><text:span text:style-name="Definition">Save A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0" office:name=""><text:span text:style-name="Definition"><text:span text:style-name="T1">DBSchem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67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ChartScheme</text:p>
          </table:table-cell>
          <table:table-cell table:style-name="TableRowCell" office:value-type="string">
            <text:p text:style-name="Table_20_Contents"><text:a xlink:type="simple" xlink:href="../../viewer/style/icons.less#L333" office:name=""><text:span text:style-name="Definition">table_convert.svg</text:span></text:a></text:p>
          </table:table-cell>
          <table:table-cell table:style-name="TableRowCell" office:value-type="string">
            <text:p text:style-name="Table_20_Contents"><draw:frame draw:name="img79" svg:width="0.41667in" svg:height="0.4166666666666667in"><draw:image xlink:href="Pictures/7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6" office:name=""><text:span text:style-name="Definition">Sche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1" office:name=""><text:span text:style-name="Definition"><text:span text:style-name="T1">DBShow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27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80" svg:width="0.41667in" svg:height="0.4166666666666667in"><draw:image xlink:href="Pictures/7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1" office:name=""><text:span text:style-name="Definition">Show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2" office:name=""><text:span text:style-name="Definition"><text:span text:style-name="T1">DBShow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381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81" svg:width="0.41667in" svg:height="0.4166666666666667in"><draw:image xlink:href="Pictures/8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4" office:name=""><text:span text:style-name="Definition">Show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7" office:name=""><text:span text:style-name="Definition"><text:span text:style-name="T1">DBSta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642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Goto</text:p>
          </table:table-cell>
          <table:table-cell table:style-name="TableRowCell" office:value-type="string">
            <text:p text:style-name="Table_20_Contents"><text:a xlink:type="simple" xlink:href="../../viewer/style/icons.less#L174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82" svg:width="0.41667in" svg:height="0.4166666666666667in"><draw:image xlink:href="Pictures/8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5" office:name=""><text:span text:style-name="Definition">Start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5" office:name=""><text:span text:style-name="Definition"><text:span text:style-name="T1">DBSto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83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Stop</text:p>
          </table:table-cell>
          <table:table-cell table:style-name="TableRowCell" office:value-type="string">
            <text:p text:style-name="Table_20_Contents"><text:a xlink:type="simple" xlink:href="../../viewer/style/icons.less#L294" office:name=""><text:span text:style-name="Definition">stop_circle.svg</text:span></text:a></text:p>
          </table:table-cell>
          <table:table-cell table:style-name="TableRowCell" office:value-type="string">
            <text:p text:style-name="Table_20_Contents"><draw:frame draw:name="img83" svg:width="0.41667in" svg:height="0.4166666666666667in"><draw:image xlink:href="Pictures/8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7" office:name=""><text:span text:style-name="Definition">Sto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4" office:name=""><text:span text:style-name="Definition"><text:span text:style-name="T1">DBTo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15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84" svg:width="0.41667in" svg:height="0.4166666666666667in"><draw:image xlink:href="Pictures/8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8" office:name=""><text:span text:style-name="Definition">To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4" office:name=""><text:span text:style-name="Definition">DBTo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66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4" office:name=""><text:span text:style-name="Definition">DBToRou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416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5" office:name=""><text:span text:style-name="Definition"><text:span text:style-name="T1">DBUpd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20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70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85" svg:width="0.41667in" svg:height="0.4166666666666667in"><draw:image xlink:href="Pictures/8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9" office:name=""><text:span text:style-name="Definition">Upd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8" office:name=""><text:span text:style-name="Definition"><text:span text:style-name="T1">DBUserAp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709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AddOns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apps.svg</text:span></text:a></text:p>
          </table:table-cell>
          <table:table-cell table:style-name="TableRowCell" office:value-type="string">
            <text:p text:style-name="Table_20_Contents"><draw:frame draw:name="img86" svg:width="0.41667in" svg:height="0.4166666666666667in"><draw:image xlink:href="Pictures/8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1" office:name=""><text:span text:style-name="Definition">User Ap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2" office:name=""><text:span text:style-name="Definition"><text:span text:style-name="T1">DB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35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View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87" svg:width="0.41667in" svg:height="0.4166666666666667in"><draw:image xlink:href="Pictures/8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2" office:name=""><text:span text:style-name="Definition">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9" office:name=""><text:span text:style-name="Definition"><text:span text:style-name="T1">DBWpaConnect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10" office:name=""><text:span text:style-name="Definition">gui/WpaPage.jsx</text:span></text:a></text:p>
          </table:table-cell>
          <table:table-cell table:style-name="TableRowCell" office:value-type="string">
            <text:p text:style-name="Table_20_Contents">WpaConnect</text:p>
          </table:table-cell>
          <table:table-cell table:style-name="TableRowCell" office:value-type="string">
            <text:p text:style-name="Table_20_Contents"><text:a xlink:type="simple" xlink:href="../../viewer/style/icons.less#L314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88" svg:width="0.41667in" svg:height="0.4166666666666667in"><draw:image xlink:href="Pictures/87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5" office:name=""><text:span text:style-name="Definition"><text:span text:style-name="T1">DBWpaDis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03" office:name=""><text:span text:style-name="Definition">gui/WpaPage.jsx</text:span></text:a></text:p>
          </table:table-cell>
          <table:table-cell table:style-name="TableRowCell" office:value-type="string">
            <text:p text:style-name="Table_20_Contents">WifiOff</text:p>
          </table:table-cell>
          <table:table-cell table:style-name="TableRowCell" office:value-type="string">
            <text:p text:style-name="Table_20_Contents"><text:a xlink:type="simple" xlink:href="../../viewer/style/icons.less#L219" office:name=""><text:span text:style-name="Definition">wifi_off.svg</text:span></text:a></text:p>
          </table:table-cell>
          <table:table-cell table:style-name="TableRowCell" office:value-type="string">
            <text:p text:style-name="Table_20_Contents"><draw:frame draw:name="img89" svg:width="0.41667in" svg:height="0.4166666666666667in"><draw:image xlink:href="Pictures/88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1" office:name=""><text:span text:style-name="Definition"><text:span text:style-name="T1">DBWpaEn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96" office:name=""><text:span text:style-name="Definition">gui/WpaPage.jsx</text:span></text:a></text:p>
          </table:table-cell>
          <table:table-cell table:style-name="TableRowCell" office:value-type="string">
            <text:p text:style-name="Table_20_Contents">Wifi</text:p>
          </table:table-cell>
          <table:table-cell table:style-name="TableRowCell" office:value-type="string">
            <text:p text:style-name="Table_20_Contents"><text:a xlink:type="simple" xlink:href="../../viewer/style/icons.less#L216" office:name=""><text:span text:style-name="Definition">wifi.svg</text:span></text:a></text:p>
          </table:table-cell>
          <table:table-cell table:style-name="TableRowCell" office:value-type="string">
            <text:p text:style-name="Table_20_Contents"><draw:frame draw:name="img90" svg:width="0.41667in" svg:height="0.4166666666666667in"><draw:image xlink:href="Pictures/89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7" office:name=""><text:span text:style-name="Definition"><text:span text:style-name="T1">DBWpaRemov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89" office:name=""><text:span text:style-name="Definition">gui/WpaPage.j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6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91" svg:width="0.41667in" svg:height="0.4166666666666667in"><draw:image xlink:href="Pictures/90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9" office:name=""><text:span text:style-name="Definition"><text:span text:style-name="T1">DefaultValu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109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40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92" svg:width="0.41667in" svg:height="0.4166666666666667in"><draw:image xlink:href="Pictures/9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7" office:name=""><text:span text:style-name="Definition">Default</text:span></text:a></text:p>
          </table:table-cell>
          <table:table-cell table:style-name="TableRowCell" office:value-type="string">
            <text:p text:style-name="Table_20_Contents">default valu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<text:span text:style-name="T1">Dim</text:span></text:span></text:a></text:p>
          </table:table-cell>
          <table:table-cell table:style-name="TableRowCell" office:value-type="string">
            <text:p text:style-name="Table_20_Contents"><text:a xlink:type="simple" xlink:href="../../viewer/util/dimhandler.ts#L164" office:name=""><text:span text:style-name="Definition">util/dimhandler.ts</text:span></text:a></text:p>
          </table:table-cell>
          <table:table-cell table:style-name="TableRowCell" office:value-type="string">
            <text:p text:style-name="Table_20_Contents">Dim</text:p>
          </table:table-cell>
          <table:table-cell table:style-name="TableRowCell" office:value-type="string">
            <text:p text:style-name="Table_20_Contents"><text:a xlink:type="simple" xlink:href="../../viewer/style/icons.less#L110" office:name=""><text:span text:style-name="Definition">brightness_low.svg</text:span></text:a></text:p>
          </table:table-cell>
          <table:table-cell table:style-name="TableRowCell" office:value-type="string">
            <text:p text:style-name="Table_20_Contents"><draw:frame draw:name="img93" svg:width="0.41667in" svg:height="0.4166666666666667in"><draw:image xlink:href="Pictures/9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5" office:name=""><text:span text:style-name="Definition">Dim</text:span></text:a></text:p>
          </table:table-cell>
          <table:table-cell table:style-name="TableRowCell" office:value-type="string">
            <text:p text:style-name="Table_20_Contents">dim backligh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3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355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94" svg:width="0.41667in" svg:height="0.4166666666666667in"><draw:image xlink:href="Pictures/9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0" office:name=""><text:span text:style-name="Definition">Edit</text:span></text:a></text:p>
          </table:table-cell>
          <table:table-cell table:style-name="TableRowCell" office:value-type="string">
            <text:p text:style-name="Table_20_Contents">edit ite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3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8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3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84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3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390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3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StatusItems.tsx#L48" office:name=""><text:span text:style-name="Definition">components/StatusItem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8" office:name=""><text:span text:style-name="Definition"><text:span text:style-name="T1">EditPag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217" office:name=""><text:span text:style-name="Definition">components/EditPageDialog.tsx</text:span></text:a></text:p>
          </table:table-cell>
          <table:table-cell table:style-name="TableRowCell" office:value-type="string">
            <text:p text:style-name="Table_20_Contents">EditPage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tune.svg</text:span></text:a></text:p>
          </table:table-cell>
          <table:table-cell table:style-name="TableRowCell" office:value-type="string">
            <text:p text:style-name="Table_20_Contents"><draw:frame draw:name="img95" svg:width="0.41667in" svg:height="0.4166666666666667in"><draw:image xlink:href="Pictures/9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0" office:name=""><text:span text:style-name="Definition">Config</text:span></text:a></text:p>
          </table:table-cell>
          <table:table-cell table:style-name="TableRowCell" office:value-type="string">
            <text:p text:style-name="Table_20_Contents">page layout confi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1" office:name=""><text:span text:style-name="Definition"><text:span text:style-name="T1">FullScreen</text:span></text:span></text:a></text:p>
          </table:table-cell>
          <table:table-cell table:style-name="TableRowCell" office:value-type="string">
            <text:p text:style-name="Table_20_Contents"><text:a xlink:type="simple" xlink:href="../../viewer/util/Fullscreen.ts#L84" office:name=""><text:span text:style-name="Definition">util/Fullscreen.ts</text:span></text:a></text:p>
          </table:table-cell>
          <table:table-cell table:style-name="TableRowCell" office:value-type="string">
            <text:p text:style-name="Table_20_Contents">FullScreen</text:p>
          </table:table-cell>
          <table:table-cell table:style-name="TableRowCell" office:value-type="string">
            <text:p text:style-name="Table_20_Contents"><text:a xlink:type="simple" xlink:href="../../viewer/style/icons.less#L125" office:name=""><text:span text:style-name="Definition">fullscreen.svg</text:span></text:a></text:p>
          </table:table-cell>
          <table:table-cell table:style-name="TableRowCell" office:value-type="string">
            <text:p text:style-name="Table_20_Contents"><draw:frame draw:name="img96" svg:width="0.41667in" svg:height="0.4166666666666667in"><draw:image xlink:href="Pictures/9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" office:name=""><text:span text:style-name="Definition">Full</text:span></text:a></text:p>
          </table:table-cell>
          <table:table-cell table:style-name="TableRowCell" office:value-type="string">
            <text:p text:style-name="Table_20_Contents">full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6" office:name=""><text:span text:style-name="Definition"><text:span text:style-name="T1">Gps1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4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1</text:p>
          </table:table-cell>
          <table:table-cell table:style-name="TableRowCell" office:value-type="string">
            <text:p text:style-name="Table_20_Contents"><text:a xlink:type="simple" xlink:href="../../viewer/style/icons.less#L43" office:name=""><text:span text:style-name="Definition">num-1.svg</text:span></text:a></text:p>
          </table:table-cell>
          <table:table-cell table:style-name="TableRowCell" office:value-type="string">
            <text:p text:style-name="Table_20_Contents"><draw:frame draw:name="img97" svg:width="0.41667in" svg:height="0.4166666666666667in"><draw:image xlink:href="Pictures/9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2" office:name=""><text:span text:style-name="Definition"/></text:a></text:p>
          </table:table-cell>
          <table:table-cell table:style-name="TableRowCell" office:value-type="string">
            <text:p text:style-name="Table_20_Contents">dashboard 1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2" office:name=""><text:span text:style-name="Definition"><text:span text:style-name="T1">Gps10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3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10</text:p>
          </table:table-cell>
          <table:table-cell table:style-name="TableRowCell" office:value-type="string">
            <text:p text:style-name="Table_20_Contents"><text:a xlink:type="simple" xlink:href="../../viewer/style/icons.less#L70" office:name=""><text:span text:style-name="Definition">num-10.svg</text:span></text:a></text:p>
          </table:table-cell>
          <table:table-cell table:style-name="TableRowCell" office:value-type="string">
            <text:p text:style-name="Table_20_Contents"><draw:frame draw:name="img98" svg:width="0.41667in" svg:height="0.4166666666666667in"><draw:image xlink:href="Pictures/9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9" office:name=""><text:span text:style-name="Definition"/></text:a></text:p>
          </table:table-cell>
          <table:table-cell table:style-name="TableRowCell" office:value-type="string">
            <text:p text:style-name="Table_20_Contents">dashboard 10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0" office:name=""><text:span text:style-name="Definition"><text:span text:style-name="T1">Gps2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5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2</text:p>
          </table:table-cell>
          <table:table-cell table:style-name="TableRowCell" office:value-type="string">
            <text:p text:style-name="Table_20_Contents"><text:a xlink:type="simple" xlink:href="../../viewer/style/icons.less#L46" office:name=""><text:span text:style-name="Definition">num-2.svg</text:span></text:a></text:p>
          </table:table-cell>
          <table:table-cell table:style-name="TableRowCell" office:value-type="string">
            <text:p text:style-name="Table_20_Contents"><draw:frame draw:name="img99" svg:width="0.41667in" svg:height="0.4166666666666667in"><draw:image xlink:href="Pictures/9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5" office:name=""><text:span text:style-name="Definition"/></text:a></text:p>
          </table:table-cell>
          <table:table-cell table:style-name="TableRowCell" office:value-type="string">
            <text:p text:style-name="Table_20_Contents">dashboard 2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4" office:name=""><text:span text:style-name="Definition"><text:span text:style-name="T1">Gps3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6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3</text:p>
          </table:table-cell>
          <table:table-cell table:style-name="TableRowCell" office:value-type="string">
            <text:p text:style-name="Table_20_Contents"><text:a xlink:type="simple" xlink:href="../../viewer/style/icons.less#L49" office:name=""><text:span text:style-name="Definition">num-3.svg</text:span></text:a></text:p>
          </table:table-cell>
          <table:table-cell table:style-name="TableRowCell" office:value-type="string">
            <text:p text:style-name="Table_20_Contents"><draw:frame draw:name="img100" svg:width="0.41667in" svg:height="0.4166666666666667in"><draw:image xlink:href="Pictures/9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8" office:name=""><text:span text:style-name="Definition"/></text:a></text:p>
          </table:table-cell>
          <table:table-cell table:style-name="TableRowCell" office:value-type="string">
            <text:p text:style-name="Table_20_Contents">dashboard 3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8" office:name=""><text:span text:style-name="Definition"><text:span text:style-name="T1">Gps4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7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4</text:p>
          </table:table-cell>
          <table:table-cell table:style-name="TableRowCell" office:value-type="string">
            <text:p text:style-name="Table_20_Contents"><text:a xlink:type="simple" xlink:href="../../viewer/style/icons.less#L52" office:name=""><text:span text:style-name="Definition">num-4.svg</text:span></text:a></text:p>
          </table:table-cell>
          <table:table-cell table:style-name="TableRowCell" office:value-type="string">
            <text:p text:style-name="Table_20_Contents"><draw:frame draw:name="img101" svg:width="0.41667in" svg:height="0.4166666666666667in"><draw:image xlink:href="Pictures/10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1" office:name=""><text:span text:style-name="Definition"/></text:a></text:p>
          </table:table-cell>
          <table:table-cell table:style-name="TableRowCell" office:value-type="string">
            <text:p text:style-name="Table_20_Contents">dashboard 4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2" office:name=""><text:span text:style-name="Definition"><text:span text:style-name="T1">Gps5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8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5</text:p>
          </table:table-cell>
          <table:table-cell table:style-name="TableRowCell" office:value-type="string">
            <text:p text:style-name="Table_20_Contents"><text:a xlink:type="simple" xlink:href="../../viewer/style/icons.less#L55" office:name=""><text:span text:style-name="Definition">num-5.svg</text:span></text:a></text:p>
          </table:table-cell>
          <table:table-cell table:style-name="TableRowCell" office:value-type="string">
            <text:p text:style-name="Table_20_Contents"><draw:frame draw:name="img102" svg:width="0.41667in" svg:height="0.4166666666666667in"><draw:image xlink:href="Pictures/10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4" office:name=""><text:span text:style-name="Definition"/></text:a></text:p>
          </table:table-cell>
          <table:table-cell table:style-name="TableRowCell" office:value-type="string">
            <text:p text:style-name="Table_20_Contents">dashboard 5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6" office:name=""><text:span text:style-name="Definition"><text:span text:style-name="T1">Gps6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9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6</text:p>
          </table:table-cell>
          <table:table-cell table:style-name="TableRowCell" office:value-type="string">
            <text:p text:style-name="Table_20_Contents"><text:a xlink:type="simple" xlink:href="../../viewer/style/icons.less#L58" office:name=""><text:span text:style-name="Definition">num-6.svg</text:span></text:a></text:p>
          </table:table-cell>
          <table:table-cell table:style-name="TableRowCell" office:value-type="string">
            <text:p text:style-name="Table_20_Contents"><draw:frame draw:name="img103" svg:width="0.41667in" svg:height="0.4166666666666667in"><draw:image xlink:href="Pictures/10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7" office:name=""><text:span text:style-name="Definition"/></text:a></text:p>
          </table:table-cell>
          <table:table-cell table:style-name="TableRowCell" office:value-type="string">
            <text:p text:style-name="Table_20_Contents">dashboard 6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0" office:name=""><text:span text:style-name="Definition"><text:span text:style-name="T1">Gps7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0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7</text:p>
          </table:table-cell>
          <table:table-cell table:style-name="TableRowCell" office:value-type="string">
            <text:p text:style-name="Table_20_Contents"><text:a xlink:type="simple" xlink:href="../../viewer/style/icons.less#L61" office:name=""><text:span text:style-name="Definition">num-7.svg</text:span></text:a></text:p>
          </table:table-cell>
          <table:table-cell table:style-name="TableRowCell" office:value-type="string">
            <text:p text:style-name="Table_20_Contents"><draw:frame draw:name="img104" svg:width="0.41667in" svg:height="0.4166666666666667in"><draw:image xlink:href="Pictures/10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0" office:name=""><text:span text:style-name="Definition"/></text:a></text:p>
          </table:table-cell>
          <table:table-cell table:style-name="TableRowCell" office:value-type="string">
            <text:p text:style-name="Table_20_Contents">dashboard 7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4" office:name=""><text:span text:style-name="Definition"><text:span text:style-name="T1">Gps8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1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8</text:p>
          </table:table-cell>
          <table:table-cell table:style-name="TableRowCell" office:value-type="string">
            <text:p text:style-name="Table_20_Contents"><text:a xlink:type="simple" xlink:href="../../viewer/style/icons.less#L64" office:name=""><text:span text:style-name="Definition">num-8.svg</text:span></text:a></text:p>
          </table:table-cell>
          <table:table-cell table:style-name="TableRowCell" office:value-type="string">
            <text:p text:style-name="Table_20_Contents"><draw:frame draw:name="img105" svg:width="0.41667in" svg:height="0.4166666666666667in"><draw:image xlink:href="Pictures/10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3" office:name=""><text:span text:style-name="Definition"/></text:a></text:p>
          </table:table-cell>
          <table:table-cell table:style-name="TableRowCell" office:value-type="string">
            <text:p text:style-name="Table_20_Contents">dashboard 8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8" office:name=""><text:span text:style-name="Definition"><text:span text:style-name="T1">Gps9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2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9</text:p>
          </table:table-cell>
          <table:table-cell table:style-name="TableRowCell" office:value-type="string">
            <text:p text:style-name="Table_20_Contents"><text:a xlink:type="simple" xlink:href="../../viewer/style/icons.less#L67" office:name=""><text:span text:style-name="Definition">num-9.svg</text:span></text:a></text:p>
          </table:table-cell>
          <table:table-cell table:style-name="TableRowCell" office:value-type="string">
            <text:p text:style-name="Table_20_Contents"><draw:frame draw:name="img106" svg:width="0.41667in" svg:height="0.4166666666666667in"><draw:image xlink:href="Pictures/10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6" office:name=""><text:span text:style-name="Definition"/></text:a></text:p>
          </table:table-cell>
          <table:table-cell table:style-name="TableRowCell" office:value-type="string">
            <text:p text:style-name="Table_20_Contents">dashboard 9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<text:span text:style-name="T1">Gps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52" office:name=""><text:span text:style-name="Definition">gui/NavPage.t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107" svg:width="0.41667in" svg:height="0.4166666666666667in"><draw:image xlink:href="Pictures/10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7" office:name=""><text:span text:style-name="Definition">GPS</text:span></text:a></text:p>
          </table:table-cell>
          <table:table-cell table:style-name="TableRowCell" office:value-type="string">
            <text:p text:style-name="Table_20_Contents">center to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GpsCenter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8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5" office:name=""><text:span text:style-name="Definition"><text:span text:style-name="T1">Hel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70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Help</text:p>
          </table:table-cell>
          <table:table-cell table:style-name="TableRowCell" office:value-type="string">
            <text:p text:style-name="Table_20_Contents"><text:a xlink:type="simple" xlink:href="../../viewer/style/icons.less#L264" office:name=""><text:span text:style-name="Definition">ic_help_outline.svg</text:span></text:a></text:p>
          </table:table-cell>
          <table:table-cell table:style-name="TableRowCell" office:value-type="string">
            <text:p text:style-name="Table_20_Contents"><draw:frame draw:name="img108" svg:width="0.41667in" svg:height="0.4166666666666667in"><draw:image xlink:href="Pictures/10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4" office:name=""><text:span text:style-name="Definition">Hel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6" office:name=""><text:span text:style-name="Definition"><text:span text:style-name="T1">Impo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40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Imports</text:p>
          </table:table-cell>
          <table:table-cell table:style-name="TableRowCell" office:value-type="string">
            <text:p text:style-name="Table_20_Contents"><text:a xlink:type="simple" xlink:href="../../viewer/style/icons.less#L13" office:name=""><text:span text:style-name="Definition">swap_horiz.svg</text:span></text:a></text:p>
          </table:table-cell>
          <table:table-cell table:style-name="TableRowCell" office:value-type="string">
            <text:p text:style-name="Table_20_Contents"><draw:frame draw:name="img109" svg:width="0.41667in" svg:height="0.4166666666666667in"><draw:image xlink:href="Pictures/10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8" office:name=""><text:span text:style-name="Definition">Imports</text:span></text:a></text:p>
          </table:table-cell>
          <table:table-cell table:style-name="TableRowCell" office:value-type="string">
            <text:p text:style-name="Table_20_Contents">chart impor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4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.tsx#L86" office:name=""><text:span text:style-name="Definition">gui/LayoutsPage.tsx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10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110" svg:width="0.41667in" svg:height="0.4166666666666667in"><draw:image xlink:href="Pictures/10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7" office:name=""><text:span text:style-name="Definition">Layout</text:span></text:a></text:p>
          </table:table-cell>
          <table:table-cell table:style-name="TableRowCell" office:value-type="string">
            <text:p text:style-name="Table_20_Contents">select / edit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2" office:name=""><text:span text:style-name="Definition"><text:span text:style-name="T1">LayoutFinish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8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10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111" svg:width="0.41667in" svg:height="0.4166666666666667in"><draw:image xlink:href="Pictures/11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3" office:name=""><text:span text:style-name="Definition">Layout</text:span></text:a></text:p>
          </table:table-cell>
          <table:table-cell table:style-name="TableRowCell" office:value-type="string">
            <text:p text:style-name="Table_20_Contents">finish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9" office:name=""><text:span text:style-name="Definition"><text:span text:style-name="T1">LockMark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14" office:name=""><text:span text:style-name="Definition">gui/NavPage.tsx</text:span></text:a></text:p>
          </table:table-cell>
          <table:table-cell table:style-name="TableRowCell" office:value-type="string">
            <text:p text:style-name="Table_20_Contents">LockMarker</text:p>
          </table:table-cell>
          <table:table-cell table:style-name="TableRowCell" office:value-type="string">
            <text:p text:style-name="Table_20_Contents"><text:a xlink:type="simple" xlink:href="../../viewer/style/icons.less#L158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112" svg:width="0.41667in" svg:height="0.4166666666666667in"><draw:image xlink:href="Pictures/1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8" office:name=""><text:span text:style-name="Definition">Start</text:span></text:a></text:p>
          </table:table-cell>
          <table:table-cell table:style-name="TableRowCell" office:value-type="string">
            <text:p text:style-name="Table_20_Contents">start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9" office:name=""><text:span text:style-name="Definition">LockMarker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56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5" office:name=""><text:span text:style-name="Definition"><text:span text:style-name="T1">LockPo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92" office:name=""><text:span text:style-name="Definition">gui/NavPage.tsx</text:span></text:a></text:p>
          </table:table-cell>
          <table:table-cell table:style-name="TableRowCell" office:value-type="string">
            <text:p text:style-name="Table_20_Contents">LockPos</text:p>
          </table:table-cell>
          <table:table-cell table:style-name="TableRowCell" office:value-type="string">
            <text:p text:style-name="Table_20_Contents"><text:a xlink:type="simple" xlink:href="../../viewer/style/icons.less#L195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113" svg:width="0.41667in" svg:height="0.4166666666666667in"><draw:image xlink:href="Pictures/11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5" office:name=""><text:span text:style-name="Definition">Lock</text:span></text:a></text:p>
          </table:table-cell>
          <table:table-cell table:style-name="TableRowCell" office:value-type="string">
            <text:p text:style-name="Table_20_Contents">lock to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5" office:name=""><text:span text:style-name="Definition">LockPo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8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" office:name=""><text:span text:style-name="Definition"><text:span text:style-name="T1">MO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ob.ts#L59" office:name=""><text:span text:style-name="Definition">components/Mob.ts</text:span></text:a></text:p>
          </table:table-cell>
          <table:table-cell table:style-name="TableRowCell" office:value-type="string">
            <text:p text:style-name="Table_20_Contents">MOB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drowning.svg</text:span></text:a></text:p>
          </table:table-cell>
          <table:table-cell table:style-name="TableRowCell" office:value-type="string">
            <text:p text:style-name="Table_20_Contents"><draw:frame draw:name="img114" svg:width="0.41667in" svg:height="0.4166666666666667in"><draw:image xlink:href="Pictures/1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" office:name=""><text:span text:style-name="Definition">MOB</text:span></text:a></text:p>
          </table:table-cell>
          <table:table-cell table:style-name="TableRowCell" office:value-type="string">
            <text:p text:style-name="Table_20_Contents">man over boar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<text:span text:style-name="T1">MainExi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9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115" svg:width="0.41667in" svg:height="0.4166666666666667in"><draw:image xlink:href="Pictures/11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" office:name=""><text:span text:style-name="Definition">Exit</text:span></text:a></text:p>
          </table:table-cell>
          <table:table-cell table:style-name="TableRowCell" office:value-type="string">
            <text:p text:style-name="Table_20_Contents">exit AvNav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MainExit</text:span></text:a></text:p>
          </table:table-cell>
          <table:table-cell table:style-name="TableRowCell" office:value-type="string">
            <text:p text:style-name="Table_20_Contents"><text:a xlink:type="simple" xlink:href="../../viewer/gui/WarningPage.tsx#L125" office:name=""><text:span text:style-name="Definition">gui/Warning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9" office:name=""><text:span text:style-name="Definition"><text:span text:style-name="T1">MainInfo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Info</text:p>
          </table:table-cell>
          <table:table-cell table:style-name="TableRowCell" office:value-type="string">
            <text:p text:style-name="Table_20_Contents"><text:a xlink:type="simple" xlink:href="../../viewer/style/icons.less#L28" office:name=""><text:span text:style-name="Definition">ic_info.svg</text:span></text:a></text:p>
          </table:table-cell>
          <table:table-cell table:style-name="TableRowCell" office:value-type="string">
            <text:p text:style-name="Table_20_Contents"><draw:frame draw:name="img116" svg:width="0.41667in" svg:height="0.4166666666666667in"><draw:image xlink:href="Pictures/1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0" office:name=""><text:span text:style-name="Definition">Info</text:span></text:a></text:p>
          </table:table-cell>
          <table:table-cell table:style-name="TableRowCell" office:value-type="string">
            <text:p text:style-name="Table_20_Contents">version and licens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7" office:name=""><text:span text:style-name="Definition"><text:span text:style-name="T1">Main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426" office:name=""><text:span text:style-name="Definition">gui/MainNav.tsx</text:span></text:a></text:p>
          </table:table-cell>
          <table:table-cell table:style-name="TableRowCell" office:value-type="string">
            <text:p text:style-name="Table_20_Contents">MainNav</text:p>
          </table:table-cell>
          <table:table-cell table:style-name="TableRowCell" office:value-type="string">
            <text:p text:style-name="Table_20_Contents"><text:a xlink:type="simple" xlink:href="../../viewer/style/icons.less#L261" office:name=""><text:span text:style-name="Definition">menu-200.svg</text:span></text:a></text:p>
          </table:table-cell>
          <table:table-cell table:style-name="TableRowCell" office:value-type="string">
            <text:p text:style-name="Table_20_Contents"><draw:frame draw:name="img117" svg:width="0.41667in" svg:height="0.4166666666666667in"><draw:image xlink:href="Pictures/11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3" office:name=""><text:span text:style-name="Definition">Menu</text:span></text:a></text:p>
          </table:table-cell>
          <table:table-cell table:style-name="TableRowCell" office:value-type="string">
            <text:p text:style-name="Table_20_Contents">main 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<text:span text:style-name="T1">NavAdd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7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118" svg:width="0.41667in" svg:height="0.4166666666666667in"><draw:image xlink:href="Pictures/1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9" office:name=""><text:span text:style-name="Definition">+ Before</text:span></text:a></text:p>
          </table:table-cell>
          <table:table-cell table:style-name="TableRowCell" office:value-type="string">
            <text:p text:style-name="Table_20_Contents">add before curr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NavAdd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13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<text:span text:style-name="T1">NavAdd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86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After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119" svg:width="0.41667in" svg:height="0.4166666666666667in"><draw:image xlink:href="Pictures/11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6" office:name=""><text:span text:style-name="Definition">+ After</text:span></text:a></text:p>
          </table:table-cell>
          <table:table-cell table:style-name="TableRowCell" office:value-type="string">
            <text:p text:style-name="Table_20_Contents">add after curr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NavAddAfter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96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1" office:name=""><text:span text:style-name="Definition"><text:span text:style-name="T1">Nav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3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Delete</text:p>
          </table:table-cell>
          <table:table-cell table:style-name="TableRowCell" office:value-type="string">
            <text:p text:style-name="Table_20_Contents"><text:a xlink:type="simple" xlink:href="../../viewer/style/icons.less#L171" office:name=""><text:span text:style-name="Definition">wpminus.svg</text:span></text:a></text:p>
          </table:table-cell>
          <table:table-cell table:style-name="TableRowCell" office:value-type="string">
            <text:p text:style-name="Table_20_Contents"><draw:frame draw:name="img120" svg:width="0.41667in" svg:height="0.4166666666666667in"><draw:image xlink:href="Pictures/1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2" office:name=""><text:span text:style-name="Definition">Delete</text:span></text:a></text:p>
          </table:table-cell>
          <table:table-cell table:style-name="TableRowCell" office:value-type="string">
            <text:p text:style-name="Table_20_Contents">delete curr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9" office:name=""><text:span text:style-name="Definition"><text:span text:style-name="T1">NavGoto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57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Goto</text:p>
          </table:table-cell>
          <table:table-cell table:style-name="TableRowCell" office:value-type="string">
            <text:p text:style-name="Table_20_Contents"><text:a xlink:type="simple" xlink:href="../../viewer/style/icons.less#L174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121" svg:width="0.41667in" svg:height="0.4166666666666667in"><draw:image xlink:href="Pictures/12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8" office:name=""><text:span text:style-name="Definition">Start</text:span></text:a></text:p>
          </table:table-cell>
          <table:table-cell table:style-name="TableRowCell" office:value-type="string">
            <text:p text:style-name="Table_20_Contents">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9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gui/NavPage.tsx#L63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9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gui/NavPage.tsx#L72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9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17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0" office:name=""><text:span text:style-name="Definition"><text:span text:style-name="T1">NavMapWidget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76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MapWidgets</text:p>
          </table:table-cell>
          <table:table-cell table:style-name="TableRowCell" office:value-type="string">
            <text:p text:style-name="Table_20_Contents"><text:a xlink:type="simple" xlink:href="../../viewer/style/icons.less#L249" office:name=""><text:span text:style-name="Definition">assistant_nav.svg</text:span></text:a></text:p>
          </table:table-cell>
          <table:table-cell table:style-name="TableRowCell" office:value-type="string">
            <text:p text:style-name="Table_20_Contents"><draw:frame draw:name="img122" svg:width="0.41667in" svg:height="0.4166666666666667in"><draw:image xlink:href="Pictures/1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9" office:name=""><text:span text:style-name="Definition">On Map</text:span></text:a></text:p>
          </table:table-cell>
          <table:table-cell table:style-name="TableRowCell" office:value-type="string">
            <text:p text:style-name="Table_20_Contents">map wid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3" office:name=""><text:span text:style-name="Definition"><text:span text:style-name="T1">NavNex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21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Next</text:p>
          </table:table-cell>
          <table:table-cell table:style-name="TableRowCell" office:value-type="string">
            <text:p text:style-name="Table_20_Contents"><text:a xlink:type="simple" xlink:href="../../viewer/style/icons.less#L155" office:name=""><text:span text:style-name="Definition">nextwp.svg</text:span></text:a></text:p>
          </table:table-cell>
          <table:table-cell table:style-name="TableRowCell" office:value-type="string">
            <text:p text:style-name="Table_20_Contents"><draw:frame draw:name="img123" svg:width="0.41667in" svg:height="0.4166666666666667in"><draw:image xlink:href="Pictures/12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1" office:name=""><text:span text:style-name="Definition">Next</text:span></text:a></text:p>
          </table:table-cell>
          <table:table-cell table:style-name="TableRowCell" office:value-type="string">
            <text:p text:style-name="Table_20_Contents">goto nex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<text:span text:style-name="T1">NavOverlay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8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SelectChart</text:p>
          </table:table-cell>
          <table:table-cell table:style-name="TableRowCell" office:value-type="string">
            <text:p text:style-name="Table_20_Contents"><text:a xlink:type="simple" xlink:href="../../viewer/style/icons.less#L183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124" svg:width="0.41667in" svg:height="0.4166666666666667in"><draw:image xlink:href="Pictures/1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7" office:name=""><text:span text:style-name="Definition">Charts</text:span></text:a></text:p>
          </table:table-cell>
          <table:table-cell table:style-name="TableRowCell" office:value-type="string">
            <text:p text:style-name="Table_20_Contents">charts/ 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Overlays</text:span></text:a></text:p>
          </table:table-cell>
          <table:table-cell table:style-name="TableRowCell" office:value-type="string">
            <text:p text:style-name="Table_20_Contents"><text:a xlink:type="simple" xlink:href="../../viewer/gui/NavPage.tsx#L84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Overlay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37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Overlays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130" office:name=""><text:span text:style-name="Definition">components/Map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1" office:name=""><text:span text:style-name="Definition"><text:span text:style-name="T1">Nav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36" office:name=""><text:span text:style-name="Definition">gui/NavPage.tsx</text:span></text:a></text:p>
          </table:table-cell>
          <table:table-cell table:style-name="TableRowCell" office:value-type="string">
            <text:p text:style-name="Table_20_Contents">WpGoto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125" svg:width="0.41667in" svg:height="0.4166666666666667in"><draw:image xlink:href="Pictures/12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7" office:name=""><text:span text:style-name="Definition">Restart</text:span></text:a></text:p>
          </table:table-cell>
          <table:table-cell table:style-name="TableRowCell" office:value-type="string">
            <text:p text:style-name="Table_20_Contents">re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<text:span text:style-name="T1">NavTo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99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Locate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126" svg:width="0.41667in" svg:height="0.4166666666666667in"><draw:image xlink:href="Pictures/1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5" office:name=""><text:span text:style-name="Definition">Center</text:span></text:a></text:p>
          </table:table-cell>
          <table:table-cell table:style-name="TableRowCell" office:value-type="string">
            <text:p text:style-name="Table_20_Contents">wp to map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NavToCenter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44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3" office:name=""><text:span text:style-name="Definition"><text:span text:style-name="T1">Nigh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4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Night</text:p>
          </table:table-cell>
          <table:table-cell table:style-name="TableRowCell" office:value-type="string">
            <text:p text:style-name="Table_20_Contents"><text:a xlink:type="simple" xlink:href="../../viewer/style/icons.less#L119" office:name=""><text:span text:style-name="Definition">night.svg</text:span></text:a></text:p>
          </table:table-cell>
          <table:table-cell table:style-name="TableRowCell" office:value-type="string">
            <text:p text:style-name="Table_20_Contents"><draw:frame draw:name="img127" svg:width="0.41667in" svg:height="0.4166666666666667in"><draw:image xlink:href="Pictures/12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" office:name=""><text:span text:style-name="Definition">Night</text:span></text:a></text:p>
          </table:table-cell>
          <table:table-cell table:style-name="TableRowCell" office:value-type="string">
            <text:p text:style-name="Table_20_Contents">night m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1" office:name=""><text:span text:style-name="Definition"><text:span text:style-name="T1">Overflo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uttonList.tsx#L167" office:name=""><text:span text:style-name="Definition">components/ButtonList.tsx</text:span></text:a></text:p>
          </table:table-cell>
          <table:table-cell table:style-name="TableRowCell" office:value-type="string">
            <text:p text:style-name="Table_20_Contents">Overflow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more_left.svg</text:span></text:a></text:p>
          </table:table-cell>
          <table:table-cell table:style-name="TableRowCell" office:value-type="string">
            <text:p text:style-name="Table_20_Contents"><draw:frame draw:name="img128" svg:width="0.41667in" svg:height="0.4166666666666667in"><draw:image xlink:href="Pictures/1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6" office:name=""><text:span text:style-name="Definition">More</text:span></text:a></text:p>
          </table:table-cell>
          <table:table-cell table:style-name="TableRowCell" office:value-type="string">
            <text:p text:style-name="Table_20_Contents">more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0" office:name=""><text:span text:style-name="Definition"><text:span text:style-name="T1">Overlay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4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129" svg:width="0.41667in" svg:height="0.4166666666666667in"><draw:image xlink:href="Pictures/12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1" office:name=""><text:span text:style-name="Definition">Overlays</text:span></text:a></text:p>
          </table:table-cell>
          <table:table-cell table:style-name="TableRowCell" office:value-type="string">
            <text:p text:style-name="Table_20_Contents">overlay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9" office:name=""><text:span text:style-name="Definition"><text:span text:style-name="T1">ReloadUI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65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130" svg:width="0.41667in" svg:height="0.4166666666666667in"><draw:image xlink:href="Pictures/1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" office:name=""><text:span text:style-name="Definition">Reload</text:span></text:a></text:p>
          </table:table-cell>
          <table:table-cell table:style-name="TableRowCell" office:value-type="string">
            <text:p text:style-name="Table_20_Contents">reload AvNav U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7" office:name=""><text:span text:style-name="Definition"><text:span text:style-name="T1">RemoteChannel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95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RemoteChannel</text:p>
          </table:table-cell>
          <table:table-cell table:style-name="TableRowCell" office:value-type="string">
            <text:p text:style-name="Table_20_Contents"><text:a xlink:type="simple" xlink:href="../../viewer/style/icons.less#L122" office:name=""><text:span text:style-name="Definition">settings_remote.svg</text:span></text:a></text:p>
          </table:table-cell>
          <table:table-cell table:style-name="TableRowCell" office:value-type="string">
            <text:p text:style-name="Table_20_Contents"><draw:frame draw:name="img131" svg:width="0.41667in" svg:height="0.4166666666666667in"><draw:image xlink:href="Pictures/13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" office:name=""><text:span text:style-name="Definition">Remote</text:span></text:a></text:p>
          </table:table-cell>
          <table:table-cell table:style-name="TableRowCell" office:value-type="string">
            <text:p text:style-name="Table_20_Contents">remote contro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6" office:name=""><text:span text:style-name="Definition"><text:span text:style-name="T1">RevertLayout</text:span></text:span></text:a></text:p>
          </table:table-cell>
          <table:table-cell table:style-name="TableRowCell" office:value-type="string">
            <text:p text:style-name="Table_20_Contents"><text:a xlink:type="simple" xlink:href="../../viewer/util/layouthandler.ts#L1133" office:name=""><text:span text:style-name="Definition">util/layouthandler.ts</text:span></text:a></text:p>
          </table:table-cell>
          <table:table-cell table:style-name="TableRowCell" office:value-type="string">
            <text:p text:style-name="Table_20_Contents">Undo</text:p>
          </table:table-cell>
          <table:table-cell table:style-name="TableRowCell" office:value-type="string">
            <text:p text:style-name="Table_20_Contents"><text:a xlink:type="simple" xlink:href="../../viewer/style/icons.less#L252" office:name=""><text:span text:style-name="Definition">ic_undo.svg</text:span></text:a></text:p>
          </table:table-cell>
          <table:table-cell table:style-name="TableRowCell" office:value-type="string">
            <text:p text:style-name="Table_20_Contents"><draw:frame draw:name="img132" svg:width="0.41667in" svg:height="0.4166666666666667in"><draw:image xlink:href="Pictures/1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6" office:name=""><text:span text:style-name="Definition">Undo</text:span></text:a></text:p>
          </table:table-cell>
          <table:table-cell table:style-name="TableRowCell" office:value-type="string">
            <text:p text:style-name="Table_20_Contents">undo layout chan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2" office:name=""><text:span text:style-name="Definition"><text:span text:style-name="T1">RouteAdd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31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133" svg:width="0.41667in" svg:height="0.4166666666666667in"><draw:image xlink:href="Pictures/13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7" office:name=""><text:span text:style-name="Definition">Add</text:span></text:a></text:p>
          </table:table-cell>
          <table:table-cell table:style-name="TableRowCell" office:value-type="string">
            <text:p text:style-name="Table_20_Contents">add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9" office:name=""><text:span text:style-name="Definition"><text:span text:style-name="T1">RouteMenu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76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RouteMenu</text:p>
          </table:table-cell>
          <table:table-cell table:style-name="TableRowCell" office:value-type="string">
            <text:p text:style-name="Table_20_Contents"><text:a xlink:type="simple" xlink:href="../../viewer/style/icons.less#L180" office:name=""><text:span text:style-name="Definition">menu_open.svg</text:span></text:a></text:p>
          </table:table-cell>
          <table:table-cell table:style-name="TableRowCell" office:value-type="string">
            <text:p text:style-name="Table_20_Contents"><draw:frame draw:name="img134" svg:width="0.41667in" svg:height="0.4166666666666667in"><draw:image xlink:href="Pictures/1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3" office:name=""><text:span text:style-name="Definition">Menu</text:span></text:a></text:p>
          </table:table-cell>
          <table:table-cell table:style-name="TableRowCell" office:value-type="string">
            <text:p text:style-name="Table_20_Contents">route 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0" office:name=""><text:span text:style-name="Definition"><text:span text:style-name="T1">SectionView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Section</text:p>
          </table:table-cell>
          <table:table-cell table:style-name="TableRowCell" office:value-type="string">
            <text:p text:style-name="Table_20_Contents"><text:a xlink:type="simple" xlink:href="../../viewer/style/icons.less#L237" office:name=""><text:span text:style-name="Definition">category-200.svg</text:span></text:a></text:p>
          </table:table-cell>
          <table:table-cell table:style-name="TableRowCell" office:value-type="string">
            <text:p text:style-name="Table_20_Contents"><draw:frame draw:name="img135" svg:width="0.41667in" svg:height="0.4166666666666667in"><draw:image xlink:href="Pictures/13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1" office:name=""><text:span text:style-name="Definition">Groups</text:span></text:a></text:p>
          </table:table-cell>
          <table:table-cell table:style-name="TableRowCell" office:value-type="string">
            <text:p text:style-name="Table_20_Contents">settings grou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<text:span text:style-name="T1">ServerView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1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Server</text:p>
          </table:table-cell>
          <table:table-cell table:style-name="TableRowCell" office:value-type="string">
            <text:p text:style-name="Table_20_Contents"><text:a xlink:type="simple" xlink:href="../../viewer/style/icons.less#L89" office:name=""><text:span text:style-name="Definition">database-200.svg</text:span></text:a></text:p>
          </table:table-cell>
          <table:table-cell table:style-name="TableRowCell" office:value-type="string">
            <text:p text:style-name="Table_20_Contents"><draw:frame draw:name="img136" svg:width="0.41667in" svg:height="0.4166666666666667in"><draw:image xlink:href="Pictures/1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6" office:name=""><text:span text:style-name="Definition">Server</text:span></text:a></text:p>
          </table:table-cell>
          <table:table-cell table:style-name="TableRowCell" office:value-type="string">
            <text:p text:style-name="Table_20_Contents">server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0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0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1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8" office:name=""><text:span text:style-name="Definition"><text:span text:style-name="T1">SettingsDefault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8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40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137" svg:width="0.41667in" svg:height="0.4166666666666667in"><draw:image xlink:href="Pictures/13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7" office:name=""><text:span text:style-name="Definition">Defaults</text:span></text:a></text:p>
          </table:table-cell>
          <table:table-cell table:style-name="TableRowCell" office:value-type="string">
            <text:p text:style-name="Table_20_Contents">reset to defaul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4" office:name=""><text:span text:style-name="Definition"><text:span text:style-name="T1">Setting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138" svg:width="0.41667in" svg:height="0.4166666666666667in"><draw:image xlink:href="Pictures/1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4" office:name=""><text:span text:style-name="Definition">List</text:span></text:a></text:p>
          </table:table-cell>
          <table:table-cell table:style-name="TableRowCell" office:value-type="string">
            <text:p text:style-name="Table_20_Contents">store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4" office:name=""><text:span text:style-name="Definition"><text:span text:style-name="T1">SettingsLayoutOff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304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LayoutOff</text:p>
          </table:table-cell>
          <table:table-cell table:style-name="TableRowCell" office:value-type="string">
            <text:p text:style-name="Table_20_Contents"><text:a xlink:type="simple" xlink:href="../../viewer/style/icons.less#L246" office:name=""><text:span text:style-name="Definition">ballot-off.svg</text:span></text:a></text:p>
          </table:table-cell>
          <table:table-cell table:style-name="TableRowCell" office:value-type="string">
            <text:p text:style-name="Table_20_Contents"><draw:frame draw:name="img139" svg:width="0.41667in" svg:height="0.4166666666666667in"><draw:image xlink:href="Pictures/13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9" office:name=""><text:span text:style-name="Definition">Rem</text:span></text:a></text:p>
          </table:table-cell>
          <table:table-cell table:style-name="TableRowCell" office:value-type="string">
            <text:p text:style-name="Table_20_Contents">remove from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2" office:name=""><text:span text:style-name="Definition"><text:span text:style-name="T1">Settings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4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5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140" svg:width="0.41667in" svg:height="0.4166666666666667in"><draw:image xlink:href="Pictures/1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0" office:name=""><text:span text:style-name="Definition">Load</text:span></text:a></text:p>
          </table:table-cell>
          <table:table-cell table:style-name="TableRowCell" office:value-type="string">
            <text:p text:style-name="Table_20_Contents">loa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6" office:name=""><text:span text:style-name="Definition"><text:span text:style-name="T1">SettingsSave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56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Save</text:p>
          </table:table-cell>
          <table:table-cell table:style-name="TableRowCell" office:value-type="string">
            <text:p text:style-name="Table_20_Contents"><text:a xlink:type="simple" xlink:href="../../viewer/style/icons.less#L258" office:name=""><text:span text:style-name="Definition">save.svg</text:span></text:a></text:p>
          </table:table-cell>
          <table:table-cell table:style-name="TableRowCell" office:value-type="string">
            <text:p text:style-name="Table_20_Contents"><draw:frame draw:name="img141" svg:width="0.41667in" svg:height="0.4166666666666667in"><draw:image xlink:href="Pictures/14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3" office:name=""><text:span text:style-name="Definition">Save</text:span></text:a></text:p>
          </table:table-cell>
          <table:table-cell table:style-name="TableRowCell" office:value-type="string">
            <text:p text:style-name="Table_20_Contents">save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0" office:name=""><text:span text:style-name="Definition"><text:span text:style-name="T1">SettingsSplitReset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8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SplitReset</text:p>
          </table:table-cell>
          <table:table-cell table:style-name="TableRowCell" office:value-type="string">
            <text:p text:style-name="Table_20_Contents"><text:a xlink:type="simple" xlink:href="../../viewer/style/icons.less#L243" office:name=""><text:span text:style-name="Definition">reset_split.svg</text:span></text:a></text:p>
          </table:table-cell>
          <table:table-cell table:style-name="TableRowCell" office:value-type="string">
            <text:p text:style-name="Table_20_Contents"><draw:frame draw:name="img142" svg:width="0.41667in" svg:height="0.4166666666666667in"><draw:image xlink:href="Pictures/1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6" office:name=""><text:span text:style-name="Definition">Reset</text:span></text:a></text:p>
          </table:table-cell>
          <table:table-cell table:style-name="TableRowCell" office:value-type="string">
            <text:p text:style-name="Table_20_Contents">reset split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7" office:name=""><text:span text:style-name="Definition"><text:span text:style-name="T1">ShowRoutePanel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39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143" svg:width="0.41667in" svg:height="0.4166666666666667in"><draw:image xlink:href="Pictures/14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4" office:name=""><text:span text:style-name="Definition">Route</text:span></text:a></text:p>
          </table:table-cell>
          <table:table-cell table:style-name="TableRowCell" office:value-type="string">
            <text:p text:style-name="Table_20_Contents">edit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7" office:name=""><text:span text:style-name="Definition">ShowRoutePanel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3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<text:span text:style-name="T1">Show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43" office:name=""><text:span text:style-name="Definition">gui/LayoutsPageButtons.ts</text:span></text:a></text:p>
          </table:table-cell>
          <table:table-cell table:style-name="TableRowCell" office:value-type="string">
            <text:p text:style-name="Table_20_Contents">Settings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144" svg:width="0.41667in" svg:height="0.4166666666666667in"><draw:image xlink:href="Pictures/1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9" office:name=""><text:span text:style-name="Definition">Display</text:span></text:a></text:p>
          </table:table-cell>
          <table:table-cell table:style-name="TableRowCell" office:value-type="string">
            <text:p text:style-name="Table_20_Contents">display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52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8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emotePageButtons.ts#L31" office:name=""><text:span text:style-name="Definition">gui/Remote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81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7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5" office:name=""><text:span text:style-name="Definition"><text:span text:style-name="T1">Split</text:span></text:span></text:a></text:p>
          </table:table-cell>
          <table:table-cell table:style-name="TableRowCell" office:value-type="string">
            <text:p text:style-name="Table_20_Contents"><text:a xlink:type="simple" xlink:href="../../viewer/util/splitsupport.ts#L122" office:name=""><text:span text:style-name="Definition">util/splitsupport.ts</text:span></text:a></text:p>
          </table:table-cell>
          <table:table-cell table:style-name="TableRowCell" office:value-type="string">
            <text:p text:style-name="Table_20_Contents">Split</text:p>
          </table:table-cell>
          <table:table-cell table:style-name="TableRowCell" office:value-type="string">
            <text:p text:style-name="Table_20_Contents"><text:a xlink:type="simple" xlink:href="../../viewer/style/icons.less#L128" office:name=""><text:span text:style-name="Definition">vertical_split.svg</text:span></text:a></text:p>
          </table:table-cell>
          <table:table-cell table:style-name="TableRowCell" office:value-type="string">
            <text:p text:style-name="Table_20_Contents"><draw:frame draw:name="img145" svg:width="0.41667in" svg:height="0.4166666666666667in"><draw:image xlink:href="Pictures/14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" office:name=""><text:span text:style-name="Definition">Split</text:span></text:a></text:p>
          </table:table-cell>
          <table:table-cell table:style-name="TableRowCell" office:value-type="string">
            <text:p text:style-name="Table_20_Contents">split display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7" office:name=""><text:span text:style-name="Definition"><text:span text:style-name="T1">StatusAdd</text:span></text:span></text:a></text:p>
          </table:table-cell>
          <table:table-cell table:style-name="TableRowCell" office:value-type="string">
            <text:p text:style-name="Table_20_Contents"><text:a xlink:type="simple" xlink:href="../../viewer/gui/ChannelsPageButtons.ts#L31" office:name=""><text:span text:style-name="Definition">gui/ChannelsPageButtons.ts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146" svg:width="0.41667in" svg:height="0.4166666666666667in"><draw:image xlink:href="Pictures/1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1" office:name=""><text:span text:style-name="Definition">Add</text:span></text:a></text:p>
          </table:table-cell>
          <table:table-cell table:style-name="TableRowCell" office:value-type="string">
            <text:p text:style-name="Table_20_Contents">add conne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7" office:name=""><text:span text:style-name="Definition">StatusAdd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97" office:name=""><text:span text:style-name="Definition">gui/Server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1" office:name=""><text:span text:style-name="Definition"><text:span text:style-name="T1">StatusAddresses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QRCode</text:p>
          </table:table-cell>
          <table:table-cell table:style-name="TableRowCell" office:value-type="string">
            <text:p text:style-name="Table_20_Contents"><text:a xlink:type="simple" xlink:href="../../viewer/style/icons.less#L225" office:name=""><text:span text:style-name="Definition">qrcode.svg</text:span></text:a></text:p>
          </table:table-cell>
          <table:table-cell table:style-name="TableRowCell" office:value-type="string">
            <text:p text:style-name="Table_20_Contents"><draw:frame draw:name="img147" svg:width="0.41667in" svg:height="0.4166666666666667in"><draw:image xlink:href="Pictures/14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9" office:name=""><text:span text:style-name="Definition">Net</text:span></text:a></text:p>
          </table:table-cell>
          <table:table-cell table:style-name="TableRowCell" office:value-type="string">
            <text:p text:style-name="Table_20_Contents">own network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3" office:name=""><text:span text:style-name="Definition"><text:span text:style-name="T1">StatusAll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6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Expand</text:p>
          </table:table-cell>
          <table:table-cell table:style-name="TableRowCell" office:value-type="string">
            <text:p text:style-name="Table_20_Contents"><text:a xlink:type="simple" xlink:href="../../viewer/style/icons.less#L40" office:name=""><text:span text:style-name="Definition">expand-all-200.svg</text:span></text:a></text:p>
          </table:table-cell>
          <table:table-cell table:style-name="TableRowCell" office:value-type="string">
            <text:p text:style-name="Table_20_Contents"><draw:frame draw:name="img148" svg:width="0.41667in" svg:height="0.4166666666666667in"><draw:image xlink:href="Pictures/1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3" office:name=""><text:span text:style-name="Definition">Expand</text:span></text:a></text:p>
          </table:table-cell>
          <table:table-cell table:style-name="TableRowCell" office:value-type="string">
            <text:p text:style-name="Table_20_Contents">show al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5" office:name=""><text:span text:style-name="Definition"><text:span text:style-name="T1">StatusAndroid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Android</text:p>
          </table:table-cell>
          <table:table-cell table:style-name="TableRowCell" office:value-type="string">
            <text:p text:style-name="Table_20_Contents"><text:a xlink:type="simple" xlink:href="../../viewer/style/icons.less#L222" office:name=""><text:span text:style-name="Definition">ic_android.svg</text:span></text:a></text:p>
          </table:table-cell>
          <table:table-cell table:style-name="TableRowCell" office:value-type="string">
            <text:p text:style-name="Table_20_Contents"><draw:frame draw:name="img149" svg:width="0.41667in" svg:height="0.4166666666666667in"><draw:image xlink:href="Pictures/14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2" office:name=""><text:span text:style-name="Definition">Android</text:span></text:a></text:p>
          </table:table-cell>
          <table:table-cell table:style-name="TableRowCell" office:value-type="string">
            <text:p text:style-name="Table_20_Contents">androi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5" office:name=""><text:span text:style-name="Definition"><text:span text:style-name="T1">StatusDebu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8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Debug</text:p>
          </table:table-cell>
          <table:table-cell table:style-name="TableRowCell" office:value-type="string">
            <text:p text:style-name="Table_20_Contents"><text:a xlink:type="simple" xlink:href="../../viewer/style/icons.less#L234" office:name=""><text:span text:style-name="Definition">bug_report.svg</text:span></text:a></text:p>
          </table:table-cell>
          <table:table-cell table:style-name="TableRowCell" office:value-type="string">
            <text:p text:style-name="Table_20_Contents"><draw:frame draw:name="img150" svg:width="0.41667in" svg:height="0.4166666666666667in"><draw:image xlink:href="Pictures/1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7" office:name=""><text:span text:style-name="Definition">Debug</text:span></text:a></text:p>
          </table:table-cell>
          <table:table-cell table:style-name="TableRowCell" office:value-type="string">
            <text:p text:style-name="Table_20_Contents">enable debu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1" office:name=""><text:span text:style-name="Definition"><text:span text:style-name="T1">StatusLo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7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Log</text:p>
          </table:table-cell>
          <table:table-cell table:style-name="TableRowCell" office:value-type="string">
            <text:p text:style-name="Table_20_Contents"><text:a xlink:type="simple" xlink:href="../../viewer/style/icons.less#L231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151" svg:width="0.41667in" svg:height="0.4166666666666667in"><draw:image xlink:href="Pictures/15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4" office:name=""><text:span text:style-name="Definition">Log</text:span></text:a></text:p>
          </table:table-cell>
          <table:table-cell table:style-name="TableRowCell" office:value-type="string">
            <text:p text:style-name="Table_20_Contents">AvNav lo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7" office:name=""><text:span text:style-name="Definition"><text:span text:style-name="T1">Status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6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152" svg:width="0.41667in" svg:height="0.4166666666666667in"><draw:image xlink:href="Pictures/1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1" office:name=""><text:span text:style-name="Definition">Restart</text:span></text:a></text:p>
          </table:table-cell>
          <table:table-cell table:style-name="TableRowCell" office:value-type="string">
            <text:p text:style-name="Table_20_Contents">restart AvNav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3" office:name=""><text:span text:style-name="Definition"><text:span text:style-name="T1">StatusShutdown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124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Shutdown</text:p>
          </table:table-cell>
          <table:table-cell table:style-name="TableRowCell" office:value-type="string">
            <text:p text:style-name="Table_20_Contents"><text:a xlink:type="simple" xlink:href="../../viewer/style/icons.less#L228" office:name=""><text:span text:style-name="Definition">ic_power.svg</text:span></text:a></text:p>
          </table:table-cell>
          <table:table-cell table:style-name="TableRowCell" office:value-type="string">
            <text:p text:style-name="Table_20_Contents"><draw:frame draw:name="img153" svg:width="0.41667in" svg:height="0.4166666666666667in"><draw:image xlink:href="Pictures/15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8" office:name=""><text:span text:style-name="Definition">Halt</text:span></text:a></text:p>
          </table:table-cell>
          <table:table-cell table:style-name="TableRowCell" office:value-type="string">
            <text:p text:style-name="Table_20_Contents">shutdown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7" office:name=""><text:span text:style-name="Definition"><text:span text:style-name="T1">StatusWpa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Wifi</text:p>
          </table:table-cell>
          <table:table-cell table:style-name="TableRowCell" office:value-type="string">
            <text:p text:style-name="Table_20_Contents"><text:a xlink:type="simple" xlink:href="../../viewer/style/icons.less#L216" office:name=""><text:span text:style-name="Definition">wifi.svg</text:span></text:a></text:p>
          </table:table-cell>
          <table:table-cell table:style-name="TableRowCell" office:value-type="string">
            <text:p text:style-name="Table_20_Contents"><draw:frame draw:name="img154" svg:width="0.41667in" svg:height="0.4166666666666667in"><draw:image xlink:href="Pictures/1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6" office:name=""><text:span text:style-name="Definition">Wifi</text:span></text:a></text:p>
          </table:table-cell>
          <table:table-cell table:style-name="TableRowCell" office:value-type="string">
            <text:p text:style-name="Table_20_Contents">configure Wif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1" office:name=""><text:span text:style-name="Definition"><text:span text:style-name="T1">StopAnchorWatch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02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AnchorEnd</text:p>
          </table:table-cell>
          <table:table-cell table:style-name="TableRowCell" office:value-type="string">
            <text:p text:style-name="Table_20_Contents"><text:a xlink:type="simple" xlink:href="../../viewer/style/icons.less#L201" office:name=""><text:span text:style-name="Definition">anchor-end.svg</text:span></text:a></text:p>
          </table:table-cell>
          <table:table-cell table:style-name="TableRowCell" office:value-type="string">
            <text:p text:style-name="Table_20_Contents"><draw:frame draw:name="img155" svg:width="0.41667in" svg:height="0.4166666666666667in"><draw:image xlink:href="Pictures/15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2" office:name=""><text:span text:style-name="Definition">Stop</text:span></text:a></text:p>
          </table:table-cell>
          <table:table-cell table:style-name="TableRowCell" office:value-type="string">
            <text:p text:style-name="Table_20_Contents">anchor 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<text:span text:style-name="T1">StopNav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6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Stop</text:p>
          </table:table-cell>
          <table:table-cell table:style-name="TableRowCell" office:value-type="string">
            <text:p text:style-name="Table_20_Contents"><text:a xlink:type="simple" xlink:href="../../viewer/style/icons.less#L177" office:name=""><text:span text:style-name="Definition">stop-nav.svg</text:span></text:a></text:p>
          </table:table-cell>
          <table:table-cell table:style-name="TableRowCell" office:value-type="string">
            <text:p text:style-name="Table_20_Contents"><draw:frame draw:name="img156" svg:width="0.41667in" svg:height="0.4166666666666667in"><draw:image xlink:href="Pictures/1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0" office:name=""><text:span text:style-name="Definition">Stop</text:span></text:a></text:p>
          </table:table-cell>
          <table:table-cell table:style-name="TableRowCell" office:value-type="string">
            <text:p text:style-name="Table_20_Contents">sto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65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62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826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66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4" office:name=""><text:span text:style-name="Definition"><text:span text:style-name="T1">Stored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3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157" svg:width="0.41667in" svg:height="0.4166666666666667in"><draw:image xlink:href="Pictures/15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6" office:name=""><text:span text:style-name="Definition">List</text:span></text:a></text:p>
          </table:table-cell>
          <table:table-cell table:style-name="TableRowCell" office:value-type="string">
            <text:p text:style-name="Table_20_Contents">list stored rou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6" office:name=""><text:span text:style-name="Definition"><text:span text:style-name="T1">Sync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44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Sync</text:p>
          </table:table-cell>
          <table:table-cell table:style-name="TableRowCell" office:value-type="string">
            <text:p text:style-name="Table_20_Contents"><text:a xlink:type="simple" xlink:href="../../viewer/style/icons.less#L116" office:name=""><text:span text:style-name="Definition">sync.svg</text:span></text:a></text:p>
          </table:table-cell>
          <table:table-cell table:style-name="TableRowCell" office:value-type="string">
            <text:p text:style-name="Table_20_Contents"><draw:frame draw:name="img158" svg:width="0.41667in" svg:height="0.4166666666666667in"><draw:image xlink:href="Pictures/1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0" office:name=""><text:span text:style-name="Definition">Sync</text:span></text:a></text:p>
          </table:table-cell>
          <table:table-cell table:style-name="TableRowCell" office:value-type="string">
            <text:p text:style-name="Table_20_Contents">sync to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9" office:name=""><text:span text:style-name="Definition"><text:span text:style-name="T1">TrackItems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4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159" svg:width="0.41667in" svg:height="0.4166666666666667in"><draw:image xlink:href="Pictures/15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3" office:name=""><text:span text:style-name="Definition">List</text:span></text:a></text:p>
          </table:table-cell>
          <table:table-cell table:style-name="TableRowCell" office:value-type="string">
            <text:p text:style-name="Table_20_Contents">list tracks / lo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<text:span text:style-name="T1">Up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70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Upload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ic_file_upload.svg</text:span></text:a></text:p>
          </table:table-cell>
          <table:table-cell table:style-name="TableRowCell" office:value-type="string">
            <text:p text:style-name="Table_20_Contents"><draw:frame draw:name="img160" svg:width="0.41667in" svg:height="0.4166666666666667in"><draw:image xlink:href="Pictures/1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2" office:name=""><text:span text:style-name="Definition">Upload</text:span></text:a></text:p>
          </table:table-cell>
          <table:table-cell table:style-name="TableRowCell" office:value-type="string">
            <text:p text:style-name="Table_20_Contents">import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29" office:name=""><text:span text:style-name="Definition">gui/Layou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7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298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6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PluginsPageButtons.ts#L31" office:name=""><text:span text:style-name="Definition">gui/Plugin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63" office:name=""><text:span text:style-name="Definition">components/Edi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192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342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00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IconDialog.jsx#L144" office:name=""><text:span text:style-name="Definition">components/Icon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<text:span text:style-name="T1">WpEdi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8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161" svg:width="0.41667in" svg:height="0.4166666666666667in"><draw:image xlink:href="Pictures/16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8" office:name=""><text:span text:style-name="Definition">Edit</text:span></text:a></text:p>
          </table:table-cell>
          <table:table-cell table:style-name="TableRowCell" office:value-type="string">
            <text:p text:style-name="Table_20_Contents">edi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WpEdit</text:span></text:a></text:p>
          </table:table-cell>
          <table:table-cell table:style-name="TableRowCell" office:value-type="string">
            <text:p text:style-name="Table_20_Contents"><text:a xlink:type="simple" xlink:href="../../viewer/gui/NavPage.tsx#L290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7" office:name=""><text:span text:style-name="Definition"><text:span text:style-name="T1">WpGoto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07" office:name=""><text:span text:style-name="Definition">gui/NavPage.tsx</text:span></text:a></text:p>
          </table:table-cell>
          <table:table-cell table:style-name="TableRowCell" office:value-type="string">
            <text:p text:style-name="Table_20_Contents">WpGoto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162" svg:width="0.41667in" svg:height="0.4166666666666667in"><draw:image xlink:href="Pictures/1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4" office:name=""><text:span text:style-name="Definition">Start</text:span></text:a></text:p>
          </table:table-cell>
          <table:table-cell table:style-name="TableRowCell" office:value-type="string">
            <text:p text:style-name="Table_20_Contents">start w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5" office:name=""><text:span text:style-name="Definition"><text:span text:style-name="T1">WpLoca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7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Locate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163" svg:width="0.41667in" svg:height="0.4166666666666667in"><draw:image xlink:href="Pictures/16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5" office:name=""><text:span text:style-name="Definition">Locate</text:span></text:a></text:p>
          </table:table-cell>
          <table:table-cell table:style-name="TableRowCell" office:value-type="string">
            <text:p text:style-name="Table_20_Contents">center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5" office:name=""><text:span text:style-name="Definition">WpLocate</text:span></text:a></text:p>
          </table:table-cell>
          <table:table-cell table:style-name="TableRowCell" office:value-type="string">
            <text:p text:style-name="Table_20_Contents"><text:a xlink:type="simple" xlink:href="../../viewer/gui/NavPage.tsx#L27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<text:span text:style-name="T1">WpNex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9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Next</text:p>
          </table:table-cell>
          <table:table-cell table:style-name="TableRowCell" office:value-type="string">
            <text:p text:style-name="Table_20_Contents"><text:a xlink:type="simple" xlink:href="../../viewer/style/icons.less#L149" office:name=""><text:span text:style-name="Definition">ic_arrow_forward.svg</text:span></text:a></text:p>
          </table:table-cell>
          <table:table-cell table:style-name="TableRowCell" office:value-type="string">
            <text:p text:style-name="Table_20_Contents"><draw:frame draw:name="img164" svg:width="0.41667in" svg:height="0.4166666666666667in"><draw:image xlink:href="Pictures/1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1" office:name=""><text:span text:style-name="Definition">Next</text:span></text:a></text:p>
          </table:table-cell>
          <table:table-cell table:style-name="TableRowCell" office:value-type="string">
            <text:p text:style-name="Table_20_Contents">nex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WpNext</text:span></text:a></text:p>
          </table:table-cell>
          <table:table-cell table:style-name="TableRowCell" office:value-type="string">
            <text:p text:style-name="Table_20_Contents"><text:a xlink:type="simple" xlink:href="../../viewer/gui/NavPage.tsx#L34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<text:span text:style-name="T1">WpPreviou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07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Previous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165" svg:width="0.41667in" svg:height="0.4166666666666667in"><draw:image xlink:href="Pictures/16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4" office:name=""><text:span text:style-name="Definition">Previous</text:span></text:a></text:p>
          </table:table-cell>
          <table:table-cell table:style-name="TableRowCell" office:value-type="string">
            <text:p text:style-name="Table_20_Contents">previous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WpPrevious</text:span></text:a></text:p>
          </table:table-cell>
          <table:table-cell table:style-name="TableRowCell" office:value-type="string">
            <text:p text:style-name="Table_20_Contents"><text:a xlink:type="simple" xlink:href="../../viewer/gui/NavPage.tsx#L366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<text:span text:style-name="T1">ZoomIn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8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ZoomIn</text:p>
          </table:table-cell>
          <table:table-cell table:style-name="TableRowCell" office:value-type="string">
            <text:p text:style-name="Table_20_Contents"><text:a xlink:type="simple" xlink:href="../../viewer/style/icons.less#L186" office:name=""><text:span text:style-name="Definition">ic_zoom_in.svg</text:span></text:a></text:p>
          </table:table-cell>
          <table:table-cell table:style-name="TableRowCell" office:value-type="string">
            <text:p text:style-name="Table_20_Contents"><draw:frame draw:name="img166" svg:width="0.41667in" svg:height="0.4166666666666667in"><draw:image xlink:href="Pictures/1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0" office:name=""><text:span text:style-name="Definition">Zoom +</text:span></text:a></text:p>
          </table:table-cell>
          <table:table-cell table:style-name="TableRowCell" office:value-type="string">
            <text:p text:style-name="Table_20_Contents">zoom i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.tsx#L78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0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<text:span text:style-name="T1">ZoomOu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9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ZoomOut</text:p>
          </table:table-cell>
          <table:table-cell table:style-name="TableRowCell" office:value-type="string">
            <text:p text:style-name="Table_20_Contents"><text:a xlink:type="simple" xlink:href="../../viewer/style/icons.less#L189" office:name=""><text:span text:style-name="Definition">ic_zoom_out.svg</text:span></text:a></text:p>
          </table:table-cell>
          <table:table-cell table:style-name="TableRowCell" office:value-type="string">
            <text:p text:style-name="Table_20_Contents"><draw:frame draw:name="img167" svg:width="0.41667in" svg:height="0.4166666666666667in"><draw:image xlink:href="Pictures/16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3" office:name=""><text:span text:style-name="Definition">Zoom -</text:span></text:a></text:p>
          </table:table-cell>
          <table:table-cell table:style-name="TableRowCell" office:value-type="string">
            <text:p text:style-name="Table_20_Contents">zoom 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.tsx#L78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4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s"/>Icons<text:bookmark-end text:name="icons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Usage</text:p>
            </table:table-cell>
            <table:table-cell table:style-name="TableHeaderRowCell" office:value-type="string">
              <text:p text:style-name="Table_20_Heading">IconFile</text:p>
            </table:table-cell>
            <table:table-cell table:style-name="TableHeaderRowCell" office:value-type="string">
              <text:p text:style-name="Table_20_Heading">Ic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images/icons-new#L198" office:name=""><text:span text:style-name="Definition"><text:span text:style-name="T1">Ancho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8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98" office:name=""><text:span text:style-name="Definition">anchor.svg</text:span></text:a></text:p>
          </table:table-cell>
          <table:table-cell table:style-name="TableRowCell" office:value-type="string">
            <text:p text:style-name="Table_20_Contents"><draw:frame draw:name="img168" svg:width="0.41667in" svg:height="0.4166666666666667in"><draw:image xlink:href="Pictures/16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98" office:name=""><text:span text:style-name="Definition">Anchor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2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04" office:name=""><text:span text:style-name="Definition"><text:span text:style-name="T1">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56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4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169" svg:width="0.41667in" svg:height="0.4166666666666667in"><draw:image xlink:href="Pictures/16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86" office:name=""><text:span text:style-name="Definition"><text:span text:style-name="T1">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ressPage.tsx#L40" office:name=""><text:span text:style-name="Definition">gui/Address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170" svg:width="0.41667in" svg:height="0.4166666666666667in"><draw:image xlink:href="Pictures/16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0" office:name=""><text:span text:style-name="Definition"><text:span text:style-name="T1">Chart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5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171" svg:width="0.41667in" svg:height="0.4166666666666667in"><draw:image xlink:href="Pictures/17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0" office:name=""><text:span text:style-name="Definition">Chart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9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7" office:name=""><text:span text:style-name="Definition"><text:span text:style-name="T1">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3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7" office:name=""><text:span text:style-name="Definition">checkbox-marked-outline.svg</text:span></text:a></text:p>
          </table:table-cell>
          <table:table-cell table:style-name="TableRowCell" office:value-type="string">
            <text:p text:style-name="Table_20_Contents"><draw:frame draw:name="img172" svg:width="0.41667in" svg:height="0.4166666666666667in"><draw:image xlink:href="Pictures/17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26" office:name=""><text:span text:style-name="Definition"><text:span text:style-name="T1">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86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26" office:name=""><text:span text:style-name="Definition">plug-disconnect.svg</text:span></text:a></text:p>
          </table:table-cell>
          <table:table-cell table:style-name="TableRowCell" office:value-type="string">
            <text:p text:style-name="Table_20_Contents"><draw:frame draw:name="img173" svg:width="0.41667in" svg:height="0.4166666666666667in"><draw:image xlink:href="Pictures/17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5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174" svg:width="0.41667in" svg:height="0.4166666666666667in"><draw:image xlink:href="Pictures/17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8" office:name=""><text:span text:style-name="Definition"><text:span text:style-name="T1">Empty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48" office:name=""><text:span text:style-name="Definition">Non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8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8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8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8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66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8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72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8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3" office:name=""><text:span text:style-name="Definition"><text:span text:style-name="T1">ITDirectory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7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93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175" svg:width="0.41667in" svg:height="0.4166666666666667in"><draw:image xlink:href="Pictures/17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7" office:name=""><text:span text:style-name="Definition"><text:span text:style-name="T1">ITHtm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5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87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176" svg:width="0.41667in" svg:height="0.4166666666666667in"><draw:image xlink:href="Pictures/17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6" office:name=""><text:span text:style-name="Definition"><text:span text:style-name="T1">ITOth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8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96" office:name=""><text:span text:style-name="Definition">draft.svg</text:span></text:a></text:p>
          </table:table-cell>
          <table:table-cell table:style-name="TableRowCell" office:value-type="string">
            <text:p text:style-name="Table_20_Contents"><draw:frame draw:name="img177" svg:width="0.41667in" svg:height="0.4166666666666667in"><draw:image xlink:href="Pictures/17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1" office:name=""><text:span text:style-name="Definition"><text:span text:style-name="T1">ITServ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1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178" svg:width="0.41667in" svg:height="0.4166666666666667in"><draw:image xlink:href="Pictures/17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0" office:name=""><text:span text:style-name="Definition"><text:span text:style-name="T1">ITText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6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90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179" svg:width="0.41667in" svg:height="0.4166666666666667in"><draw:image xlink:href="Pictures/17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4" office:name=""><text:span text:style-name="Definition"><text:span text:style-name="T1">ITUserSpecia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4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84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180" svg:width="0.41667in" svg:height="0.4166666666666667in"><draw:image xlink:href="Pictures/17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" office:name=""><text:span text:style-name="Definition"><text:span text:style-name="T1">Image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1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4" office:name=""><text:span text:style-name="Definition">image-icon.svg</text:span></text:a></text:p>
          </table:table-cell>
          <table:table-cell table:style-name="TableRowCell" office:value-type="string">
            <text:p text:style-name="Table_20_Contents"><draw:frame draw:name="img181" svg:width="0.41667in" svg:height="0.4166666666666667in"><draw:image xlink:href="Pictures/18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14" office:name=""><text:span text:style-name="Definition"><text:span text:style-name="T1">JSChang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9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4" office:name=""><text:span text:style-name="Definition">javascript.svg</text:span></text:a></text:p>
          </table:table-cell>
          <table:table-cell table:style-name="TableRowCell" office:value-type="string">
            <text:p text:style-name="Table_20_Contents"><draw:frame draw:name="img182" svg:width="0.41667in" svg:height="0.4166666666666667in"><draw:image xlink:href="Pictures/18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10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8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10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183" svg:width="0.41667in" svg:height="0.4166666666666667in"><draw:image xlink:href="Pictures/18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1" office:name=""><text:span text:style-name="Definition"><text:span text:style-name="T1">Lef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66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1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184" svg:width="0.41667in" svg:height="0.4166666666666667in"><draw:image xlink:href="Pictures/18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4" office:name=""><text:span text:style-name="Definition"><text:span text:style-name="T1">MNCat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74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4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185" svg:width="0.41667in" svg:height="0.4166666666666667in"><draw:image xlink:href="Pictures/18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7" office:name=""><text:span text:style-name="Definition"><text:span text:style-name="T1">MNCatSet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75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7" office:name=""><text:span text:style-name="Definition">build-200.svg</text:span></text:a></text:p>
          </table:table-cell>
          <table:table-cell table:style-name="TableRowCell" office:value-type="string">
            <text:p text:style-name="Table_20_Contents"><draw:frame draw:name="img186" svg:width="0.41667in" svg:height="0.4166666666666667in"><draw:image xlink:href="Pictures/18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6" office:name=""><text:span text:style-name="Definition"><text:span text:style-name="T1">MNCollaps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206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6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187" svg:width="0.41667in" svg:height="0.4166666666666667in"><draw:image xlink:href="Pictures/18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6" office:name=""><text:span text:style-name="Definition">MNCollapsed</text:span></text:a></text:p>
          </table:table-cell>
          <table:table-cell table:style-name="TableRowCell" office:value-type="string">
            <text:p text:style-name="Table_20_Contents"><text:a xlink:type="simple" xlink:href="../../viewer/gui/MainNav.tsx#L344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0" office:name=""><text:span text:style-name="Definition"><text:span text:style-name="T1">MNExpand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206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0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188" svg:width="0.41667in" svg:height="0.4166666666666667in"><draw:image xlink:href="Pictures/18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0" office:name=""><text:span text:style-name="Definition">MNExpanded</text:span></text:a></text:p>
          </table:table-cell>
          <table:table-cell table:style-name="TableRowCell" office:value-type="string">
            <text:p text:style-name="Table_20_Contents"><text:a xlink:type="simple" xlink:href="../../viewer/gui/MainNav.tsx#L352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7" office:name=""><text:span text:style-name="Definition"><text:span text:style-name="T1">Measu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5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37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189" svg:width="0.41667in" svg:height="0.4166666666666667in"><draw:image xlink:href="Pictures/18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7" office:name=""><text:span text:style-name="Definition">Measur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3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3" office:name=""><text:span text:style-name="Definition"><text:span text:style-name="T1">MeasureFla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27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43" office:name=""><text:span text:style-name="Definition">outlined_flag.svg</text:span></text:a></text:p>
          </table:table-cell>
          <table:table-cell table:style-name="TableRowCell" office:value-type="string">
            <text:p text:style-name="Table_20_Contents"><draw:frame draw:name="img190" svg:width="0.41667in" svg:height="0.4166666666666667in"><draw:image xlink:href="Pictures/18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1" office:name=""><text:span text:style-name="Definition"><text:span text:style-name="T1">M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1" office:name=""><text:span text:style-name="Definition">ic_chevron_right.svg</text:span></text:a></text:p>
          </table:table-cell>
          <table:table-cell table:style-name="TableRowCell" office:value-type="string">
            <text:p text:style-name="Table_20_Contents"><draw:frame draw:name="img191" svg:width="0.41667in" svg:height="0.4166666666666667in"><draw:image xlink:href="Pictures/19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7" office:name=""><text:span text:style-name="Definition"><text:span text:style-name="T1">NavStop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66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7" office:name=""><text:span text:style-name="Definition">stop-nav.svg</text:span></text:a></text:p>
          </table:table-cell>
          <table:table-cell table:style-name="TableRowCell" office:value-type="string">
            <text:p text:style-name="Table_20_Contents"><draw:frame draw:name="img192" svg:width="0.41667in" svg:height="0.4166666666666667in"><draw:image xlink:href="Pictures/19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<text:span text:style-name="T1">Overlay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2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193" svg:width="0.41667in" svg:height="0.4166666666666667in"><draw:image xlink:href="Pictures/19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ChartsSelectDialog.tsx#L68" office:name=""><text:span text:style-name="Definition">components/ChartsSelec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0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" office:name=""><text:span text:style-name="Definition"><text:span text:style-name="T1">Plugin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3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" office:name=""><text:span text:style-name="Definition">extension.svg</text:span></text:a></text:p>
          </table:table-cell>
          <table:table-cell table:style-name="TableRowCell" office:value-type="string">
            <text:p text:style-name="Table_20_Contents"><draw:frame draw:name="img194" svg:width="0.41667in" svg:height="0.4166666666666667in"><draw:image xlink:href="Pictures/19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3" office:name=""><text:span text:style-name="Definition"><text:span text:style-name="T1">Radio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0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3" office:name=""><text:span text:style-name="Definition">radio_button_checked.svg</text:span></text:a></text:p>
          </table:table-cell>
          <table:table-cell table:style-name="TableRowCell" office:value-type="string">
            <text:p text:style-name="Table_20_Contents"><draw:frame draw:name="img195" svg:width="0.41667in" svg:height="0.4166666666666667in"><draw:image xlink:href="Pictures/19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0" office:name=""><text:span text:style-name="Definition"><text:span text:style-name="T1">Radio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0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0" office:name=""><text:span text:style-name="Definition">radio_button_unchecked.svg</text:span></text:a></text:p>
          </table:table-cell>
          <table:table-cell table:style-name="TableRowCell" office:value-type="string">
            <text:p text:style-name="Table_20_Contents"><draw:frame draw:name="img196" svg:width="0.41667in" svg:height="0.4166666666666667in"><draw:image xlink:href="Pictures/19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4" office:name=""><text:span text:style-name="Definition"><text:span text:style-name="T1">Righ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72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4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197" svg:width="0.41667in" svg:height="0.4166666666666667in"><draw:image xlink:href="Pictures/19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2" office:name=""><text:span text:style-name="Definition"><text:span text:style-name="T1">Route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6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198" svg:width="0.41667in" svg:height="0.4166666666666667in"><draw:image xlink:href="Pictures/19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2" office:name=""><text:span text:style-name="Definition">Rout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19" office:name=""><text:span text:style-name="Definition"><text:span text:style-name="T1">Satelli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meStatusWidget.tsx#L58" office:name=""><text:span text:style-name="Definition">components/TimeStatusWidge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9" office:name=""><text:span text:style-name="Definition">satellite-alt-200.svg</text:span></text:a></text:p>
          </table:table-cell>
          <table:table-cell table:style-name="TableRowCell" office:value-type="string">
            <text:p text:style-name="Table_20_Contents"><draw:frame draw:name="img199" svg:width="0.41667in" svg:height="0.4166666666666667in"><draw:image xlink:href="Pictures/19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<text:span text:style-name="T1">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361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200" svg:width="0.41667in" svg:height="0.4166666666666667in"><draw:image xlink:href="Pictures/19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9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2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" office:name=""><text:span text:style-name="Definition"><text:span text:style-name="T1">Track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7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4" office:name=""><text:span text:style-name="Definition">track.svg</text:span></text:a></text:p>
          </table:table-cell>
          <table:table-cell table:style-name="TableRowCell" office:value-type="string">
            <text:p text:style-name="Table_20_Contents"><draw:frame draw:name="img201" svg:width="0.41667in" svg:height="0.4166666666666667in"><draw:image xlink:href="Pictures/20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" office:name=""><text:span text:style-name="Definition">Track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8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4" office:name=""><text:span text:style-name="Definition"><text:span text:style-name="T1">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3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4" office:name=""><text:span text:style-name="Definition">checkbox-blank-outline.svg</text:span></text:a></text:p>
          </table:table-cell>
          <table:table-cell table:style-name="TableRowCell" office:value-type="string">
            <text:p text:style-name="Table_20_Contents"><draw:frame draw:name="img202" svg:width="0.41667in" svg:height="0.4166666666666667in"><draw:image xlink:href="Pictures/20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7" office:name=""><text:span text:style-name="Definition"><text:span text:style-name="T1">Us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0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203" svg:width="0.41667in" svg:height="0.4166666666666667in"><draw:image xlink:href="Pictures/20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83" office:name=""><text:span text:style-name="Definition"><text:span text:style-name="T1">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204" svg:width="0.41667in" svg:height="0.4166666666666667in"><draw:image xlink:href="Pictures/20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9" office:name=""><text:span text:style-name="Definition"><text:span text:style-name="T1">Waypoin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42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9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205" svg:width="0.41667in" svg:height="0.4166666666666667in"><draw:image xlink:href="Pictures/20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9" office:name=""><text:span text:style-name="Definition">Waypoint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1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usage"/>IconUsage<text:bookmark-end text:name="iconusage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IconFil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Usage</text:p>
            </table:table-cell>
          </table:table-row>
        </table:table-header-rows>
        <table:table-row>
          <table:table-cell table:style-name="TableRowCell" office:value-type="string">
            <text:p text:style-name="Table_20_Contents">AddOns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apps.svg</text:span></text:a></text:p>
          </table:table-cell>
          <table:table-cell table:style-name="TableRowCell" office:value-type="string">
            <text:p text:style-name="Table_20_Contents"><draw:frame draw:name="img206" svg:width="0.41667in" svg:height="0.4166666666666667in"><draw:image xlink:href="Pictures/205.svg" xlink:type="simple" xlink:show="embed" xlink:actuate="onLoad"/></draw:frame></text:p>
          </table:table-cell>
          <table:table-cell table:style-name="TableRowCell" office:value-type="string">
            <text:p text:style-name="Table_20_Contents">AddonConfigAddOns,DBUserApp</text:p>
          </table:table-cell>
        </table:table-row>
        <table:table-row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88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07" svg:width="0.41667in" svg:height="0.4166666666666667in"><draw:image xlink:href="Pictures/206.svg" xlink:type="simple" xlink:show="embed" xlink:actuate="onLoad"/></draw:frame></text:p>
          </table:table-cell>
          <table:table-cell table:style-name="TableRowCell" office:value-type="string">
            <text:p text:style-name="Table_20_Contents">DBInsertAfter,DBAfter,DBInsert</text:p>
          </table:table-cell>
        </table:table-row>
        <table:table-row>
          <table:table-cell table:style-name="TableRowCell" office:value-type="string">
            <text:p text:style-name="Table_20_Contents">AisInfoHide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208" svg:width="0.41667in" svg:height="0.4166666666666667in"><draw:image xlink:href="Pictures/207.svg" xlink:type="simple" xlink:show="embed" xlink:actuate="onLoad"/></draw:frame></text:p>
          </table:table-cell>
          <table:table-cell table:style-name="TableRowCell" office:value-type="string">
            <text:p text:style-name="Table_20_Contents">AisInfoHide</text:p>
          </table:table-cell>
        </table:table-row>
        <table:table-row>
          <table:table-cell table:style-name="TableRowCell" office:value-type="string">
            <text:p text:style-name="Table_20_Contents">AisNearest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ais-nearest.svg</text:span></text:a></text:p>
          </table:table-cell>
          <table:table-cell table:style-name="TableRowCell" office:value-type="string">
            <text:p text:style-name="Table_20_Contents"><draw:frame draw:name="img209" svg:width="0.41667in" svg:height="0.4166666666666667in"><draw:image xlink:href="Pictures/208.svg" xlink:type="simple" xlink:show="embed" xlink:actuate="onLoad"/></draw:frame></text:p>
          </table:table-cell>
          <table:table-cell table:style-name="TableRowCell" office:value-type="string">
            <text:p text:style-name="Table_20_Contents">AisNearest</text:p>
          </table:table-cell>
        </table:table-row>
        <table:table-row>
          <table:table-cell table:style-name="TableRowCell" office:value-type="string">
            <text:p text:style-name="Table_20_Contents">Anchor</text:p>
          </table:table-cell>
          <table:table-cell table:style-name="TableRowCell" office:value-type="string">
            <text:p text:style-name="Table_20_Contents"><text:a xlink:type="simple" xlink:href="../../viewer/style/icons.less#L198" office:name=""><text:span text:style-name="Definition">anchor.svg</text:span></text:a></text:p>
          </table:table-cell>
          <table:table-cell table:style-name="TableRowCell" office:value-type="string">
            <text:p text:style-name="Table_20_Contents"><draw:frame draw:name="img210" svg:width="0.41667in" svg:height="0.4166666666666667in"><draw:image xlink:href="Pictures/209.svg" xlink:type="simple" xlink:show="embed" xlink:actuate="onLoad"/></draw:frame></text:p>
          </table:table-cell>
          <table:table-cell table:style-name="TableRowCell" office:value-type="string">
            <text:p text:style-name="Table_20_Contents">AnchorWatch,code</text:p>
          </table:table-cell>
        </table:table-row>
        <table:table-row>
          <table:table-cell table:style-name="TableRowCell" office:value-type="string">
            <text:p text:style-name="Table_20_Contents">AnchorEnd</text:p>
          </table:table-cell>
          <table:table-cell table:style-name="TableRowCell" office:value-type="string">
            <text:p text:style-name="Table_20_Contents"><text:a xlink:type="simple" xlink:href="../../viewer/style/icons.less#L201" office:name=""><text:span text:style-name="Definition">anchor-end.svg</text:span></text:a></text:p>
          </table:table-cell>
          <table:table-cell table:style-name="TableRowCell" office:value-type="string">
            <text:p text:style-name="Table_20_Contents"><draw:frame draw:name="img211" svg:width="0.41667in" svg:height="0.4166666666666667in"><draw:image xlink:href="Pictures/210.svg" xlink:type="simple" xlink:show="embed" xlink:actuate="onLoad"/></draw:frame></text:p>
          </table:table-cell>
          <table:table-cell table:style-name="TableRowCell" office:value-type="string">
            <text:p text:style-name="Table_20_Contents">StopAnchorWatch</text:p>
          </table:table-cell>
        </table:table-row>
        <table:table-row>
          <table:table-cell table:style-name="TableRowCell" office:value-type="string">
            <text:p text:style-name="Table_20_Contents">Android</text:p>
          </table:table-cell>
          <table:table-cell table:style-name="TableRowCell" office:value-type="string">
            <text:p text:style-name="Table_20_Contents"><text:a xlink:type="simple" xlink:href="../../viewer/style/icons.less#L222" office:name=""><text:span text:style-name="Definition">ic_android.svg</text:span></text:a></text:p>
          </table:table-cell>
          <table:table-cell table:style-name="TableRowCell" office:value-type="string">
            <text:p text:style-name="Table_20_Contents"><draw:frame draw:name="img212" svg:width="0.41667in" svg:height="0.4166666666666667in"><draw:image xlink:href="Pictures/211.svg" xlink:type="simple" xlink:show="embed" xlink:actuate="onLoad"/></draw:frame></text:p>
          </table:table-cell>
          <table:table-cell table:style-name="TableRowCell" office:value-type="string">
            <text:p text:style-name="Table_20_Contents">StatusAndroid</text:p>
          </table:table-cell>
        </table:table-row>
        <table:table-row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213" svg:width="0.41667in" svg:height="0.4166666666666667in"><draw:image xlink:href="Pictures/212.svg" xlink:type="simple" xlink:show="embed" xlink:actuate="onLoad"/></draw:frame></text:p>
          </table:table-cell>
          <table:table-cell table:style-name="TableRowCell" office:value-type="string">
            <text:p text:style-name="Table_20_Contents">Back</text:p>
          </table:table-cell>
        </table:table-row>
        <table:table-row>
          <table:table-cell table:style-name="TableRowCell" office:value-type="string">
            <text:p text:style-name="Table_20_Contents">Before</text:p>
          </table:table-cell>
          <table:table-cell table:style-name="TableRowCell" office:value-type="string">
            <text:p text:style-name="Table_20_Contents"><text:a xlink:type="simple" xlink:href="../../viewer/style/icons.less#L285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214" svg:width="0.41667in" svg:height="0.4166666666666667in"><draw:image xlink:href="Pictures/213.svg" xlink:type="simple" xlink:show="embed" xlink:actuate="onLoad"/></draw:frame></text:p>
          </table:table-cell>
          <table:table-cell table:style-name="TableRowCell" office:value-type="string">
            <text:p text:style-name="Table_20_Contents">DBInsertBefore,DBBefore</text:p>
          </table:table-cell>
        </table:table-row>
        <table:table-row>
          <table:table-cell table:style-name="TableRowCell" office:value-type="string">
            <text:p text:style-name="Table_20_Contents">Boat</text:p>
          </table:table-cell>
          <table:table-cell table:style-name="TableRowCell" office:value-type="string">
            <text:p text:style-name="Table_20_Contents"><text:a xlink:type="simple" xlink:href="../../viewer/style/icons.less#L204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15" svg:width="0.41667in" svg:height="0.4166666666666667in"><draw:image xlink:href="Pictures/214.svg" xlink:type="simple" xlink:show="embed" xlink:actuate="onLoad"/></draw:frame></text:p>
          </table:table-cell>
          <table:table-cell table:style-name="TableRowCell" office:value-type="string">
            <text:p text:style-name="Table_20_Contents">DBAnchorBoat,code</text:p>
          </table:table-cell>
        </table:table-row>
        <table:table-row>
          <table:table-cell table:style-name="TableRowCell" office:value-type="string">
            <text:p text:style-name="Table_20_Contents">Browser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216" svg:width="0.41667in" svg:height="0.4166666666666667in"><draw:image xlink:href="Pictures/215.svg" xlink:type="simple" xlink:show="embed" xlink:actuate="onLoad"/></draw:frame></text:p>
          </table:table-cell>
          <table:table-cell table:style-name="TableRowCell" office:value-type="string">
            <text:p text:style-name="Table_20_Contents">AndroidBrowser,code</text:p>
          </table:table-cell>
        </table:table-row>
        <table:table-row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217" svg:width="0.41667in" svg:height="0.4166666666666667in"><draw:image xlink:href="Pictures/216.svg" xlink:type="simple" xlink:show="embed" xlink:actuate="onLoad"/></draw:frame></text:p>
          </table:table-cell>
          <table:table-cell table:style-name="TableRowCell" office:value-type="string">
            <text:p text:style-name="Table_20_Contents">Cancel,MainExit,DBCancel</text:p>
          </table:table-cell>
        </table:table-row>
        <table:table-row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218" svg:width="0.41667in" svg:height="0.4166666666666667in"><draw:image xlink:href="Pictures/217.svg" xlink:type="simple" xlink:show="embed" xlink:actuate="onLoad"/></draw:frame></text:p>
          </table:table-cell>
          <table:table-cell table:style-name="TableRowCell" office:value-type="string">
            <text:p text:style-name="Table_20_Contents">AisInfoLocate,GpsCenter,DBAnchorCenter,DBCenter</text:p>
          </table:table-cell>
        </table:table-row>
        <table:table-row>
          <table:table-cell table:style-name="TableRowCell" office:value-type="string">
            <text:p text:style-name="Table_20_Contents">CenterAction</text:p>
          </table:table-cell>
          <table:table-cell table:style-name="TableRowCell" office:value-type="string">
            <text:p text:style-name="Table_20_Contents"><text:a xlink:type="simple" xlink:href="../../viewer/style/icons.less#L192" office:name=""><text:span text:style-name="Definition">center-action.svg</text:span></text:a></text:p>
          </table:table-cell>
          <table:table-cell table:style-name="TableRowCell" office:value-type="string">
            <text:p text:style-name="Table_20_Contents"><draw:frame draw:name="img219" svg:width="0.41667in" svg:height="0.4166666666666667in"><draw:image xlink:href="Pictures/218.svg" xlink:type="simple" xlink:show="embed" xlink:actuate="onLoad"/></draw:frame></text:p>
          </table:table-cell>
          <table:table-cell table:style-name="TableRowCell" office:value-type="string">
            <text:p text:style-name="Table_20_Contents">CenterAction</text:p>
          </table:table-cell>
        </table:table-row>
        <table:table-row>
          <table:table-cell table:style-name="TableRowCell" office:value-type="string">
            <text:p text:style-name="Table_20_Contents">ChartScheme</text:p>
          </table:table-cell>
          <table:table-cell table:style-name="TableRowCell" office:value-type="string">
            <text:p text:style-name="Table_20_Contents"><text:a xlink:type="simple" xlink:href="../../viewer/style/icons.less#L333" office:name=""><text:span text:style-name="Definition">table_convert.svg</text:span></text:a></text:p>
          </table:table-cell>
          <table:table-cell table:style-name="TableRowCell" office:value-type="string">
            <text:p text:style-name="Table_20_Contents"><draw:frame draw:name="img220" svg:width="0.41667in" svg:height="0.4166666666666667in"><draw:image xlink:href="Pictures/219.svg" xlink:type="simple" xlink:show="embed" xlink:actuate="onLoad"/></draw:frame></text:p>
          </table:table-cell>
          <table:table-cell table:style-name="TableRowCell" office:value-type="string">
            <text:p text:style-name="Table_20_Contents">DBScheme</text:p>
          </table:table-cell>
        </table:table-row>
        <table:table-row>
          <table:table-cell table:style-name="TableRowCell" office:value-type="string">
            <text:p text:style-name="Table_20_Contents">Charts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221" svg:width="0.41667in" svg:height="0.4166666666666667in"><draw:image xlink:href="Pictures/220.svg" xlink:type="simple" xlink:show="embed" xlink:actuate="onLoad"/></draw:frame></text:p>
          </table:table-cell>
          <table:table-cell table:style-name="TableRowCell" office:value-type="string">
            <text:p text:style-name="Table_20_Contents">ChartsView,DBOpenChart,code</text:p>
          </table:table-cell>
        </table:table-row>
        <table:table-row>
          <table:table-cell table:style-name="TableRowCell" office:value-type="string">
            <text:p text:style-name="Table_20_Contents">Checked</text:p>
          </table:table-cell>
          <table:table-cell table:style-name="TableRowCell" office:value-type="string">
            <text:p text:style-name="Table_20_Contents"><text:a xlink:type="simple" xlink:href="../../viewer/style/icons.less#L357" office:name=""><text:span text:style-name="Definition">checkbox-marked-outline.svg</text:span></text:a></text:p>
          </table:table-cell>
          <table:table-cell table:style-name="TableRowCell" office:value-type="string">
            <text:p text:style-name="Table_20_Contents"><draw:frame draw:name="img222" svg:width="0.41667in" svg:height="0.4166666666666667in"><draw:image xlink:href="Pictures/22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ColorReset</text:p>
          </table:table-cell>
          <table:table-cell table:style-name="TableRowCell" office:value-type="string">
            <text:p text:style-name="Table_20_Contents"><text:a xlink:type="simple" xlink:href="../../viewer/style/icons.less#L318" office:name=""><text:span text:style-name="Definition">format_color_reset.svg</text:span></text:a></text:p>
          </table:table-cell>
          <table:table-cell table:style-name="TableRowCell" office:value-type="string">
            <text:p text:style-name="Table_20_Contents"><draw:frame draw:name="img223" svg:width="0.41667in" svg:height="0.4166666666666667in"><draw:image xlink:href="Pictures/222.svg" xlink:type="simple" xlink:show="embed" xlink:actuate="onLoad"/></draw:frame></text:p>
          </table:table-cell>
          <table:table-cell table:style-name="TableRowCell" office:value-type="string">
            <text:p text:style-name="Table_20_Contents">DBColorUnset</text:p>
          </table:table-cell>
        </table:table-row>
        <table:table-row>
          <table:table-cell table:style-name="TableRowCell" office:value-type="string">
            <text:p text:style-name="Table_20_Contents">Connect</text:p>
          </table:table-cell>
          <table:table-cell table:style-name="TableRowCell" office:value-type="string">
            <text:p text:style-name="Table_20_Contents"><text:a xlink:type="simple" xlink:href="../../viewer/style/icons.less#L329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24" svg:width="0.41667in" svg:height="0.4166666666666667in"><draw:image xlink:href="Pictures/223.svg" xlink:type="simple" xlink:show="embed" xlink:actuate="onLoad"/></draw:frame></text:p>
          </table:table-cell>
          <table:table-cell table:style-name="TableRowCell" office:value-type="string">
            <text:p text:style-name="Table_20_Contents">DBConnect</text:p>
          </table:table-cell>
        </table:table-row>
        <table:table-row>
          <table:table-cell table:style-name="TableRowCell" office:value-type="string">
            <text:p text:style-name="Table_20_Contents">Connected</text:p>
          </table:table-cell>
          <table:table-cell table:style-name="TableRowCell" office:value-type="string">
            <text:p text:style-name="Table_20_Contents"><text:a xlink:type="simple" xlink:href="../../viewer/style/icons.less#L31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25" svg:width="0.41667in" svg:height="0.4166666666666667in"><draw:image xlink:href="Pictures/224.svg" xlink:type="simple" xlink:show="embed" xlink:actuate="onLoad"/></draw:frame></text:p>
          </table:table-cell>
          <table:table-cell table:style-name="TableRowCell" office:value-type="string">
            <text:p text:style-name="Table_20_Contents">Connected</text:p>
          </table:table-cell>
        </table:table-row>
        <table:table-row>
          <table:table-cell table:style-name="TableRowCell" office:value-type="string">
            <text:p text:style-name="Table_20_Contents">Copy</text:p>
          </table:table-cell>
          <table:table-cell table:style-name="TableRowCell" office:value-type="string">
            <text:p text:style-name="Table_20_Contents"><text:a xlink:type="simple" xlink:href="../../viewer/style/icons.less#L282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226" svg:width="0.41667in" svg:height="0.4166666666666667in"><draw:image xlink:href="Pictures/225.svg" xlink:type="simple" xlink:show="embed" xlink:actuate="onLoad"/></draw:frame></text:p>
          </table:table-cell>
          <table:table-cell table:style-name="TableRowCell" office:value-type="string">
            <text:p text:style-name="Table_20_Contents">DBCopy</text:p>
          </table:table-cell>
        </table:table-row>
        <table:table-row>
          <table:table-cell table:style-name="TableRowCell" office:value-type="string">
            <text:p text:style-name="Table_20_Contents">CourseUp</text:p>
          </table:table-cell>
          <table:table-cell table:style-name="TableRowCell" office:value-type="string">
            <text:p text:style-name="Table_20_Contents"><text:a xlink:type="simple" xlink:href="../../viewer/style/icons.less#L161" office:name=""><text:span text:style-name="Definition">compass.svg</text:span></text:a></text:p>
          </table:table-cell>
          <table:table-cell table:style-name="TableRowCell" office:value-type="string">
            <text:p text:style-name="Table_20_Contents"><draw:frame draw:name="img227" svg:width="0.41667in" svg:height="0.4166666666666667in"><draw:image xlink:href="Pictures/226.svg" xlink:type="simple" xlink:show="embed" xlink:actuate="onLoad"/></draw:frame></text:p>
          </table:table-cell>
          <table:table-cell table:style-name="TableRowCell" office:value-type="string">
            <text:p text:style-name="Table_20_Contents">CourseUp</text:p>
          </table:table-cell>
        </table:table-row>
        <table:table-row>
          <table:table-cell table:style-name="TableRowCell" office:value-type="string">
            <text:p text:style-name="Table_20_Contents">Debug</text:p>
          </table:table-cell>
          <table:table-cell table:style-name="TableRowCell" office:value-type="string">
            <text:p text:style-name="Table_20_Contents"><text:a xlink:type="simple" xlink:href="../../viewer/style/icons.less#L234" office:name=""><text:span text:style-name="Definition">bug_report.svg</text:span></text:a></text:p>
          </table:table-cell>
          <table:table-cell table:style-name="TableRowCell" office:value-type="string">
            <text:p text:style-name="Table_20_Contents"><draw:frame draw:name="img228" svg:width="0.41667in" svg:height="0.4166666666666667in"><draw:image xlink:href="Pictures/227.svg" xlink:type="simple" xlink:show="embed" xlink:actuate="onLoad"/></draw:frame></text:p>
          </table:table-cell>
          <table:table-cell table:style-name="TableRowCell" office:value-type="string">
            <text:p text:style-name="Table_20_Contents">StatusDebug</text:p>
          </table:table-cell>
        </table:table-row>
        <table:table-row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6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229" svg:width="0.41667in" svg:height="0.4166666666666667in"><draw:image xlink:href="Pictures/228.svg" xlink:type="simple" xlink:show="embed" xlink:actuate="onLoad"/></draw:frame></text:p>
          </table:table-cell>
          <table:table-cell table:style-name="TableRowCell" office:value-type="string">
            <text:p text:style-name="Table_20_Contents">DBDelete,DBWpaRemove,DBClear,DBDiscard,DBCleanTrack</text:p>
          </table:table-cell>
        </table:table-row>
        <table:table-row>
          <table:table-cell table:style-name="TableRowCell" office:value-type="string">
            <text:p text:style-name="Table_20_Contents">Dim</text:p>
          </table:table-cell>
          <table:table-cell table:style-name="TableRowCell" office:value-type="string">
            <text:p text:style-name="Table_20_Contents"><text:a xlink:type="simple" xlink:href="../../viewer/style/icons.less#L110" office:name=""><text:span text:style-name="Definition">brightness_low.svg</text:span></text:a></text:p>
          </table:table-cell>
          <table:table-cell table:style-name="TableRowCell" office:value-type="string">
            <text:p text:style-name="Table_20_Contents"><draw:frame draw:name="img230" svg:width="0.41667in" svg:height="0.4166666666666667in"><draw:image xlink:href="Pictures/229.svg" xlink:type="simple" xlink:show="embed" xlink:actuate="onLoad"/></draw:frame></text:p>
          </table:table-cell>
          <table:table-cell table:style-name="TableRowCell" office:value-type="string">
            <text:p text:style-name="Table_20_Contents">Dim</text:p>
          </table:table-cell>
        </table:table-row>
        <table:table-row>
          <table:table-cell table:style-name="TableRowCell" office:value-type="string">
            <text:p text:style-name="Table_20_Contents">Disable</text:p>
          </table:table-cell>
          <table:table-cell table:style-name="TableRowCell" office:value-type="string">
            <text:p text:style-name="Table_20_Contents"><text:a xlink:type="simple" xlink:href="../../viewer/style/icons.less#L291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231" svg:width="0.41667in" svg:height="0.4166666666666667in"><draw:image xlink:href="Pictures/230.svg" xlink:type="simple" xlink:show="embed" xlink:actuate="onLoad"/></draw:frame></text:p>
          </table:table-cell>
          <table:table-cell table:style-name="TableRowCell" office:value-type="string">
            <text:p text:style-name="Table_20_Contents">DBDisable</text:p>
          </table:table-cell>
        </table:table-row>
        <table:table-row>
          <table:table-cell table:style-name="TableRowCell" office:value-type="string">
            <text:p text:style-name="Table_20_Contents">Disconnect</text:p>
          </table:table-cell>
          <table:table-cell table:style-name="TableRowCell" office:value-type="string">
            <text:p text:style-name="Table_20_Contents"><text:a xlink:type="simple" xlink:href="../../viewer/style/icons.less#L326" office:name=""><text:span text:style-name="Definition">plug-disconnect.svg</text:span></text:a></text:p>
          </table:table-cell>
          <table:table-cell table:style-name="TableRowCell" office:value-type="string">
            <text:p text:style-name="Table_20_Contents"><draw:frame draw:name="img232" svg:width="0.41667in" svg:height="0.4166666666666667in"><draw:image xlink:href="Pictures/231.svg" xlink:type="simple" xlink:show="embed" xlink:actuate="onLoad"/></draw:frame></text:p>
          </table:table-cell>
          <table:table-cell table:style-name="TableRowCell" office:value-type="string">
            <text:p text:style-name="Table_20_Contents">DBDisconnect,code</text:p>
          </table:table-cell>
        </table:table-row>
        <table:table-row>
          <table:table-cell table:style-name="TableRowCell" office:value-type="string">
            <text:p text:style-name="Table_20_Contents">Download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file_download.svg</text:span></text:a></text:p>
          </table:table-cell>
          <table:table-cell table:style-name="TableRowCell" office:value-type="string">
            <text:p text:style-name="Table_20_Contents"><draw:frame draw:name="img233" svg:width="0.41667in" svg:height="0.4166666666666667in"><draw:image xlink:href="Pictures/232.svg" xlink:type="simple" xlink:show="embed" xlink:actuate="onLoad"/></draw:frame></text:p>
          </table:table-cell>
          <table:table-cell table:style-name="TableRowCell" office:value-type="string">
            <text:p text:style-name="Table_20_Contents">DBDownload</text:p>
          </table:table-cell>
        </table:table-row>
        <table:table-row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234" svg:width="0.41667in" svg:height="0.4166666666666667in"><draw:image xlink:href="Pictures/233.svg" xlink:type="simple" xlink:show="embed" xlink:actuate="onLoad"/></draw:frame></text:p>
          </table:table-cell>
          <table:table-cell table:style-name="TableRowCell" office:value-type="string">
            <text:p text:style-name="Table_20_Contents">WpEdit,Edit,DBRename,DBEditCss,DBConfig,code</text:p>
          </table:table-cell>
        </table:table-row>
        <table:table-row>
          <table:table-cell table:style-name="TableRowCell" office:value-type="string">
            <text:p text:style-name="Table_20_Contents">EditPage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tune.svg</text:span></text:a></text:p>
          </table:table-cell>
          <table:table-cell table:style-name="TableRowCell" office:value-type="string">
            <text:p text:style-name="Table_20_Contents"><draw:frame draw:name="img235" svg:width="0.41667in" svg:height="0.4166666666666667in"><draw:image xlink:href="Pictures/234.svg" xlink:type="simple" xlink:show="embed" xlink:actuate="onLoad"/></draw:frame></text:p>
          </table:table-cell>
          <table:table-cell table:style-name="TableRowCell" office:value-type="string">
            <text:p text:style-name="Table_20_Contents">EditPage</text:p>
          </table:table-cell>
        </table:table-row>
        <table:table-row>
          <table:table-cell table:style-name="TableRowCell" office:value-type="string">
            <text:p text:style-name="Table_20_Contents">Empty</text:p>
          </table:table-cell>
          <table:table-cell table:style-name="TableRowCell" office:value-type="string">
            <text:p text:style-name="Table_20_Contents"><text:a xlink:type="simple" xlink:href="../../viewer/style/icons.less#L348" office:name=""><text:span text:style-name="Definition">None</text:span></text:a>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EmptyRoute</text:p>
          </table:table-cell>
          <table:table-cell table:style-name="TableRowCell" office:value-type="string">
            <text:p text:style-name="Table_20_Contents"><text:a xlink:type="simple" xlink:href="../../viewer/style/icons.less#L304" office:name=""><text:span text:style-name="Definition">delete_sweep.svg</text:span></text:a></text:p>
          </table:table-cell>
          <table:table-cell table:style-name="TableRowCell" office:value-type="string">
            <text:p text:style-name="Table_20_Contents"><draw:frame draw:name="img236" svg:width="0.41667in" svg:height="0.4166666666666667in"><draw:image xlink:href="Pictures/235.svg" xlink:type="simple" xlink:show="embed" xlink:actuate="onLoad"/></draw:frame></text:p>
          </table:table-cell>
          <table:table-cell table:style-name="TableRowCell" office:value-type="string">
            <text:p text:style-name="Table_20_Contents">DBEmptyRoute</text:p>
          </table:table-cell>
        </table:table-row>
        <table:table-row>
          <table:table-cell table:style-name="TableRowCell" office:value-type="string">
            <text:p text:style-name="Table_20_Contents">Expand</text:p>
          </table:table-cell>
          <table:table-cell table:style-name="TableRowCell" office:value-type="string">
            <text:p text:style-name="Table_20_Contents"><text:a xlink:type="simple" xlink:href="../../viewer/style/icons.less#L40" office:name=""><text:span text:style-name="Definition">expand-all-200.svg</text:span></text:a></text:p>
          </table:table-cell>
          <table:table-cell table:style-name="TableRowCell" office:value-type="string">
            <text:p text:style-name="Table_20_Contents"><draw:frame draw:name="img237" svg:width="0.41667in" svg:height="0.4166666666666667in"><draw:image xlink:href="Pictures/236.svg" xlink:type="simple" xlink:show="embed" xlink:actuate="onLoad"/></draw:frame></text:p>
          </table:table-cell>
          <table:table-cell table:style-name="TableRowCell" office:value-type="string">
            <text:p text:style-name="Table_20_Contents">StatusAll</text:p>
          </table:table-cell>
        </table:table-row>
        <table:table-row>
          <table:table-cell table:style-name="TableRowCell" office:value-type="string">
            <text:p text:style-name="Table_20_Contents">FullScreen</text:p>
          </table:table-cell>
          <table:table-cell table:style-name="TableRowCell" office:value-type="string">
            <text:p text:style-name="Table_20_Contents"><text:a xlink:type="simple" xlink:href="../../viewer/style/icons.less#L125" office:name=""><text:span text:style-name="Definition">fullscreen.svg</text:span></text:a></text:p>
          </table:table-cell>
          <table:table-cell table:style-name="TableRowCell" office:value-type="string">
            <text:p text:style-name="Table_20_Contents"><draw:frame draw:name="img238" svg:width="0.41667in" svg:height="0.4166666666666667in"><draw:image xlink:href="Pictures/237.svg" xlink:type="simple" xlink:show="embed" xlink:actuate="onLoad"/></draw:frame></text:p>
          </table:table-cell>
          <table:table-cell table:style-name="TableRowCell" office:value-type="string">
            <text:p text:style-name="Table_20_Contents">FullScreen</text:p>
          </table:table-cell>
        </table:table-row>
        <table:table-row>
          <table:table-cell table:style-name="TableRowCell" office:value-type="string">
            <text:p text:style-name="Table_20_Contents">Help</text:p>
          </table:table-cell>
          <table:table-cell table:style-name="TableRowCell" office:value-type="string">
            <text:p text:style-name="Table_20_Contents"><text:a xlink:type="simple" xlink:href="../../viewer/style/icons.less#L264" office:name=""><text:span text:style-name="Definition">ic_help_outline.svg</text:span></text:a></text:p>
          </table:table-cell>
          <table:table-cell table:style-name="TableRowCell" office:value-type="string">
            <text:p text:style-name="Table_20_Contents"><draw:frame draw:name="img239" svg:width="0.41667in" svg:height="0.4166666666666667in"><draw:image xlink:href="Pictures/238.svg" xlink:type="simple" xlink:show="embed" xlink:actuate="onLoad"/></draw:frame></text:p>
          </table:table-cell>
          <table:table-cell table:style-name="TableRowCell" office:value-type="string">
            <text:p text:style-name="Table_20_Contents">Help</text:p>
          </table:table-cell>
        </table:table-row>
        <table:table-row>
          <table:table-cell table:style-name="TableRowCell" office:value-type="string">
            <text:p text:style-name="Table_20_Contents">Hide</text:p>
          </table:table-cell>
          <table:table-cell table:style-name="TableRowCell" office:value-type="string">
            <text:p text:style-name="Table_20_Contents"><text:a xlink:type="simple" xlink:href="../../viewer/style/icons.less#L300" office:name=""><text:span text:style-name="Definition">visibility_off.svg</text:span></text:a></text:p>
          </table:table-cell>
          <table:table-cell table:style-name="TableRowCell" office:value-type="string">
            <text:p text:style-name="Table_20_Contents"><draw:frame draw:name="img240" svg:width="0.41667in" svg:height="0.4166666666666667in"><draw:image xlink:href="Pictures/239.svg" xlink:type="simple" xlink:show="embed" xlink:actuate="onLoad"/></draw:frame></text:p>
          </table:table-cell>
          <table:table-cell table:style-name="TableRowCell" office:value-type="string">
            <text:p text:style-name="Table_20_Contents">DBHide</text:p>
          </table:table-cell>
        </table:table-row>
        <table:table-row>
          <table:table-cell table:style-name="TableRowCell" office:value-type="string">
            <text:p text:style-name="Table_20_Contents">HideOverlays</text:p>
          </table:table-cell>
          <table:table-cell table:style-name="TableRowCell" office:value-type="string">
            <text:p text:style-name="Table_20_Contents"><text:a xlink:type="simple" xlink:href="../../viewer/style/icons.less#L19" office:name=""><text:span text:style-name="Definition">layers-black-off.svg</text:span></text:a></text:p>
          </table:table-cell>
          <table:table-cell table:style-name="TableRowCell" office:value-type="string">
            <text:p text:style-name="Table_20_Contents"><draw:frame draw:name="img241" svg:width="0.41667in" svg:height="0.4166666666666667in"><draw:image xlink:href="Pictures/240.svg" xlink:type="simple" xlink:show="embed" xlink:actuate="onLoad"/></draw:frame></text:p>
          </table:table-cell>
          <table:table-cell table:style-name="TableRowCell" office:value-type="string">
            <text:p text:style-name="Table_20_Contents">DBHideOverlays,DBHideAllOverlays</text:p>
          </table:table-cell>
        </table:table-row>
        <table:table-row>
          <table:table-cell table:style-name="TableRowCell" office:value-type="string">
            <text:p text:style-name="Table_20_Contents">ITDirectory</text:p>
          </table:table-cell>
          <table:table-cell table:style-name="TableRowCell" office:value-type="string">
            <text:p text:style-name="Table_20_Contents"><text:a xlink:type="simple" xlink:href="../../viewer/style/icons.less#L393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242" svg:width="0.41667in" svg:height="0.4166666666666667in"><draw:image xlink:href="Pictures/24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Html</text:p>
          </table:table-cell>
          <table:table-cell table:style-name="TableRowCell" office:value-type="string">
            <text:p text:style-name="Table_20_Contents"><text:a xlink:type="simple" xlink:href="../../viewer/style/icons.less#L387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243" svg:width="0.41667in" svg:height="0.4166666666666667in"><draw:image xlink:href="Pictures/242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Other</text:p>
          </table:table-cell>
          <table:table-cell table:style-name="TableRowCell" office:value-type="string">
            <text:p text:style-name="Table_20_Contents"><text:a xlink:type="simple" xlink:href="../../viewer/style/icons.less#L396" office:name=""><text:span text:style-name="Definition">draft.svg</text:span></text:a></text:p>
          </table:table-cell>
          <table:table-cell table:style-name="TableRowCell" office:value-type="string">
            <text:p text:style-name="Table_20_Contents"><draw:frame draw:name="img244" svg:width="0.41667in" svg:height="0.4166666666666667in"><draw:image xlink:href="Pictures/24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Server</text:p>
          </table:table-cell>
          <table:table-cell table:style-name="TableRowCell" office:value-type="string">
            <text:p text:style-name="Table_20_Contents"><text:a xlink:type="simple" xlink:href="../../viewer/style/icons.less#L381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45" svg:width="0.41667in" svg:height="0.4166666666666667in"><draw:image xlink:href="Pictures/244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Text</text:p>
          </table:table-cell>
          <table:table-cell table:style-name="TableRowCell" office:value-type="string">
            <text:p text:style-name="Table_20_Contents"><text:a xlink:type="simple" xlink:href="../../viewer/style/icons.less#L390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246" svg:width="0.41667in" svg:height="0.4166666666666667in"><draw:image xlink:href="Pictures/24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UserSpecial</text:p>
          </table:table-cell>
          <table:table-cell table:style-name="TableRowCell" office:value-type="string">
            <text:p text:style-name="Table_20_Contents"><text:a xlink:type="simple" xlink:href="../../viewer/style/icons.less#L384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247" svg:width="0.41667in" svg:height="0.4166666666666667in"><draw:image xlink:href="Pictures/246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mages</text:p>
          </table:table-cell>
          <table:table-cell table:style-name="TableRowCell" office:value-type="string">
            <text:p text:style-name="Table_20_Contents"><text:a xlink:type="simple" xlink:href="../../viewer/style/icons.less#L4" office:name=""><text:span text:style-name="Definition">image-icon.svg</text:span></text:a></text:p>
          </table:table-cell>
          <table:table-cell table:style-name="TableRowCell" office:value-type="string">
            <text:p text:style-name="Table_20_Contents"><draw:frame draw:name="img248" svg:width="0.41667in" svg:height="0.4166666666666667in"><draw:image xlink:href="Pictures/247.svg" xlink:type="simple" xlink:show="embed" xlink:actuate="onLoad"/></draw:frame></text:p>
          </table:table-cell>
          <table:table-cell table:style-name="TableRowCell" office:value-type="string">
            <text:p text:style-name="Table_20_Contents">AddonConfigImages,code</text:p>
          </table:table-cell>
        </table:table-row>
        <table:table-row>
          <table:table-cell table:style-name="TableRowCell" office:value-type="string">
            <text:p text:style-name="Table_20_Contents">Imports</text:p>
          </table:table-cell>
          <table:table-cell table:style-name="TableRowCell" office:value-type="string">
            <text:p text:style-name="Table_20_Contents"><text:a xlink:type="simple" xlink:href="../../viewer/style/icons.less#L13" office:name=""><text:span text:style-name="Definition">swap_horiz.svg</text:span></text:a></text:p>
          </table:table-cell>
          <table:table-cell table:style-name="TableRowCell" office:value-type="string">
            <text:p text:style-name="Table_20_Contents"><draw:frame draw:name="img249" svg:width="0.41667in" svg:height="0.4166666666666667in"><draw:image xlink:href="Pictures/248.svg" xlink:type="simple" xlink:show="embed" xlink:actuate="onLoad"/></draw:frame></text:p>
          </table:table-cell>
          <table:table-cell table:style-name="TableRowCell" office:value-type="string">
            <text:p text:style-name="Table_20_Contents">ImportsView</text:p>
          </table:table-cell>
        </table:table-row>
        <table:table-row>
          <table:table-cell table:style-name="TableRowCell" office:value-type="string">
            <text:p text:style-name="Table_20_Contents">Info</text:p>
          </table:table-cell>
          <table:table-cell table:style-name="TableRowCell" office:value-type="string">
            <text:p text:style-name="Table_20_Contents"><text:a xlink:type="simple" xlink:href="../../viewer/style/icons.less#L28" office:name=""><text:span text:style-name="Definition">ic_info.svg</text:span></text:a></text:p>
          </table:table-cell>
          <table:table-cell table:style-name="TableRowCell" office:value-type="string">
            <text:p text:style-name="Table_20_Contents"><draw:frame draw:name="img250" svg:width="0.41667in" svg:height="0.4166666666666667in"><draw:image xlink:href="Pictures/249.svg" xlink:type="simple" xlink:show="embed" xlink:actuate="onLoad"/></draw:frame></text:p>
          </table:table-cell>
          <table:table-cell table:style-name="TableRowCell" office:value-type="string">
            <text:p text:style-name="Table_20_Contents">MainInfo,DBInfo</text:p>
          </table:table-cell>
        </table:table-row>
        <table:table-row>
          <table:table-cell table:style-name="TableRowCell" office:value-type="string">
            <text:p text:style-name="Table_20_Contents">InvertRoute</text:p>
          </table:table-cell>
          <table:table-cell table:style-name="TableRowCell" office:value-type="string">
            <text:p text:style-name="Table_20_Contents"><text:a xlink:type="simple" xlink:href="../../viewer/style/icons.less#L307" office:name=""><text:span text:style-name="Definition">invertroute.svg</text:span></text:a></text:p>
          </table:table-cell>
          <table:table-cell table:style-name="TableRowCell" office:value-type="string">
            <text:p text:style-name="Table_20_Contents"><draw:frame draw:name="img251" svg:width="0.41667in" svg:height="0.4166666666666667in"><draw:image xlink:href="Pictures/250.svg" xlink:type="simple" xlink:show="embed" xlink:actuate="onLoad"/></draw:frame></text:p>
          </table:table-cell>
          <table:table-cell table:style-name="TableRowCell" office:value-type="string">
            <text:p text:style-name="Table_20_Contents">DBInvertRoute</text:p>
          </table:table-cell>
        </table:table-row>
        <table:table-row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252" svg:width="0.41667in" svg:height="0.4166666666666667in"><draw:image xlink:href="Pictures/251.svg" xlink:type="simple" xlink:show="embed" xlink:actuate="onLoad"/></draw:frame></text:p>
          </table:table-cell>
          <table:table-cell table:style-name="TableRowCell" office:value-type="string">
            <text:p text:style-name="Table_20_Contents">AisItems,StoredRoutes,SettingsItems,TrackItems</text:p>
          </table:table-cell>
        </table:table-row>
        <table:table-row>
          <table:table-cell table:style-name="TableRowCell" office:value-type="string">
            <text:p text:style-name="Table_20_Contents">JSChanged</text:p>
          </table:table-cell>
          <table:table-cell table:style-name="TableRowCell" office:value-type="string">
            <text:p text:style-name="Table_20_Contents"><text:a xlink:type="simple" xlink:href="../../viewer/style/icons.less#L414" office:name=""><text:span text:style-name="Definition">javascript.svg</text:span></text:a></text:p>
          </table:table-cell>
          <table:table-cell table:style-name="TableRowCell" office:value-type="string">
            <text:p text:style-name="Table_20_Contents"><draw:frame draw:name="img253" svg:width="0.41667in" svg:height="0.4166666666666667in"><draw:image xlink:href="Pictures/252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10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254" svg:width="0.41667in" svg:height="0.4166666666666667in"><draw:image xlink:href="Pictures/253.svg" xlink:type="simple" xlink:show="embed" xlink:actuate="onLoad"/></draw:frame></text:p>
          </table:table-cell>
          <table:table-cell table:style-name="TableRowCell" office:value-type="string">
            <text:p text:style-name="Table_20_Contents">Layout,LayoutFinished,DBEditLayout,code</text:p>
          </table:table-cell>
        </table:table-row>
        <table:table-row>
          <table:table-cell table:style-name="TableRowCell" office:value-type="string">
            <text:p text:style-name="Table_20_Contents">LayoutOff</text:p>
          </table:table-cell>
          <table:table-cell table:style-name="TableRowCell" office:value-type="string">
            <text:p text:style-name="Table_20_Contents"><text:a xlink:type="simple" xlink:href="../../viewer/style/icons.less#L246" office:name=""><text:span text:style-name="Definition">ballot-off.svg</text:span></text:a></text:p>
          </table:table-cell>
          <table:table-cell table:style-name="TableRowCell" office:value-type="string">
            <text:p text:style-name="Table_20_Contents"><draw:frame draw:name="img255" svg:width="0.41667in" svg:height="0.4166666666666667in"><draw:image xlink:href="Pictures/254.svg" xlink:type="simple" xlink:show="embed" xlink:actuate="onLoad"/></draw:frame></text:p>
          </table:table-cell>
          <table:table-cell table:style-name="TableRowCell" office:value-type="string">
            <text:p text:style-name="Table_20_Contents">SettingsLayoutOff</text:p>
          </table:table-cell>
        </table:table-row>
        <table:table-row>
          <table:table-cell table:style-name="TableRowCell" office:value-type="string">
            <text:p text:style-name="Table_20_Contents">Left</text:p>
          </table:table-cell>
          <table:table-cell table:style-name="TableRowCell" office:value-type="string">
            <text:p text:style-name="Table_20_Contents"><text:a xlink:type="simple" xlink:href="../../viewer/style/icons.less#L401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256" svg:width="0.41667in" svg:height="0.4166666666666667in"><draw:image xlink:href="Pictures/25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Lock</text:p>
          </table:table-cell>
          <table:table-cell table:style-name="TableRowCell" office:value-type="string">
            <text:p text:style-name="Table_20_Contents"><text:a xlink:type="simple" xlink:href="../../viewer/style/icons.less#L101" office:name=""><text:span text:style-name="Definition">update_disabled.svg</text:span></text:a></text:p>
          </table:table-cell>
          <table:table-cell table:style-name="TableRowCell" office:value-type="string">
            <text:p text:style-name="Table_20_Contents"><draw:frame draw:name="img257" svg:width="0.41667in" svg:height="0.4166666666666667in"><draw:image xlink:href="Pictures/256.svg" xlink:type="simple" xlink:show="embed" xlink:actuate="onLoad"/></draw:frame></text:p>
          </table:table-cell>
          <table:table-cell table:style-name="TableRowCell" office:value-type="string">
            <text:p text:style-name="Table_20_Contents">AisLock</text:p>
          </table:table-cell>
        </table:table-row>
        <table:table-row>
          <table:table-cell table:style-name="TableRowCell" office:value-type="string">
            <text:p text:style-name="Table_20_Contents">LockMarker</text:p>
          </table:table-cell>
          <table:table-cell table:style-name="TableRowCell" office:value-type="string">
            <text:p text:style-name="Table_20_Contents"><text:a xlink:type="simple" xlink:href="../../viewer/style/icons.less#L158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258" svg:width="0.41667in" svg:height="0.4166666666666667in"><draw:image xlink:href="Pictures/257.svg" xlink:type="simple" xlink:show="embed" xlink:actuate="onLoad"/></draw:frame></text:p>
          </table:table-cell>
          <table:table-cell table:style-name="TableRowCell" office:value-type="string">
            <text:p text:style-name="Table_20_Contents">LockMarker</text:p>
          </table:table-cell>
        </table:table-row>
        <table:table-row>
          <table:table-cell table:style-name="TableRowCell" office:value-type="string">
            <text:p text:style-name="Table_20_Contents">LockPos</text:p>
          </table:table-cell>
          <table:table-cell table:style-name="TableRowCell" office:value-type="string">
            <text:p text:style-name="Table_20_Contents"><text:a xlink:type="simple" xlink:href="../../viewer/style/icons.less#L195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59" svg:width="0.41667in" svg:height="0.4166666666666667in"><draw:image xlink:href="Pictures/258.svg" xlink:type="simple" xlink:show="embed" xlink:actuate="onLoad"/></draw:frame></text:p>
          </table:table-cell>
          <table:table-cell table:style-name="TableRowCell" office:value-type="string">
            <text:p text:style-name="Table_20_Contents">LockPos</text:p>
          </table:table-cell>
        </table:table-row>
        <table:table-row>
          <table:table-cell table:style-name="TableRowCell" office:value-type="string">
            <text:p text:style-name="Table_20_Contents">Log</text:p>
          </table:table-cell>
          <table:table-cell table:style-name="TableRowCell" office:value-type="string">
            <text:p text:style-name="Table_20_Contents"><text:a xlink:type="simple" xlink:href="../../viewer/style/icons.less#L231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260" svg:width="0.41667in" svg:height="0.4166666666666667in"><draw:image xlink:href="Pictures/259.svg" xlink:type="simple" xlink:show="embed" xlink:actuate="onLoad"/></draw:frame></text:p>
          </table:table-cell>
          <table:table-cell table:style-name="TableRowCell" office:value-type="string">
            <text:p text:style-name="Table_20_Contents">StatusLog,DBLog</text:p>
          </table:table-cell>
        </table:table-row>
        <table:table-row>
          <table:table-cell table:style-name="TableRowCell" office:value-type="string">
            <text:p text:style-name="Table_20_Contents">MNCatNav</text:p>
          </table:table-cell>
          <table:table-cell table:style-name="TableRowCell" office:value-type="string">
            <text:p text:style-name="Table_20_Contents"><text:a xlink:type="simple" xlink:href="../../viewer/style/icons.less#L374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61" svg:width="0.41667in" svg:height="0.4166666666666667in"><draw:image xlink:href="Pictures/260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NCatSet</text:p>
          </table:table-cell>
          <table:table-cell table:style-name="TableRowCell" office:value-type="string">
            <text:p text:style-name="Table_20_Contents"><text:a xlink:type="simple" xlink:href="../../viewer/style/icons.less#L377" office:name=""><text:span text:style-name="Definition">build-200.svg</text:span></text:a></text:p>
          </table:table-cell>
          <table:table-cell table:style-name="TableRowCell" office:value-type="string">
            <text:p text:style-name="Table_20_Contents"><draw:frame draw:name="img262" svg:width="0.41667in" svg:height="0.4166666666666667in"><draw:image xlink:href="Pictures/26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NCollapsed</text:p>
          </table:table-cell>
          <table:table-cell table:style-name="TableRowCell" office:value-type="string">
            <text:p text:style-name="Table_20_Contents"><text:a xlink:type="simple" xlink:href="../../viewer/style/icons.less#L366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63" svg:width="0.41667in" svg:height="0.4166666666666667in"><draw:image xlink:href="Pictures/262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NExpanded</text:p>
          </table:table-cell>
          <table:table-cell table:style-name="TableRowCell" office:value-type="string">
            <text:p text:style-name="Table_20_Contents"><text:a xlink:type="simple" xlink:href="../../viewer/style/icons.less#L370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64" svg:width="0.41667in" svg:height="0.4166666666666667in"><draw:image xlink:href="Pictures/26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OB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drowning.svg</text:span></text:a></text:p>
          </table:table-cell>
          <table:table-cell table:style-name="TableRowCell" office:value-type="string">
            <text:p text:style-name="Table_20_Contents"><draw:frame draw:name="img265" svg:width="0.41667in" svg:height="0.4166666666666667in"><draw:image xlink:href="Pictures/264.svg" xlink:type="simple" xlink:show="embed" xlink:actuate="onLoad"/></draw:frame></text:p>
          </table:table-cell>
          <table:table-cell table:style-name="TableRowCell" office:value-type="string">
            <text:p text:style-name="Table_20_Contents">MOB</text:p>
          </table:table-cell>
        </table:table-row>
        <table:table-row>
          <table:table-cell table:style-name="TableRowCell" office:value-type="string">
            <text:p text:style-name="Table_20_Contents">MainNav</text:p>
          </table:table-cell>
          <table:table-cell table:style-name="TableRowCell" office:value-type="string">
            <text:p text:style-name="Table_20_Contents"><text:a xlink:type="simple" xlink:href="../../viewer/style/icons.less#L261" office:name=""><text:span text:style-name="Definition">menu-200.svg</text:span></text:a></text:p>
          </table:table-cell>
          <table:table-cell table:style-name="TableRowCell" office:value-type="string">
            <text:p text:style-name="Table_20_Contents"><draw:frame draw:name="img266" svg:width="0.41667in" svg:height="0.4166666666666667in"><draw:image xlink:href="Pictures/265.svg" xlink:type="simple" xlink:show="embed" xlink:actuate="onLoad"/></draw:frame></text:p>
          </table:table-cell>
          <table:table-cell table:style-name="TableRowCell" office:value-type="string">
            <text:p text:style-name="Table_20_Contents">MainNav</text:p>
          </table:table-cell>
        </table:table-row>
        <table:table-row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37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267" svg:width="0.41667in" svg:height="0.4166666666666667in"><draw:image xlink:href="Pictures/266.svg" xlink:type="simple" xlink:show="embed" xlink:actuate="onLoad"/></draw:frame></text:p>
          </table:table-cell>
          <table:table-cell table:style-name="TableRowCell" office:value-type="string">
            <text:p text:style-name="Table_20_Contents">DBMeasure,DBMeasureAdd,code</text:p>
          </table:table-cell>
        </table:table-row>
        <table:table-row>
          <table:table-cell table:style-name="TableRowCell" office:value-type="string">
            <text:p text:style-name="Table_20_Contents">MeasureFlag</text:p>
          </table:table-cell>
          <table:table-cell table:style-name="TableRowCell" office:value-type="string">
            <text:p text:style-name="Table_20_Contents"><text:a xlink:type="simple" xlink:href="../../viewer/style/icons.less#L343" office:name=""><text:span text:style-name="Definition">outlined_flag.svg</text:span></text:a></text:p>
          </table:table-cell>
          <table:table-cell table:style-name="TableRowCell" office:value-type="string">
            <text:p text:style-name="Table_20_Contents"><draw:frame draw:name="img268" svg:width="0.41667in" svg:height="0.4166666666666667in"><draw:image xlink:href="Pictures/26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easureOff</text:p>
          </table:table-cell>
          <table:table-cell table:style-name="TableRowCell" office:value-type="string">
            <text:p text:style-name="Table_20_Contents"><text:a xlink:type="simple" xlink:href="../../viewer/style/icons.less#L340" office:name=""><text:span text:style-name="Definition">straighten-off.svg</text:span></text:a></text:p>
          </table:table-cell>
          <table:table-cell table:style-name="TableRowCell" office:value-type="string">
            <text:p text:style-name="Table_20_Contents"><draw:frame draw:name="img269" svg:width="0.41667in" svg:height="0.4166666666666667in"><draw:image xlink:href="Pictures/268.svg" xlink:type="simple" xlink:show="embed" xlink:actuate="onLoad"/></draw:frame></text:p>
          </table:table-cell>
          <table:table-cell table:style-name="TableRowCell" office:value-type="string">
            <text:p text:style-name="Table_20_Contents">DBMeasureOff</text:p>
          </table:table-cell>
        </table:table-row>
        <table:table-row>
          <table:table-cell table:style-name="TableRowCell" office:value-type="string">
            <text:p text:style-name="Table_20_Contents">More</text:p>
          </table:table-cell>
          <table:table-cell table:style-name="TableRowCell" office:value-type="string">
            <text:p text:style-name="Table_20_Contents"><text:a xlink:type="simple" xlink:href="../../viewer/style/icons.less#L351" office:name=""><text:span text:style-name="Definition">ic_chevron_right.svg</text:span></text:a></text:p>
          </table:table-cell>
          <table:table-cell table:style-name="TableRowCell" office:value-type="string">
            <text:p text:style-name="Table_20_Contents"><draw:frame draw:name="img270" svg:width="0.41667in" svg:height="0.4166666666666667in"><draw:image xlink:href="Pictures/26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NavAdd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271" svg:width="0.41667in" svg:height="0.4166666666666667in"><draw:image xlink:href="Pictures/270.svg" xlink:type="simple" xlink:show="embed" xlink:actuate="onLoad"/></draw:frame></text:p>
          </table:table-cell>
          <table:table-cell table:style-name="TableRowCell" office:value-type="string">
            <text:p text:style-name="Table_20_Contents">NavAdd,DBInsertRouteBefore</text:p>
          </table:table-cell>
        </table:table-row>
        <table:table-row>
          <table:table-cell table:style-name="TableRowCell" office:value-type="string">
            <text:p text:style-name="Table_20_Contents">NavAddAfter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272" svg:width="0.41667in" svg:height="0.4166666666666667in"><draw:image xlink:href="Pictures/271.svg" xlink:type="simple" xlink:show="embed" xlink:actuate="onLoad"/></draw:frame></text:p>
          </table:table-cell>
          <table:table-cell table:style-name="TableRowCell" office:value-type="string">
            <text:p text:style-name="Table_20_Contents">NavAddAfter,DBInsertRouteAfter</text:p>
          </table:table-cell>
        </table:table-row>
        <table:table-row>
          <table:table-cell table:style-name="TableRowCell" office:value-type="string">
            <text:p text:style-name="Table_20_Contents">NavDelete</text:p>
          </table:table-cell>
          <table:table-cell table:style-name="TableRowCell" office:value-type="string">
            <text:p text:style-name="Table_20_Contents"><text:a xlink:type="simple" xlink:href="../../viewer/style/icons.less#L171" office:name=""><text:span text:style-name="Definition">wpminus.svg</text:span></text:a></text:p>
          </table:table-cell>
          <table:table-cell table:style-name="TableRowCell" office:value-type="string">
            <text:p text:style-name="Table_20_Contents"><draw:frame draw:name="img273" svg:width="0.41667in" svg:height="0.4166666666666667in"><draw:image xlink:href="Pictures/272.svg" xlink:type="simple" xlink:show="embed" xlink:actuate="onLoad"/></draw:frame></text:p>
          </table:table-cell>
          <table:table-cell table:style-name="TableRowCell" office:value-type="string">
            <text:p text:style-name="Table_20_Contents">NavDelete</text:p>
          </table:table-cell>
        </table:table-row>
        <table:table-row>
          <table:table-cell table:style-name="TableRowCell" office:value-type="string">
            <text:p text:style-name="Table_20_Contents">NavGoto</text:p>
          </table:table-cell>
          <table:table-cell table:style-name="TableRowCell" office:value-type="string">
            <text:p text:style-name="Table_20_Contents"><text:a xlink:type="simple" xlink:href="../../viewer/style/icons.less#L174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274" svg:width="0.41667in" svg:height="0.4166666666666667in"><draw:image xlink:href="Pictures/273.svg" xlink:type="simple" xlink:show="embed" xlink:actuate="onLoad"/></draw:frame></text:p>
          </table:table-cell>
          <table:table-cell table:style-name="TableRowCell" office:value-type="string">
            <text:p text:style-name="Table_20_Contents">NavGoto,DBStartRoute</text:p>
          </table:table-cell>
        </table:table-row>
        <table:table-row>
          <table:table-cell table:style-name="TableRowCell" office:value-type="string">
            <text:p text:style-name="Table_20_Contents">NavMapWidgets</text:p>
          </table:table-cell>
          <table:table-cell table:style-name="TableRowCell" office:value-type="string">
            <text:p text:style-name="Table_20_Contents"><text:a xlink:type="simple" xlink:href="../../viewer/style/icons.less#L249" office:name=""><text:span text:style-name="Definition">assistant_nav.svg</text:span></text:a></text:p>
          </table:table-cell>
          <table:table-cell table:style-name="TableRowCell" office:value-type="string">
            <text:p text:style-name="Table_20_Contents"><draw:frame draw:name="img275" svg:width="0.41667in" svg:height="0.4166666666666667in"><draw:image xlink:href="Pictures/274.svg" xlink:type="simple" xlink:show="embed" xlink:actuate="onLoad"/></draw:frame></text:p>
          </table:table-cell>
          <table:table-cell table:style-name="TableRowCell" office:value-type="string">
            <text:p text:style-name="Table_20_Contents">NavMapWidgets</text:p>
          </table:table-cell>
        </table:table-row>
        <table:table-row>
          <table:table-cell table:style-name="TableRowCell" office:value-type="string">
            <text:p text:style-name="Table_20_Contents">NavNext</text:p>
          </table:table-cell>
          <table:table-cell table:style-name="TableRowCell" office:value-type="string">
            <text:p text:style-name="Table_20_Contents"><text:a xlink:type="simple" xlink:href="../../viewer/style/icons.less#L155" office:name=""><text:span text:style-name="Definition">nextwp.svg</text:span></text:a></text:p>
          </table:table-cell>
          <table:table-cell table:style-name="TableRowCell" office:value-type="string">
            <text:p text:style-name="Table_20_Contents"><draw:frame draw:name="img276" svg:width="0.41667in" svg:height="0.4166666666666667in"><draw:image xlink:href="Pictures/275.svg" xlink:type="simple" xlink:show="embed" xlink:actuate="onLoad"/></draw:frame></text:p>
          </table:table-cell>
          <table:table-cell table:style-name="TableRowCell" office:value-type="string">
            <text:p text:style-name="Table_20_Contents">NavNext</text:p>
          </table:table-cell>
        </table:table-row>
        <table:table-row>
          <table:table-cell table:style-name="TableRowCell" office:value-type="string">
            <text:p text:style-name="Table_20_Contents">NavStop</text:p>
          </table:table-cell>
          <table:table-cell table:style-name="TableRowCell" office:value-type="string">
            <text:p text:style-name="Table_20_Contents"><text:a xlink:type="simple" xlink:href="../../viewer/style/icons.less#L177" office:name=""><text:span text:style-name="Definition">stop-nav.svg</text:span></text:a></text:p>
          </table:table-cell>
          <table:table-cell table:style-name="TableRowCell" office:value-type="string">
            <text:p text:style-name="Table_20_Contents"><draw:frame draw:name="img277" svg:width="0.41667in" svg:height="0.4166666666666667in"><draw:image xlink:href="Pictures/276.svg" xlink:type="simple" xlink:show="embed" xlink:actuate="onLoad"/></draw:frame></text:p>
          </table:table-cell>
          <table:table-cell table:style-name="TableRowCell" office:value-type="string">
            <text:p text:style-name="Table_20_Contents">StopNav,code</text:p>
          </table:table-cell>
        </table:table-row>
        <table:table-row>
          <table:table-cell table:style-name="TableRowCell" office:value-type="string">
            <text:p text:style-name="Table_20_Contents">Night</text:p>
          </table:table-cell>
          <table:table-cell table:style-name="TableRowCell" office:value-type="string">
            <text:p text:style-name="Table_20_Contents"><text:a xlink:type="simple" xlink:href="../../viewer/style/icons.less#L119" office:name=""><text:span text:style-name="Definition">night.svg</text:span></text:a></text:p>
          </table:table-cell>
          <table:table-cell table:style-name="TableRowCell" office:value-type="string">
            <text:p text:style-name="Table_20_Contents"><draw:frame draw:name="img278" svg:width="0.41667in" svg:height="0.4166666666666667in"><draw:image xlink:href="Pictures/277.svg" xlink:type="simple" xlink:show="embed" xlink:actuate="onLoad"/></draw:frame></text:p>
          </table:table-cell>
          <table:table-cell table:style-name="TableRowCell" office:value-type="string">
            <text:p text:style-name="Table_20_Contents">Night</text:p>
          </table:table-cell>
        </table:table-row>
        <table:table-row>
          <table:table-cell table:style-name="TableRowCell" office:value-type="string">
            <text:p text:style-name="Table_20_Contents">Num1</text:p>
          </table:table-cell>
          <table:table-cell table:style-name="TableRowCell" office:value-type="string">
            <text:p text:style-name="Table_20_Contents"><text:a xlink:type="simple" xlink:href="../../viewer/style/icons.less#L43" office:name=""><text:span text:style-name="Definition">num-1.svg</text:span></text:a></text:p>
          </table:table-cell>
          <table:table-cell table:style-name="TableRowCell" office:value-type="string">
            <text:p text:style-name="Table_20_Contents"><draw:frame draw:name="img279" svg:width="0.41667in" svg:height="0.4166666666666667in"><draw:image xlink:href="Pictures/278.svg" xlink:type="simple" xlink:show="embed" xlink:actuate="onLoad"/></draw:frame></text:p>
          </table:table-cell>
          <table:table-cell table:style-name="TableRowCell" office:value-type="string">
            <text:p text:style-name="Table_20_Contents">Gps1</text:p>
          </table:table-cell>
        </table:table-row>
        <table:table-row>
          <table:table-cell table:style-name="TableRowCell" office:value-type="string">
            <text:p text:style-name="Table_20_Contents">Num10</text:p>
          </table:table-cell>
          <table:table-cell table:style-name="TableRowCell" office:value-type="string">
            <text:p text:style-name="Table_20_Contents"><text:a xlink:type="simple" xlink:href="../../viewer/style/icons.less#L70" office:name=""><text:span text:style-name="Definition">num-10.svg</text:span></text:a></text:p>
          </table:table-cell>
          <table:table-cell table:style-name="TableRowCell" office:value-type="string">
            <text:p text:style-name="Table_20_Contents"><draw:frame draw:name="img280" svg:width="0.41667in" svg:height="0.4166666666666667in"><draw:image xlink:href="Pictures/279.svg" xlink:type="simple" xlink:show="embed" xlink:actuate="onLoad"/></draw:frame></text:p>
          </table:table-cell>
          <table:table-cell table:style-name="TableRowCell" office:value-type="string">
            <text:p text:style-name="Table_20_Contents">Gps10</text:p>
          </table:table-cell>
        </table:table-row>
        <table:table-row>
          <table:table-cell table:style-name="TableRowCell" office:value-type="string">
            <text:p text:style-name="Table_20_Contents">Num2</text:p>
          </table:table-cell>
          <table:table-cell table:style-name="TableRowCell" office:value-type="string">
            <text:p text:style-name="Table_20_Contents"><text:a xlink:type="simple" xlink:href="../../viewer/style/icons.less#L46" office:name=""><text:span text:style-name="Definition">num-2.svg</text:span></text:a></text:p>
          </table:table-cell>
          <table:table-cell table:style-name="TableRowCell" office:value-type="string">
            <text:p text:style-name="Table_20_Contents"><draw:frame draw:name="img281" svg:width="0.41667in" svg:height="0.4166666666666667in"><draw:image xlink:href="Pictures/280.svg" xlink:type="simple" xlink:show="embed" xlink:actuate="onLoad"/></draw:frame></text:p>
          </table:table-cell>
          <table:table-cell table:style-name="TableRowCell" office:value-type="string">
            <text:p text:style-name="Table_20_Contents">Gps2</text:p>
          </table:table-cell>
        </table:table-row>
        <table:table-row>
          <table:table-cell table:style-name="TableRowCell" office:value-type="string">
            <text:p text:style-name="Table_20_Contents">Num3</text:p>
          </table:table-cell>
          <table:table-cell table:style-name="TableRowCell" office:value-type="string">
            <text:p text:style-name="Table_20_Contents"><text:a xlink:type="simple" xlink:href="../../viewer/style/icons.less#L49" office:name=""><text:span text:style-name="Definition">num-3.svg</text:span></text:a></text:p>
          </table:table-cell>
          <table:table-cell table:style-name="TableRowCell" office:value-type="string">
            <text:p text:style-name="Table_20_Contents"><draw:frame draw:name="img282" svg:width="0.41667in" svg:height="0.4166666666666667in"><draw:image xlink:href="Pictures/281.svg" xlink:type="simple" xlink:show="embed" xlink:actuate="onLoad"/></draw:frame></text:p>
          </table:table-cell>
          <table:table-cell table:style-name="TableRowCell" office:value-type="string">
            <text:p text:style-name="Table_20_Contents">Gps3</text:p>
          </table:table-cell>
        </table:table-row>
        <table:table-row>
          <table:table-cell table:style-name="TableRowCell" office:value-type="string">
            <text:p text:style-name="Table_20_Contents">Num4</text:p>
          </table:table-cell>
          <table:table-cell table:style-name="TableRowCell" office:value-type="string">
            <text:p text:style-name="Table_20_Contents"><text:a xlink:type="simple" xlink:href="../../viewer/style/icons.less#L52" office:name=""><text:span text:style-name="Definition">num-4.svg</text:span></text:a></text:p>
          </table:table-cell>
          <table:table-cell table:style-name="TableRowCell" office:value-type="string">
            <text:p text:style-name="Table_20_Contents"><draw:frame draw:name="img283" svg:width="0.41667in" svg:height="0.4166666666666667in"><draw:image xlink:href="Pictures/282.svg" xlink:type="simple" xlink:show="embed" xlink:actuate="onLoad"/></draw:frame></text:p>
          </table:table-cell>
          <table:table-cell table:style-name="TableRowCell" office:value-type="string">
            <text:p text:style-name="Table_20_Contents">Gps4</text:p>
          </table:table-cell>
        </table:table-row>
        <table:table-row>
          <table:table-cell table:style-name="TableRowCell" office:value-type="string">
            <text:p text:style-name="Table_20_Contents">Num5</text:p>
          </table:table-cell>
          <table:table-cell table:style-name="TableRowCell" office:value-type="string">
            <text:p text:style-name="Table_20_Contents"><text:a xlink:type="simple" xlink:href="../../viewer/style/icons.less#L55" office:name=""><text:span text:style-name="Definition">num-5.svg</text:span></text:a></text:p>
          </table:table-cell>
          <table:table-cell table:style-name="TableRowCell" office:value-type="string">
            <text:p text:style-name="Table_20_Contents"><draw:frame draw:name="img284" svg:width="0.41667in" svg:height="0.4166666666666667in"><draw:image xlink:href="Pictures/283.svg" xlink:type="simple" xlink:show="embed" xlink:actuate="onLoad"/></draw:frame></text:p>
          </table:table-cell>
          <table:table-cell table:style-name="TableRowCell" office:value-type="string">
            <text:p text:style-name="Table_20_Contents">Gps5</text:p>
          </table:table-cell>
        </table:table-row>
        <table:table-row>
          <table:table-cell table:style-name="TableRowCell" office:value-type="string">
            <text:p text:style-name="Table_20_Contents">Num6</text:p>
          </table:table-cell>
          <table:table-cell table:style-name="TableRowCell" office:value-type="string">
            <text:p text:style-name="Table_20_Contents"><text:a xlink:type="simple" xlink:href="../../viewer/style/icons.less#L58" office:name=""><text:span text:style-name="Definition">num-6.svg</text:span></text:a></text:p>
          </table:table-cell>
          <table:table-cell table:style-name="TableRowCell" office:value-type="string">
            <text:p text:style-name="Table_20_Contents"><draw:frame draw:name="img285" svg:width="0.41667in" svg:height="0.4166666666666667in"><draw:image xlink:href="Pictures/284.svg" xlink:type="simple" xlink:show="embed" xlink:actuate="onLoad"/></draw:frame></text:p>
          </table:table-cell>
          <table:table-cell table:style-name="TableRowCell" office:value-type="string">
            <text:p text:style-name="Table_20_Contents">Gps6</text:p>
          </table:table-cell>
        </table:table-row>
        <table:table-row>
          <table:table-cell table:style-name="TableRowCell" office:value-type="string">
            <text:p text:style-name="Table_20_Contents">Num7</text:p>
          </table:table-cell>
          <table:table-cell table:style-name="TableRowCell" office:value-type="string">
            <text:p text:style-name="Table_20_Contents"><text:a xlink:type="simple" xlink:href="../../viewer/style/icons.less#L61" office:name=""><text:span text:style-name="Definition">num-7.svg</text:span></text:a></text:p>
          </table:table-cell>
          <table:table-cell table:style-name="TableRowCell" office:value-type="string">
            <text:p text:style-name="Table_20_Contents"><draw:frame draw:name="img286" svg:width="0.41667in" svg:height="0.4166666666666667in"><draw:image xlink:href="Pictures/285.svg" xlink:type="simple" xlink:show="embed" xlink:actuate="onLoad"/></draw:frame></text:p>
          </table:table-cell>
          <table:table-cell table:style-name="TableRowCell" office:value-type="string">
            <text:p text:style-name="Table_20_Contents">Gps7</text:p>
          </table:table-cell>
        </table:table-row>
        <table:table-row>
          <table:table-cell table:style-name="TableRowCell" office:value-type="string">
            <text:p text:style-name="Table_20_Contents">Num8</text:p>
          </table:table-cell>
          <table:table-cell table:style-name="TableRowCell" office:value-type="string">
            <text:p text:style-name="Table_20_Contents"><text:a xlink:type="simple" xlink:href="../../viewer/style/icons.less#L64" office:name=""><text:span text:style-name="Definition">num-8.svg</text:span></text:a></text:p>
          </table:table-cell>
          <table:table-cell table:style-name="TableRowCell" office:value-type="string">
            <text:p text:style-name="Table_20_Contents"><draw:frame draw:name="img287" svg:width="0.41667in" svg:height="0.4166666666666667in"><draw:image xlink:href="Pictures/286.svg" xlink:type="simple" xlink:show="embed" xlink:actuate="onLoad"/></draw:frame></text:p>
          </table:table-cell>
          <table:table-cell table:style-name="TableRowCell" office:value-type="string">
            <text:p text:style-name="Table_20_Contents">Gps8</text:p>
          </table:table-cell>
        </table:table-row>
        <table:table-row>
          <table:table-cell table:style-name="TableRowCell" office:value-type="string">
            <text:p text:style-name="Table_20_Contents">Num9</text:p>
          </table:table-cell>
          <table:table-cell table:style-name="TableRowCell" office:value-type="string">
            <text:p text:style-name="Table_20_Contents"><text:a xlink:type="simple" xlink:href="../../viewer/style/icons.less#L67" office:name=""><text:span text:style-name="Definition">num-9.svg</text:span></text:a></text:p>
          </table:table-cell>
          <table:table-cell table:style-name="TableRowCell" office:value-type="string">
            <text:p text:style-name="Table_20_Contents"><draw:frame draw:name="img288" svg:width="0.41667in" svg:height="0.4166666666666667in"><draw:image xlink:href="Pictures/287.svg" xlink:type="simple" xlink:show="embed" xlink:actuate="onLoad"/></draw:frame></text:p>
          </table:table-cell>
          <table:table-cell table:style-name="TableRowCell" office:value-type="string">
            <text:p text:style-name="Table_20_Contents">Gps9</text:p>
          </table:table-cell>
        </table:table-row>
        <table:table-row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70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289" svg:width="0.41667in" svg:height="0.4166666666666667in"><draw:image xlink:href="Pictures/288.svg" xlink:type="simple" xlink:show="embed" xlink:actuate="onLoad"/></draw:frame></text:p>
          </table:table-cell>
          <table:table-cell table:style-name="TableRowCell" office:value-type="string">
            <text:p text:style-name="Table_20_Contents">DBOk,DBUpdate,DBAccept</text:p>
          </table:table-cell>
        </table:table-row>
        <table:table-row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5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290" svg:width="0.41667in" svg:height="0.4166666666666667in"><draw:image xlink:href="Pictures/289.svg" xlink:type="simple" xlink:show="embed" xlink:actuate="onLoad"/></draw:frame></text:p>
          </table:table-cell>
          <table:table-cell table:style-name="TableRowCell" office:value-type="string">
            <text:p text:style-name="Table_20_Contents">SettingsLoad,DBLoadRoute,DBActivate</text:p>
          </table:table-cell>
        </table:table-row>
        <table:table-row>
          <table:table-cell table:style-name="TableRowCell" office:value-type="string">
            <text:p text:style-name="Table_20_Contents">Overflow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more_left.svg</text:span></text:a></text:p>
          </table:table-cell>
          <table:table-cell table:style-name="TableRowCell" office:value-type="string">
            <text:p text:style-name="Table_20_Contents"><draw:frame draw:name="img291" svg:width="0.41667in" svg:height="0.4166666666666667in"><draw:image xlink:href="Pictures/290.svg" xlink:type="simple" xlink:show="embed" xlink:actuate="onLoad"/></draw:frame></text:p>
          </table:table-cell>
          <table:table-cell table:style-name="TableRowCell" office:value-type="string">
            <text:p text:style-name="Table_20_Contents">Overflow</text:p>
          </table:table-cell>
        </table:table-row>
        <table:table-row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292" svg:width="0.41667in" svg:height="0.4166666666666667in"><draw:image xlink:href="Pictures/291.svg" xlink:type="simple" xlink:show="embed" xlink:actuate="onLoad"/></draw:frame></text:p>
          </table:table-cell>
          <table:table-cell table:style-name="TableRowCell" office:value-type="string">
            <text:p text:style-name="Table_20_Contents">OverlaysView,DBShowOverlays,DBShowAllOverlays,DBOverlays,code</text:p>
          </table:table-cell>
        </table:table-row>
        <table:table-row>
          <table:table-cell table:style-name="TableRowCell" office:value-type="string">
            <text:p text:style-name="Table_20_Contents">Plugins</text:p>
          </table:table-cell>
          <table:table-cell table:style-name="TableRowCell" office:value-type="string">
            <text:p text:style-name="Table_20_Contents"><text:a xlink:type="simple" xlink:href="../../viewer/style/icons.less#L37" office:name=""><text:span text:style-name="Definition">extension.svg</text:span></text:a></text:p>
          </table:table-cell>
          <table:table-cell table:style-name="TableRowCell" office:value-type="string">
            <text:p text:style-name="Table_20_Contents"><draw:frame draw:name="img293" svg:width="0.41667in" svg:height="0.4166666666666667in"><draw:image xlink:href="Pictures/292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94" svg:width="0.41667in" svg:height="0.4166666666666667in"><draw:image xlink:href="Pictures/293.svg" xlink:type="simple" xlink:show="embed" xlink:actuate="onLoad"/></draw:frame></text:p>
          </table:table-cell>
          <table:table-cell table:style-name="TableRowCell" office:value-type="string">
            <text:p text:style-name="Table_20_Contents">AddonConfigPlus,StatusAdd,RouteAdd,CreateFile,DBAdd,DBNew,DBNewRoute,DBAddSub</text:p>
          </table:table-cell>
        </table:table-row>
        <table:table-row>
          <table:table-cell table:style-name="TableRowCell" office:value-type="string">
            <text:p text:style-name="Table_20_Contents">Propose</text:p>
          </table:table-cell>
          <table:table-cell table:style-name="TableRowCell" office:value-type="string">
            <text:p text:style-name="Table_20_Contents"><text:a xlink:type="simple" xlink:href="../../viewer/style/icons.less#L322" office:name=""><text:span text:style-name="Definition">prompt_suggestion.svg</text:span></text:a></text:p>
          </table:table-cell>
          <table:table-cell table:style-name="TableRowCell" office:value-type="string">
            <text:p text:style-name="Table_20_Contents"><draw:frame draw:name="img295" svg:width="0.41667in" svg:height="0.4166666666666667in"><draw:image xlink:href="Pictures/294.svg" xlink:type="simple" xlink:show="embed" xlink:actuate="onLoad"/></draw:frame></text:p>
          </table:table-cell>
          <table:table-cell table:style-name="TableRowCell" office:value-type="string">
            <text:p text:style-name="Table_20_Contents">DBPropose</text:p>
          </table:table-cell>
        </table:table-row>
        <table:table-row>
          <table:table-cell table:style-name="TableRowCell" office:value-type="string">
            <text:p text:style-name="Table_20_Contents">QRCode</text:p>
          </table:table-cell>
          <table:table-cell table:style-name="TableRowCell" office:value-type="string">
            <text:p text:style-name="Table_20_Contents"><text:a xlink:type="simple" xlink:href="../../viewer/style/icons.less#L225" office:name=""><text:span text:style-name="Definition">qrcode.svg</text:span></text:a></text:p>
          </table:table-cell>
          <table:table-cell table:style-name="TableRowCell" office:value-type="string">
            <text:p text:style-name="Table_20_Contents"><draw:frame draw:name="img296" svg:width="0.41667in" svg:height="0.4166666666666667in"><draw:image xlink:href="Pictures/295.svg" xlink:type="simple" xlink:show="embed" xlink:actuate="onLoad"/></draw:frame></text:p>
          </table:table-cell>
          <table:table-cell table:style-name="TableRowCell" office:value-type="string">
            <text:p text:style-name="Table_20_Contents">StatusAddresses</text:p>
          </table:table-cell>
        </table:table-row>
        <table:table-row>
          <table:table-cell table:style-name="TableRowCell" office:value-type="string">
            <text:p text:style-name="Table_20_Contents">RadioChecked</text:p>
          </table:table-cell>
          <table:table-cell table:style-name="TableRowCell" office:value-type="string">
            <text:p text:style-name="Table_20_Contents"><text:a xlink:type="simple" xlink:href="../../viewer/style/icons.less#L363" office:name=""><text:span text:style-name="Definition">radio_button_checked.svg</text:span></text:a></text:p>
          </table:table-cell>
          <table:table-cell table:style-name="TableRowCell" office:value-type="string">
            <text:p text:style-name="Table_20_Contents"><draw:frame draw:name="img297" svg:width="0.41667in" svg:height="0.4166666666666667in"><draw:image xlink:href="Pictures/296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RadioUnchecked</text:p>
          </table:table-cell>
          <table:table-cell table:style-name="TableRowCell" office:value-type="string">
            <text:p text:style-name="Table_20_Contents"><text:a xlink:type="simple" xlink:href="../../viewer/style/icons.less#L360" office:name=""><text:span text:style-name="Definition">radio_button_unchecked.svg</text:span></text:a></text:p>
          </table:table-cell>
          <table:table-cell table:style-name="TableRowCell" office:value-type="string">
            <text:p text:style-name="Table_20_Contents"><draw:frame draw:name="img298" svg:width="0.41667in" svg:height="0.4166666666666667in"><draw:image xlink:href="Pictures/29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299" svg:width="0.41667in" svg:height="0.4166666666666667in"><draw:image xlink:href="Pictures/298.svg" xlink:type="simple" xlink:show="embed" xlink:actuate="onLoad"/></draw:frame></text:p>
          </table:table-cell>
          <table:table-cell table:style-name="TableRowCell" office:value-type="string">
            <text:p text:style-name="Table_20_Contents">ReloadUI,StatusRestart,DBReload,DBRestart,DBAutoReload</text:p>
          </table:table-cell>
        </table:table-row>
        <table:table-row>
          <table:table-cell table:style-name="TableRowCell" office:value-type="string">
            <text:p text:style-name="Table_20_Contents">RemoteChannel</text:p>
          </table:table-cell>
          <table:table-cell table:style-name="TableRowCell" office:value-type="string">
            <text:p text:style-name="Table_20_Contents"><text:a xlink:type="simple" xlink:href="../../viewer/style/icons.less#L122" office:name=""><text:span text:style-name="Definition">settings_remote.svg</text:span></text:a></text:p>
          </table:table-cell>
          <table:table-cell table:style-name="TableRowCell" office:value-type="string">
            <text:p text:style-name="Table_20_Contents"><draw:frame draw:name="img300" svg:width="0.41667in" svg:height="0.4166666666666667in"><draw:image xlink:href="Pictures/299.svg" xlink:type="simple" xlink:show="embed" xlink:actuate="onLoad"/></draw:frame></text:p>
          </table:table-cell>
          <table:table-cell table:style-name="TableRowCell" office:value-type="string">
            <text:p text:style-name="Table_20_Contents">RemoteChannel</text:p>
          </table:table-cell>
        </table:table-row>
        <table:table-row>
          <table:table-cell table:style-name="TableRowCell" office:value-type="string">
            <text:p text:style-name="Table_20_Contents">RenumberRoute</text:p>
          </table:table-cell>
          <table:table-cell table:style-name="TableRowCell" office:value-type="string">
            <text:p text:style-name="Table_20_Contents"><text:a xlink:type="simple" xlink:href="../../viewer/style/icons.less#L310" office:name=""><text:span text:style-name="Definition">format_list_numbered.svg</text:span></text:a></text:p>
          </table:table-cell>
          <table:table-cell table:style-name="TableRowCell" office:value-type="string">
            <text:p text:style-name="Table_20_Contents"><draw:frame draw:name="img301" svg:width="0.41667in" svg:height="0.4166666666666667in"><draw:image xlink:href="Pictures/300.svg" xlink:type="simple" xlink:show="embed" xlink:actuate="onLoad"/></draw:frame></text:p>
          </table:table-cell>
          <table:table-cell table:style-name="TableRowCell" office:value-type="string">
            <text:p text:style-name="Table_20_Contents">DBRenumberRoute</text:p>
          </table:table-cell>
        </table:table-row>
        <table:table-row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40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02" svg:width="0.41667in" svg:height="0.4166666666666667in"><draw:image xlink:href="Pictures/301.svg" xlink:type="simple" xlink:show="embed" xlink:actuate="onLoad"/></draw:frame></text:p>
          </table:table-cell>
          <table:table-cell table:style-name="TableRowCell" office:value-type="string">
            <text:p text:style-name="Table_20_Contents">SettingsDefaults,DefaultValue,DBReset</text:p>
          </table:table-cell>
        </table:table-row>
        <table:table-row>
          <table:table-cell table:style-name="TableRowCell" office:value-type="string">
            <text:p text:style-name="Table_20_Contents">Right</text:p>
          </table:table-cell>
          <table:table-cell table:style-name="TableRowCell" office:value-type="string">
            <text:p text:style-name="Table_20_Contents"><text:a xlink:type="simple" xlink:href="../../viewer/style/icons.less#L404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303" svg:width="0.41667in" svg:height="0.4166666666666667in"><draw:image xlink:href="Pictures/302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304" svg:width="0.41667in" svg:height="0.4166666666666667in"><draw:image xlink:href="Pictures/303.svg" xlink:type="simple" xlink:show="embed" xlink:actuate="onLoad"/></draw:frame></text:p>
          </table:table-cell>
          <table:table-cell table:style-name="TableRowCell" office:value-type="string">
            <text:p text:style-name="Table_20_Contents">ShowRoutePanel,DBRoutePoints,DBToRoute,DBFeatureNewRoute,DBEditRoute,code</text:p>
          </table:table-cell>
        </table:table-row>
        <table:table-row>
          <table:table-cell table:style-name="TableRowCell" office:value-type="string">
            <text:p text:style-name="Table_20_Contents">RouteMenu</text:p>
          </table:table-cell>
          <table:table-cell table:style-name="TableRowCell" office:value-type="string">
            <text:p text:style-name="Table_20_Contents"><text:a xlink:type="simple" xlink:href="../../viewer/style/icons.less#L180" office:name=""><text:span text:style-name="Definition">menu_open.svg</text:span></text:a></text:p>
          </table:table-cell>
          <table:table-cell table:style-name="TableRowCell" office:value-type="string">
            <text:p text:style-name="Table_20_Contents"><draw:frame draw:name="img305" svg:width="0.41667in" svg:height="0.4166666666666667in"><draw:image xlink:href="Pictures/304.svg" xlink:type="simple" xlink:show="embed" xlink:actuate="onLoad"/></draw:frame></text:p>
          </table:table-cell>
          <table:table-cell table:style-name="TableRowCell" office:value-type="string">
            <text:p text:style-name="Table_20_Contents">RouteMenu</text:p>
          </table:table-cell>
        </table:table-row>
        <table:table-row>
          <table:table-cell table:style-name="TableRowCell" office:value-type="string">
            <text:p text:style-name="Table_20_Contents">Satellite</text:p>
          </table:table-cell>
          <table:table-cell table:style-name="TableRowCell" office:value-type="string">
            <text:p text:style-name="Table_20_Contents"><text:a xlink:type="simple" xlink:href="../../viewer/style/icons.less#L419" office:name=""><text:span text:style-name="Definition">satellite-alt-200.svg</text:span></text:a></text:p>
          </table:table-cell>
          <table:table-cell table:style-name="TableRowCell" office:value-type="string">
            <text:p text:style-name="Table_20_Contents"><draw:frame draw:name="img306" svg:width="0.41667in" svg:height="0.4166666666666667in"><draw:image xlink:href="Pictures/30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Save</text:p>
          </table:table-cell>
          <table:table-cell table:style-name="TableRowCell" office:value-type="string">
            <text:p text:style-name="Table_20_Contents"><text:a xlink:type="simple" xlink:href="../../viewer/style/icons.less#L258" office:name=""><text:span text:style-name="Definition">save.svg</text:span></text:a></text:p>
          </table:table-cell>
          <table:table-cell table:style-name="TableRowCell" office:value-type="string">
            <text:p text:style-name="Table_20_Contents"><draw:frame draw:name="img307" svg:width="0.41667in" svg:height="0.4166666666666667in"><draw:image xlink:href="Pictures/306.svg" xlink:type="simple" xlink:show="embed" xlink:actuate="onLoad"/></draw:frame></text:p>
          </table:table-cell>
          <table:table-cell table:style-name="TableRowCell" office:value-type="string">
            <text:p text:style-name="Table_20_Contents">SettingsSave,DBSave</text:p>
          </table:table-cell>
        </table:table-row>
        <table:table-row>
          <table:table-cell table:style-name="TableRowCell" office:value-type="string">
            <text:p text:style-name="Table_20_Contents">SaveAs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308" svg:width="0.41667in" svg:height="0.4166666666666667in"><draw:image xlink:href="Pictures/307.svg" xlink:type="simple" xlink:show="embed" xlink:actuate="onLoad"/></draw:frame></text:p>
          </table:table-cell>
          <table:table-cell table:style-name="TableRowCell" office:value-type="string">
            <text:p text:style-name="Table_20_Contents">DBSaveAs</text:p>
          </table:table-cell>
        </table:table-row>
        <table:table-row>
          <table:table-cell table:style-name="TableRowCell" office:value-type="string">
            <text:p text:style-name="Table_20_Contents">Search</text:p>
          </table:table-cell>
          <table:table-cell table:style-name="TableRowCell" office:value-type="string">
            <text:p text:style-name="Table_20_Contents"><text:a xlink:type="simple" xlink:href="../../viewer/style/icons.less#L104" office:name=""><text:span text:style-name="Definition">search.svg</text:span></text:a></text:p>
          </table:table-cell>
          <table:table-cell table:style-name="TableRowCell" office:value-type="string">
            <text:p text:style-name="Table_20_Contents"><draw:frame draw:name="img309" svg:width="0.41667in" svg:height="0.4166666666666667in"><draw:image xlink:href="Pictures/308.svg" xlink:type="simple" xlink:show="embed" xlink:actuate="onLoad"/></draw:frame></text:p>
          </table:table-cell>
          <table:table-cell table:style-name="TableRowCell" office:value-type="string">
            <text:p text:style-name="Table_20_Contents">AisSearch</text:p>
          </table:table-cell>
        </table:table-row>
        <table:table-row>
          <table:table-cell table:style-name="TableRowCell" office:value-type="string">
            <text:p text:style-name="Table_20_Contents">Section</text:p>
          </table:table-cell>
          <table:table-cell table:style-name="TableRowCell" office:value-type="string">
            <text:p text:style-name="Table_20_Contents"><text:a xlink:type="simple" xlink:href="../../viewer/style/icons.less#L237" office:name=""><text:span text:style-name="Definition">category-200.svg</text:span></text:a></text:p>
          </table:table-cell>
          <table:table-cell table:style-name="TableRowCell" office:value-type="string">
            <text:p text:style-name="Table_20_Contents"><draw:frame draw:name="img310" svg:width="0.41667in" svg:height="0.4166666666666667in"><draw:image xlink:href="Pictures/309.svg" xlink:type="simple" xlink:show="embed" xlink:actuate="onLoad"/></draw:frame></text:p>
          </table:table-cell>
          <table:table-cell table:style-name="TableRowCell" office:value-type="string">
            <text:p text:style-name="Table_20_Contents">SectionView</text:p>
          </table:table-cell>
        </table:table-row>
        <table:table-row>
          <table:table-cell table:style-name="TableRowCell" office:value-type="string">
            <text:p text:style-name="Table_20_Contents">SelectChart</text:p>
          </table:table-cell>
          <table:table-cell table:style-name="TableRowCell" office:value-type="string">
            <text:p text:style-name="Table_20_Contents"><text:a xlink:type="simple" xlink:href="../../viewer/style/icons.less#L183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311" svg:width="0.41667in" svg:height="0.4166666666666667in"><draw:image xlink:href="Pictures/310.svg" xlink:type="simple" xlink:show="embed" xlink:actuate="onLoad"/></draw:frame></text:p>
          </table:table-cell>
          <table:table-cell table:style-name="TableRowCell" office:value-type="string">
            <text:p text:style-name="Table_20_Contents">NavOverlays</text:p>
          </table:table-cell>
        </table:table-row>
        <table:table-row>
          <table:table-cell table:style-name="TableRowCell" office:value-type="string">
            <text:p text:style-name="Table_20_Contents">Server</text:p>
          </table:table-cell>
          <table:table-cell table:style-name="TableRowCell" office:value-type="string">
            <text:p text:style-name="Table_20_Contents"><text:a xlink:type="simple" xlink:href="../../viewer/style/icons.less#L89" office:name=""><text:span text:style-name="Definition">database-200.svg</text:span></text:a></text:p>
          </table:table-cell>
          <table:table-cell table:style-name="TableRowCell" office:value-type="string">
            <text:p text:style-name="Table_20_Contents"><draw:frame draw:name="img312" svg:width="0.41667in" svg:height="0.4166666666666667in"><draw:image xlink:href="Pictures/311.svg" xlink:type="simple" xlink:show="embed" xlink:actuate="onLoad"/></draw:frame></text:p>
          </table:table-cell>
          <table:table-cell table:style-name="TableRowCell" office:value-type="string">
            <text:p text:style-name="Table_20_Contents">ServerView</text:p>
          </table:table-cell>
        </table:table-row>
        <table:table-row>
          <table:table-cell table:style-name="TableRowCell" office:value-type="string">
            <text:p text:style-name="Table_20_Contents">Settings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313" svg:width="0.41667in" svg:height="0.4166666666666667in"><draw:image xlink:href="Pictures/312.svg" xlink:type="simple" xlink:show="embed" xlink:actuate="onLoad"/></draw:frame></text:p>
          </table:table-cell>
          <table:table-cell table:style-name="TableRowCell" office:value-type="string">
            <text:p text:style-name="Table_20_Contents">ShowSettings,code</text:p>
          </table:table-cell>
        </table:table-row>
        <table:table-row>
          <table:table-cell table:style-name="TableRowCell" office:value-type="string">
            <text:p text:style-name="Table_20_Contents">Shutdown</text:p>
          </table:table-cell>
          <table:table-cell table:style-name="TableRowCell" office:value-type="string">
            <text:p text:style-name="Table_20_Contents"><text:a xlink:type="simple" xlink:href="../../viewer/style/icons.less#L228" office:name=""><text:span text:style-name="Definition">ic_power.svg</text:span></text:a></text:p>
          </table:table-cell>
          <table:table-cell table:style-name="TableRowCell" office:value-type="string">
            <text:p text:style-name="Table_20_Contents"><draw:frame draw:name="img314" svg:width="0.41667in" svg:height="0.4166666666666667in"><draw:image xlink:href="Pictures/313.svg" xlink:type="simple" xlink:show="embed" xlink:actuate="onLoad"/></draw:frame></text:p>
          </table:table-cell>
          <table:table-cell table:style-name="TableRowCell" office:value-type="string">
            <text:p text:style-name="Table_20_Contents">StatusShutdown</text:p>
          </table:table-cell>
        </table:table-row>
        <table:table-row>
          <table:table-cell table:style-name="TableRowCell" office:value-type="string">
            <text:p text:style-name="Table_20_Contents">Sort</text:p>
          </table:table-cell>
          <table:table-cell table:style-name="TableRowCell" office:value-type="string">
            <text:p text:style-name="Table_20_Contents"><text:a xlink:type="simple" xlink:href="../../viewer/style/icons.less#L98" office:name=""><text:span text:style-name="Definition">sort.svg</text:span></text:a></text:p>
          </table:table-cell>
          <table:table-cell table:style-name="TableRowCell" office:value-type="string">
            <text:p text:style-name="Table_20_Contents"><draw:frame draw:name="img315" svg:width="0.41667in" svg:height="0.4166666666666667in"><draw:image xlink:href="Pictures/314.svg" xlink:type="simple" xlink:show="embed" xlink:actuate="onLoad"/></draw:frame></text:p>
          </table:table-cell>
          <table:table-cell table:style-name="TableRowCell" office:value-type="string">
            <text:p text:style-name="Table_20_Contents">AisSort</text:p>
          </table:table-cell>
        </table:table-row>
        <table:table-row>
          <table:table-cell table:style-name="TableRowCell" office:value-type="string">
            <text:p text:style-name="Table_20_Contents">Split</text:p>
          </table:table-cell>
          <table:table-cell table:style-name="TableRowCell" office:value-type="string">
            <text:p text:style-name="Table_20_Contents"><text:a xlink:type="simple" xlink:href="../../viewer/style/icons.less#L128" office:name=""><text:span text:style-name="Definition">vertical_split.svg</text:span></text:a></text:p>
          </table:table-cell>
          <table:table-cell table:style-name="TableRowCell" office:value-type="string">
            <text:p text:style-name="Table_20_Contents"><draw:frame draw:name="img316" svg:width="0.41667in" svg:height="0.4166666666666667in"><draw:image xlink:href="Pictures/315.svg" xlink:type="simple" xlink:show="embed" xlink:actuate="onLoad"/></draw:frame></text:p>
          </table:table-cell>
          <table:table-cell table:style-name="TableRowCell" office:value-type="string">
            <text:p text:style-name="Table_20_Contents">Split</text:p>
          </table:table-cell>
        </table:table-row>
        <table:table-row>
          <table:table-cell table:style-name="TableRowCell" office:value-type="string">
            <text:p text:style-name="Table_20_Contents">SplitReset</text:p>
          </table:table-cell>
          <table:table-cell table:style-name="TableRowCell" office:value-type="string">
            <text:p text:style-name="Table_20_Contents"><text:a xlink:type="simple" xlink:href="../../viewer/style/icons.less#L243" office:name=""><text:span text:style-name="Definition">reset_split.svg</text:span></text:a></text:p>
          </table:table-cell>
          <table:table-cell table:style-name="TableRowCell" office:value-type="string">
            <text:p text:style-name="Table_20_Contents"><draw:frame draw:name="img317" svg:width="0.41667in" svg:height="0.4166666666666667in"><draw:image xlink:href="Pictures/316.svg" xlink:type="simple" xlink:show="embed" xlink:actuate="onLoad"/></draw:frame></text:p>
          </table:table-cell>
          <table:table-cell table:style-name="TableRowCell" office:value-type="string">
            <text:p text:style-name="Table_20_Contents">SettingsSplitReset</text:p>
          </table:table-cell>
        </table:table-row>
        <table:table-row>
          <table:table-cell table:style-name="TableRowCell" office:value-type="string">
            <text:p text:style-name="Table_20_Contents">Start</text:p>
          </table:table-cell>
          <table:table-cell table:style-name="TableRowCell" office:value-type="string">
            <text:p text:style-name="Table_20_Contents"><text:a xlink:type="simple" xlink:href="../../viewer/style/icons.less#L297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318" svg:width="0.41667in" svg:height="0.4166666666666667in"><draw:image xlink:href="Pictures/317.svg" xlink:type="simple" xlink:show="embed" xlink:actuate="onLoad"/></draw:frame></text:p>
          </table:table-cell>
          <table:table-cell table:style-name="TableRowCell" office:value-type="string">
            <text:p text:style-name="Table_20_Contents">DBCompute</text:p>
          </table:table-cell>
        </table:table-row>
        <table:table-row>
          <table:table-cell table:style-name="TableRowCell" office:value-type="string">
            <text:p text:style-name="Table_20_Contents">Stop</text:p>
          </table:table-cell>
          <table:table-cell table:style-name="TableRowCell" office:value-type="string">
            <text:p text:style-name="Table_20_Contents"><text:a xlink:type="simple" xlink:href="../../viewer/style/icons.less#L294" office:name=""><text:span text:style-name="Definition">stop_circle.svg</text:span></text:a></text:p>
          </table:table-cell>
          <table:table-cell table:style-name="TableRowCell" office:value-type="string">
            <text:p text:style-name="Table_20_Contents"><draw:frame draw:name="img319" svg:width="0.41667in" svg:height="0.4166666666666667in"><draw:image xlink:href="Pictures/318.svg" xlink:type="simple" xlink:show="embed" xlink:actuate="onLoad"/></draw:frame></text:p>
          </table:table-cell>
          <table:table-cell table:style-name="TableRowCell" office:value-type="string">
            <text:p text:style-name="Table_20_Contents">DBStop</text:p>
          </table:table-cell>
        </table:table-row>
        <table:table-row>
          <table:table-cell table:style-name="TableRowCell" office:value-type="string">
            <text:p text:style-name="Table_20_Contents">Sync</text:p>
          </table:table-cell>
          <table:table-cell table:style-name="TableRowCell" office:value-type="string">
            <text:p text:style-name="Table_20_Contents"><text:a xlink:type="simple" xlink:href="../../viewer/style/icons.less#L116" office:name=""><text:span text:style-name="Definition">sync.svg</text:span></text:a></text:p>
          </table:table-cell>
          <table:table-cell table:style-name="TableRowCell" office:value-type="string">
            <text:p text:style-name="Table_20_Contents"><draw:frame draw:name="img320" svg:width="0.41667in" svg:height="0.4166666666666667in"><draw:image xlink:href="Pictures/319.svg" xlink:type="simple" xlink:show="embed" xlink:actuate="onLoad"/></draw:frame></text:p>
          </table:table-cell>
          <table:table-cell table:style-name="TableRowCell" office:value-type="string">
            <text:p text:style-name="Table_20_Contents">SyncRoutes</text:p>
          </table:table-cell>
        </table:table-row>
        <table:table-row>
          <table:table-cell table:style-name="TableRowCell" office:value-type="string">
            <text:p text:style-name="Table_20_Contents">Track</text:p>
          </table:table-cell>
          <table:table-cell table:style-name="TableRowCell" office:value-type="string">
            <text:p text:style-name="Table_20_Contents"><text:a xlink:type="simple" xlink:href="../../viewer/style/icons.less#L34" office:name=""><text:span text:style-name="Definition">track.svg</text:span></text:a></text:p>
          </table:table-cell>
          <table:table-cell table:style-name="TableRowCell" office:value-type="string">
            <text:p text:style-name="Table_20_Contents"><draw:frame draw:name="img321" svg:width="0.41667in" svg:height="0.4166666666666667in"><draw:image xlink:href="Pictures/320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UnChecked</text:p>
          </table:table-cell>
          <table:table-cell table:style-name="TableRowCell" office:value-type="string">
            <text:p text:style-name="Table_20_Contents"><text:a xlink:type="simple" xlink:href="../../viewer/style/icons.less#L354" office:name=""><text:span text:style-name="Definition">checkbox-blank-outline.svg</text:span></text:a></text:p>
          </table:table-cell>
          <table:table-cell table:style-name="TableRowCell" office:value-type="string">
            <text:p text:style-name="Table_20_Contents"><draw:frame draw:name="img322" svg:width="0.41667in" svg:height="0.4166666666666667in"><draw:image xlink:href="Pictures/32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Undo</text:p>
          </table:table-cell>
          <table:table-cell table:style-name="TableRowCell" office:value-type="string">
            <text:p text:style-name="Table_20_Contents"><text:a xlink:type="simple" xlink:href="../../viewer/style/icons.less#L252" office:name=""><text:span text:style-name="Definition">ic_undo.svg</text:span></text:a></text:p>
          </table:table-cell>
          <table:table-cell table:style-name="TableRowCell" office:value-type="string">
            <text:p text:style-name="Table_20_Contents"><draw:frame draw:name="img323" svg:width="0.41667in" svg:height="0.4166666666666667in"><draw:image xlink:href="Pictures/322.svg" xlink:type="simple" xlink:show="embed" xlink:actuate="onLoad"/></draw:frame></text:p>
          </table:table-cell>
          <table:table-cell table:style-name="TableRowCell" office:value-type="string">
            <text:p text:style-name="Table_20_Contents">RevertLayout</text:p>
          </table:table-cell>
        </table:table-row>
        <table:table-row>
          <table:table-cell table:style-name="TableRowCell" office:value-type="string">
            <text:p text:style-name="Table_20_Contents">Upload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ic_file_upload.svg</text:span></text:a></text:p>
          </table:table-cell>
          <table:table-cell table:style-name="TableRowCell" office:value-type="string">
            <text:p text:style-name="Table_20_Contents"><draw:frame draw:name="img324" svg:width="0.41667in" svg:height="0.4166666666666667in"><draw:image xlink:href="Pictures/323.svg" xlink:type="simple" xlink:show="embed" xlink:actuate="onLoad"/></draw:frame></text:p>
          </table:table-cell>
          <table:table-cell table:style-name="TableRowCell" office:value-type="string">
            <text:p text:style-name="Table_20_Contents">Upload</text:p>
          </table:table-cell>
        </table:table-row>
        <table:table-row>
          <table:table-cell table:style-name="TableRowCell" office:value-type="string">
            <text:p text:style-name="Table_20_Contents">User</text:p>
          </table:table-cell>
          <table:table-cell table:style-name="TableRowCell" office:value-type="string">
            <text:p text:style-name="Table_20_Contents"><text:a xlink:type="simple" xlink:href="../../viewer/style/icons.less#L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325" svg:width="0.41667in" svg:height="0.4166666666666667in"><draw:image xlink:href="Pictures/324.svg" xlink:type="simple" xlink:show="embed" xlink:actuate="onLoad"/></draw:frame></text:p>
          </table:table-cell>
          <table:table-cell table:style-name="TableRowCell" office:value-type="string">
            <text:p text:style-name="Table_20_Contents">AddonConfigUser,code</text:p>
          </table:table-cell>
        </table:table-row>
        <table:table-row>
          <table:table-cell table:style-name="TableRowCell" office:value-type="string">
            <text:p text:style-name="Table_20_Contents">View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326" svg:width="0.41667in" svg:height="0.4166666666666667in"><draw:image xlink:href="Pictures/325.svg" xlink:type="simple" xlink:show="embed" xlink:actuate="onLoad"/></draw:frame></text:p>
          </table:table-cell>
          <table:table-cell table:style-name="TableRowCell" office:value-type="string">
            <text:p text:style-name="Table_20_Contents">DBPreview,DBView,code</text:p>
          </table:table-cell>
        </table:table-row>
        <table:table-row>
          <table:table-cell table:style-name="TableRowCell" office:value-type="string">
            <text:p text:style-name="Table_20_Contents">Waypoint</text:p>
          </table:table-cell>
          <table:table-cell table:style-name="TableRowCell" office:value-type="string">
            <text:p text:style-name="Table_20_Contents"><text:a xlink:type="simple" xlink:href="../../viewer/style/icons.less#L409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327" svg:width="0.41667in" svg:height="0.4166666666666667in"><draw:image xlink:href="Pictures/326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Wifi</text:p>
          </table:table-cell>
          <table:table-cell table:style-name="TableRowCell" office:value-type="string">
            <text:p text:style-name="Table_20_Contents"><text:a xlink:type="simple" xlink:href="../../viewer/style/icons.less#L216" office:name=""><text:span text:style-name="Definition">wifi.svg</text:span></text:a></text:p>
          </table:table-cell>
          <table:table-cell table:style-name="TableRowCell" office:value-type="string">
            <text:p text:style-name="Table_20_Contents"><draw:frame draw:name="img328" svg:width="0.41667in" svg:height="0.4166666666666667in"><draw:image xlink:href="Pictures/327.svg" xlink:type="simple" xlink:show="embed" xlink:actuate="onLoad"/></draw:frame></text:p>
          </table:table-cell>
          <table:table-cell table:style-name="TableRowCell" office:value-type="string">
            <text:p text:style-name="Table_20_Contents">StatusWpa,DBWpaEnable</text:p>
          </table:table-cell>
        </table:table-row>
        <table:table-row>
          <table:table-cell table:style-name="TableRowCell" office:value-type="string">
            <text:p text:style-name="Table_20_Contents">WifiOff</text:p>
          </table:table-cell>
          <table:table-cell table:style-name="TableRowCell" office:value-type="string">
            <text:p text:style-name="Table_20_Contents"><text:a xlink:type="simple" xlink:href="../../viewer/style/icons.less#L219" office:name=""><text:span text:style-name="Definition">wifi_off.svg</text:span></text:a></text:p>
          </table:table-cell>
          <table:table-cell table:style-name="TableRowCell" office:value-type="string">
            <text:p text:style-name="Table_20_Contents"><draw:frame draw:name="img329" svg:width="0.41667in" svg:height="0.4166666666666667in"><draw:image xlink:href="Pictures/328.svg" xlink:type="simple" xlink:show="embed" xlink:actuate="onLoad"/></draw:frame></text:p>
          </table:table-cell>
          <table:table-cell table:style-name="TableRowCell" office:value-type="string">
            <text:p text:style-name="Table_20_Contents">DBWpaDisable</text:p>
          </table:table-cell>
        </table:table-row>
        <table:table-row>
          <table:table-cell table:style-name="TableRowCell" office:value-type="string">
            <text:p text:style-name="Table_20_Contents">WpGoto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330" svg:width="0.41667in" svg:height="0.4166666666666667in"><draw:image xlink:href="Pictures/329.svg" xlink:type="simple" xlink:show="embed" xlink:actuate="onLoad"/></draw:frame></text:p>
          </table:table-cell>
          <table:table-cell table:style-name="TableRowCell" office:value-type="string">
            <text:p text:style-name="Table_20_Contents">WpGoto,NavRestart</text:p>
          </table:table-cell>
        </table:table-row>
        <table:table-row>
          <table:table-cell table:style-name="TableRowCell" office:value-type="string">
            <text:p text:style-name="Table_20_Contents">WpLocate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331" svg:width="0.41667in" svg:height="0.4166666666666667in"><draw:image xlink:href="Pictures/330.svg" xlink:type="simple" xlink:show="embed" xlink:actuate="onLoad"/></draw:frame></text:p>
          </table:table-cell>
          <table:table-cell table:style-name="TableRowCell" office:value-type="string">
            <text:p text:style-name="Table_20_Contents">WpLocate,NavToCenter</text:p>
          </table:table-cell>
        </table:table-row>
        <table:table-row>
          <table:table-cell table:style-name="TableRowCell" office:value-type="string">
            <text:p text:style-name="Table_20_Contents">WpNext</text:p>
          </table:table-cell>
          <table:table-cell table:style-name="TableRowCell" office:value-type="string">
            <text:p text:style-name="Table_20_Contents"><text:a xlink:type="simple" xlink:href="../../viewer/style/icons.less#L149" office:name=""><text:span text:style-name="Definition">ic_arrow_forward.svg</text:span></text:a></text:p>
          </table:table-cell>
          <table:table-cell table:style-name="TableRowCell" office:value-type="string">
            <text:p text:style-name="Table_20_Contents"><draw:frame draw:name="img332" svg:width="0.41667in" svg:height="0.4166666666666667in"><draw:image xlink:href="Pictures/331.svg" xlink:type="simple" xlink:show="embed" xlink:actuate="onLoad"/></draw:frame></text:p>
          </table:table-cell>
          <table:table-cell table:style-name="TableRowCell" office:value-type="string">
            <text:p text:style-name="Table_20_Contents">WpNext</text:p>
          </table:table-cell>
        </table:table-row>
        <table:table-row>
          <table:table-cell table:style-name="TableRowCell" office:value-type="string">
            <text:p text:style-name="Table_20_Contents">WpPrevious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333" svg:width="0.41667in" svg:height="0.4166666666666667in"><draw:image xlink:href="Pictures/332.svg" xlink:type="simple" xlink:show="embed" xlink:actuate="onLoad"/></draw:frame></text:p>
          </table:table-cell>
          <table:table-cell table:style-name="TableRowCell" office:value-type="string">
            <text:p text:style-name="Table_20_Contents">WpPrevious</text:p>
          </table:table-cell>
        </table:table-row>
        <table:table-row>
          <table:table-cell table:style-name="TableRowCell" office:value-type="string">
            <text:p text:style-name="Table_20_Contents">WpaConnect</text:p>
          </table:table-cell>
          <table:table-cell table:style-name="TableRowCell" office:value-type="string">
            <text:p text:style-name="Table_20_Contents"><text:a xlink:type="simple" xlink:href="../../viewer/style/icons.less#L314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334" svg:width="0.41667in" svg:height="0.4166666666666667in"><draw:image xlink:href="Pictures/333.svg" xlink:type="simple" xlink:show="embed" xlink:actuate="onLoad"/></draw:frame></text:p>
          </table:table-cell>
          <table:table-cell table:style-name="TableRowCell" office:value-type="string">
            <text:p text:style-name="Table_20_Contents">DBWpaConnect</text:p>
          </table:table-cell>
        </table:table-row>
        <table:table-row>
          <table:table-cell table:style-name="TableRowCell" office:value-type="string">
            <text:p text:style-name="Table_20_Contents">ZoomIn</text:p>
          </table:table-cell>
          <table:table-cell table:style-name="TableRowCell" office:value-type="string">
            <text:p text:style-name="Table_20_Contents"><text:a xlink:type="simple" xlink:href="../../viewer/style/icons.less#L186" office:name=""><text:span text:style-name="Definition">ic_zoom_in.svg</text:span></text:a></text:p>
          </table:table-cell>
          <table:table-cell table:style-name="TableRowCell" office:value-type="string">
            <text:p text:style-name="Table_20_Contents"><draw:frame draw:name="img335" svg:width="0.41667in" svg:height="0.4166666666666667in"><draw:image xlink:href="Pictures/334.svg" xlink:type="simple" xlink:show="embed" xlink:actuate="onLoad"/></draw:frame></text:p>
          </table:table-cell>
          <table:table-cell table:style-name="TableRowCell" office:value-type="string">
            <text:p text:style-name="Table_20_Contents">ZoomIn</text:p>
          </table:table-cell>
        </table:table-row>
        <table:table-row>
          <table:table-cell table:style-name="TableRowCell" office:value-type="string">
            <text:p text:style-name="Table_20_Contents">ZoomOut</text:p>
          </table:table-cell>
          <table:table-cell table:style-name="TableRowCell" office:value-type="string">
            <text:p text:style-name="Table_20_Contents"><text:a xlink:type="simple" xlink:href="../../viewer/style/icons.less#L189" office:name=""><text:span text:style-name="Definition">ic_zoom_out.svg</text:span></text:a></text:p>
          </table:table-cell>
          <table:table-cell table:style-name="TableRowCell" office:value-type="string">
            <text:p text:style-name="Table_20_Contents"><draw:frame draw:name="img336" svg:width="0.41667in" svg:height="0.4166666666666667in"><draw:image xlink:href="Pictures/335.svg" xlink:type="simple" xlink:show="embed" xlink:actuate="onLoad"/></draw:frame></text:p>
          </table:table-cell>
          <table:table-cell table:style-name="TableRowCell" office:value-type="string">
            <text:p text:style-name="Table_20_Contents">ZoomOut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5-13T18:09:07Z</meta:creation-date>
    <dc:date>2026-05-13T18:09:07Z</dc:date>
  </office:meta>
</office:document-meta>
</file>