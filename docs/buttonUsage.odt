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197.svg"/>
  <manifest:file-entry manifest:media-type="image/svg+xml" manifest:full-path="Pictures/196.svg"/>
  <manifest:file-entry manifest:media-type="image/svg+xml" manifest:full-path="Pictures/195.svg"/>
  <manifest:file-entry manifest:media-type="image/svg+xml" manifest:full-path="Pictures/194.svg"/>
  <manifest:file-entry manifest:media-type="image/svg+xml" manifest:full-path="Pictures/193.svg"/>
  <manifest:file-entry manifest:media-type="image/svg+xml" manifest:full-path="Pictures/192.svg"/>
  <manifest:file-entry manifest:media-type="image/svg+xml" manifest:full-path="Pictures/191.svg"/>
  <manifest:file-entry manifest:media-type="image/svg+xml" manifest:full-path="Pictures/190.svg"/>
  <manifest:file-entry manifest:media-type="image/svg+xml" manifest:full-path="Pictures/189.svg"/>
  <manifest:file-entry manifest:media-type="image/svg+xml" manifest:full-path="Pictures/188.svg"/>
  <manifest:file-entry manifest:media-type="image/svg+xml" manifest:full-path="Pictures/187.svg"/>
  <manifest:file-entry manifest:media-type="image/svg+xml" manifest:full-path="Pictures/186.svg"/>
  <manifest:file-entry manifest:media-type="image/svg+xml" manifest:full-path="Pictures/185.svg"/>
  <manifest:file-entry manifest:media-type="image/svg+xml" manifest:full-path="Pictures/184.svg"/>
  <manifest:file-entry manifest:media-type="image/svg+xml" manifest:full-path="Pictures/183.svg"/>
  <manifest:file-entry manifest:media-type="image/svg+xml" manifest:full-path="Pictures/182.svg"/>
  <manifest:file-entry manifest:media-type="image/svg+xml" manifest:full-path="Pictures/181.svg"/>
  <manifest:file-entry manifest:media-type="image/svg+xml" manifest:full-path="Pictures/180.svg"/>
  <manifest:file-entry manifest:media-type="image/svg+xml" manifest:full-path="Pictures/179.svg"/>
  <manifest:file-entry manifest:media-type="image/svg+xml" manifest:full-path="Pictures/178.svg"/>
  <manifest:file-entry manifest:media-type="image/svg+xml" manifest:full-path="Pictures/177.svg"/>
  <manifest:file-entry manifest:media-type="image/svg+xml" manifest:full-path="Pictures/176.svg"/>
  <manifest:file-entry manifest:media-type="image/svg+xml" manifest:full-path="Pictures/175.svg"/>
  <manifest:file-entry manifest:media-type="image/svg+xml" manifest:full-path="Pictures/174.svg"/>
  <manifest:file-entry manifest:media-type="image/svg+xml" manifest:full-path="Pictures/173.svg"/>
  <manifest:file-entry manifest:media-type="image/svg+xml" manifest:full-path="Pictures/172.svg"/>
  <manifest:file-entry manifest:media-type="image/svg+xml" manifest:full-path="Pictures/171.svg"/>
  <manifest:file-entry manifest:media-type="image/svg+xml" manifest:full-path="Pictures/170.svg"/>
  <manifest:file-entry manifest:media-type="image/svg+xml" manifest:full-path="Pictures/169.svg"/>
  <manifest:file-entry manifest:media-type="image/svg+xml" manifest:full-path="Pictures/168.svg"/>
  <manifest:file-entry manifest:media-type="image/svg+xml" manifest:full-path="Pictures/167.svg"/>
  <manifest:file-entry manifest:media-type="image/svg+xml" manifest:full-path="Pictures/166.svg"/>
  <manifest:file-entry manifest:media-type="image/svg+xml" manifest:full-path="Pictures/165.svg"/>
  <manifest:file-entry manifest:media-type="image/svg+xml" manifest:full-path="Pictures/164.svg"/>
  <manifest:file-entry manifest:media-type="image/svg+xml" manifest:full-path="Pictures/163.svg"/>
  <manifest:file-entry manifest:media-type="image/svg+xml" manifest:full-path="Pictures/162.svg"/>
  <manifest:file-entry manifest:media-type="image/svg+xml" manifest:full-path="Pictures/161.svg"/>
  <manifest:file-entry manifest:media-type="image/svg+xml" manifest:full-path="Pictures/160.svg"/>
  <manifest:file-entry manifest:media-type="image/svg+xml" manifest:full-path="Pictures/159.svg"/>
  <manifest:file-entry manifest:media-type="image/svg+xml" manifest:full-path="Pictures/158.svg"/>
  <manifest:file-entry manifest:media-type="image/svg+xml" manifest:full-path="Pictures/157.svg"/>
  <manifest:file-entry manifest:media-type="image/svg+xml" manifest:full-path="Pictures/156.svg"/>
  <manifest:file-entry manifest:media-type="image/svg+xml" manifest:full-path="Pictures/155.svg"/>
  <manifest:file-entry manifest:media-type="image/svg+xml" manifest:full-path="Pictures/154.svg"/>
  <manifest:file-entry manifest:media-type="image/svg+xml" manifest:full-path="Pictures/153.svg"/>
  <manifest:file-entry manifest:media-type="image/svg+xml" manifest:full-path="Pictures/152.svg"/>
  <manifest:file-entry manifest:media-type="image/svg+xml" manifest:full-path="Pictures/151.svg"/>
  <manifest:file-entry manifest:media-type="image/svg+xml" manifest:full-path="Pictures/150.svg"/>
  <manifest:file-entry manifest:media-type="image/svg+xml" manifest:full-path="Pictures/149.svg"/>
  <manifest:file-entry manifest:media-type="image/svg+xml" manifest:full-path="Pictures/148.svg"/>
  <manifest:file-entry manifest:media-type="image/svg+xml" manifest:full-path="Pictures/147.svg"/>
  <manifest:file-entry manifest:media-type="image/svg+xml" manifest:full-path="Pictures/146.svg"/>
  <manifest:file-entry manifest:media-type="image/svg+xml" manifest:full-path="Pictures/145.svg"/>
  <manifest:file-entry manifest:media-type="image/svg+xml" manifest:full-path="Pictures/144.svg"/>
  <manifest:file-entry manifest:media-type="image/svg+xml" manifest:full-path="Pictures/143.svg"/>
  <manifest:file-entry manifest:media-type="image/svg+xml" manifest:full-path="Pictures/142.svg"/>
  <manifest:file-entry manifest:media-type="image/svg+xml" manifest:full-path="Pictures/141.svg"/>
  <manifest:file-entry manifest:media-type="image/svg+xml" manifest:full-path="Pictures/140.svg"/>
  <manifest:file-entry manifest:media-type="image/svg+xml" manifest:full-path="Pictures/139.svg"/>
  <manifest:file-entry manifest:media-type="image/svg+xml" manifest:full-path="Pictures/138.svg"/>
  <manifest:file-entry manifest:media-type="image/svg+xml" manifest:full-path="Pictures/137.svg"/>
  <manifest:file-entry manifest:media-type="image/svg+xml" manifest:full-path="Pictures/136.svg"/>
  <manifest:file-entry manifest:media-type="image/svg+xml" manifest:full-path="Pictures/135.svg"/>
  <manifest:file-entry manifest:media-type="image/svg+xml" manifest:full-path="Pictures/134.svg"/>
  <manifest:file-entry manifest:media-type="image/svg+xml" manifest:full-path="Pictures/133.svg"/>
  <manifest:file-entry manifest:media-type="image/svg+xml" manifest:full-path="Pictures/132.svg"/>
  <manifest:file-entry manifest:media-type="image/svg+xml" manifest:full-path="Pictures/131.svg"/>
  <manifest:file-entry manifest:media-type="image/svg+xml" manifest:full-path="Pictures/130.svg"/>
  <manifest:file-entry manifest:media-type="image/svg+xml" manifest:full-path="Pictures/129.svg"/>
  <manifest:file-entry manifest:media-type="image/svg+xml" manifest:full-path="Pictures/128.svg"/>
  <manifest:file-entry manifest:media-type="image/svg+xml" manifest:full-path="Pictures/127.svg"/>
  <manifest:file-entry manifest:media-type="image/svg+xml" manifest:full-path="Pictures/126.svg"/>
  <manifest:file-entry manifest:media-type="image/svg+xml" manifest:full-path="Pictures/125.svg"/>
  <manifest:file-entry manifest:media-type="image/svg+xml" manifest:full-path="Pictures/124.svg"/>
  <manifest:file-entry manifest:media-type="image/svg+xml" manifest:full-path="Pictures/123.svg"/>
  <manifest:file-entry manifest:media-type="image/svg+xml" manifest:full-path="Pictures/122.svg"/>
  <manifest:file-entry manifest:media-type="image/svg+xml" manifest:full-path="Pictures/121.svg"/>
  <manifest:file-entry manifest:media-type="image/svg+xml" manifest:full-path="Pictures/120.svg"/>
  <manifest:file-entry manifest:media-type="image/svg+xml" manifest:full-path="Pictures/119.svg"/>
  <manifest:file-entry manifest:media-type="image/svg+xml" manifest:full-path="Pictures/118.svg"/>
  <manifest:file-entry manifest:media-type="image/svg+xml" manifest:full-path="Pictures/117.svg"/>
  <manifest:file-entry manifest:media-type="image/svg+xml" manifest:full-path="Pictures/116.svg"/>
  <manifest:file-entry manifest:media-type="image/svg+xml" manifest:full-path="Pictures/115.svg"/>
  <manifest:file-entry manifest:media-type="image/svg+xml" manifest:full-path="Pictures/114.svg"/>
  <manifest:file-entry manifest:media-type="image/svg+xml" manifest:full-path="Pictures/113.svg"/>
  <manifest:file-entry manifest:media-type="image/svg+xml" manifest:full-path="Pictures/112.svg"/>
  <manifest:file-entry manifest:media-type="image/svg+xml" manifest:full-path="Pictures/111.svg"/>
  <manifest:file-entry manifest:media-type="image/svg+xml" manifest:full-path="Pictures/110.svg"/>
  <manifest:file-entry manifest:media-type="image/svg+xml" manifest:full-path="Pictures/109.svg"/>
  <manifest:file-entry manifest:media-type="image/svg+xml" manifest:full-path="Pictures/108.svg"/>
  <manifest:file-entry manifest:media-type="image/svg+xml" manifest:full-path="Pictures/107.svg"/>
  <manifest:file-entry manifest:media-type="image/svg+xml" manifest:full-path="Pictures/106.svg"/>
  <manifest:file-entry manifest:media-type="image/svg+xml" manifest:full-path="Pictures/105.svg"/>
  <manifest:file-entry manifest:media-type="image/svg+xml" manifest:full-path="Pictures/104.svg"/>
  <manifest:file-entry manifest:media-type="image/svg+xml" manifest:full-path="Pictures/103.svg"/>
  <manifest:file-entry manifest:media-type="image/svg+xml" manifest:full-path="Pictures/102.svg"/>
  <manifest:file-entry manifest:media-type="image/svg+xml" manifest:full-path="Pictures/101.svg"/>
  <manifest:file-entry manifest:media-type="image/svg+xml" manifest:full-path="Pictures/100.svg"/>
  <manifest:file-entry manifest:media-type="image/svg+xml" manifest:full-path="Pictures/99.svg"/>
  <manifest:file-entry manifest:media-type="image/svg+xml" manifest:full-path="Pictures/98.svg"/>
  <manifest:file-entry manifest:media-type="image/svg+xml" manifest:full-path="Pictures/97.svg"/>
  <manifest:file-entry manifest:media-type="image/svg+xml" manifest:full-path="Pictures/96.svg"/>
  <manifest:file-entry manifest:media-type="image/svg+xml" manifest:full-path="Pictures/95.svg"/>
  <manifest:file-entry manifest:media-type="image/svg+xml" manifest:full-path="Pictures/94.svg"/>
  <manifest:file-entry manifest:media-type="image/svg+xml" manifest:full-path="Pictures/93.svg"/>
  <manifest:file-entry manifest:media-type="image/svg+xml" manifest:full-path="Pictures/92.svg"/>
  <manifest:file-entry manifest:media-type="image/svg+xml" manifest:full-path="Pictures/91.svg"/>
  <manifest:file-entry manifest:media-type="image/svg+xml" manifest:full-path="Pictures/90.svg"/>
  <manifest:file-entry manifest:media-type="image/svg+xml" manifest:full-path="Pictures/89.svg"/>
  <manifest:file-entry manifest:media-type="image/svg+xml" manifest:full-path="Pictures/88.svg"/>
  <manifest:file-entry manifest:media-type="image/svg+xml" manifest:full-path="Pictures/87.svg"/>
  <manifest:file-entry manifest:media-type="image/svg+xml" manifest:full-path="Pictures/86.svg"/>
  <manifest:file-entry manifest:media-type="image/svg+xml" manifest:full-path="Pictures/85.svg"/>
  <manifest:file-entry manifest:media-type="image/svg+xml" manifest:full-path="Pictures/84.svg"/>
  <manifest:file-entry manifest:media-type="image/svg+xml" manifest:full-path="Pictures/83.svg"/>
  <manifest:file-entry manifest:media-type="image/svg+xml" manifest:full-path="Pictures/82.svg"/>
  <manifest:file-entry manifest:media-type="image/svg+xml" manifest:full-path="Pictures/81.svg"/>
  <manifest:file-entry manifest:media-type="image/svg+xml" manifest:full-path="Pictures/80.svg"/>
  <manifest:file-entry manifest:media-type="image/svg+xml" manifest:full-path="Pictures/79.svg"/>
  <manifest:file-entry manifest:media-type="image/svg+xml" manifest:full-path="Pictures/78.svg"/>
  <manifest:file-entry manifest:media-type="image/svg+xml" manifest:full-path="Pictures/77.svg"/>
  <manifest:file-entry manifest:media-type="image/svg+xml" manifest:full-path="Pictures/76.svg"/>
  <manifest:file-entry manifest:media-type="image/svg+xml" manifest:full-path="Pictures/75.svg"/>
  <manifest:file-entry manifest:media-type="image/svg+xml" manifest:full-path="Pictures/74.svg"/>
  <manifest:file-entry manifest:media-type="image/svg+xml" manifest:full-path="Pictures/73.svg"/>
  <manifest:file-entry manifest:media-type="image/svg+xml" manifest:full-path="Pictures/72.svg"/>
  <manifest:file-entry manifest:media-type="image/svg+xml" manifest:full-path="Pictures/71.svg"/>
  <manifest:file-entry manifest:media-type="image/svg+xml" manifest:full-path="Pictures/70.svg"/>
  <manifest:file-entry manifest:media-type="image/svg+xml" manifest:full-path="Pictures/69.svg"/>
  <manifest:file-entry manifest:media-type="image/svg+xml" manifest:full-path="Pictures/68.svg"/>
  <manifest:file-entry manifest:media-type="image/svg+xml" manifest:full-path="Pictures/67.svg"/>
  <manifest:file-entry manifest:media-type="image/svg+xml" manifest:full-path="Pictures/66.svg"/>
  <manifest:file-entry manifest:media-type="image/svg+xml" manifest:full-path="Pictures/65.svg"/>
  <manifest:file-entry manifest:media-type="image/svg+xml" manifest:full-path="Pictures/64.svg"/>
  <manifest:file-entry manifest:media-type="image/svg+xml" manifest:full-path="Pictures/63.svg"/>
  <manifest:file-entry manifest:media-type="image/svg+xml" manifest:full-path="Pictures/62.svg"/>
  <manifest:file-entry manifest:media-type="image/svg+xml" manifest:full-path="Pictures/61.svg"/>
  <manifest:file-entry manifest:media-type="image/svg+xml" manifest:full-path="Pictures/60.svg"/>
  <manifest:file-entry manifest:media-type="image/svg+xml" manifest:full-path="Pictures/59.svg"/>
  <manifest:file-entry manifest:media-type="image/svg+xml" manifest:full-path="Pictures/58.svg"/>
  <manifest:file-entry manifest:media-type="image/svg+xml" manifest:full-path="Pictures/57.svg"/>
  <manifest:file-entry manifest:media-type="image/svg+xml" manifest:full-path="Pictures/56.svg"/>
  <manifest:file-entry manifest:media-type="image/svg+xml" manifest:full-path="Pictures/55.svg"/>
  <manifest:file-entry manifest:media-type="image/svg+xml" manifest:full-path="Pictures/54.svg"/>
  <manifest:file-entry manifest:media-type="image/svg+xml" manifest:full-path="Pictures/53.svg"/>
  <manifest:file-entry manifest:media-type="image/svg+xml" manifest:full-path="Pictures/52.svg"/>
  <manifest:file-entry manifest:media-type="image/svg+xml" manifest:full-path="Pictures/51.svg"/>
  <manifest:file-entry manifest:media-type="image/svg+xml" manifest:full-path="Pictures/50.svg"/>
  <manifest:file-entry manifest:media-type="image/svg+xml" manifest:full-path="Pictures/49.svg"/>
  <manifest:file-entry manifest:media-type="image/svg+xml" manifest:full-path="Pictures/48.svg"/>
  <manifest:file-entry manifest:media-type="image/svg+xml" manifest:full-path="Pictures/47.svg"/>
  <manifest:file-entry manifest:media-type="image/svg+xml" manifest:full-path="Pictures/46.svg"/>
  <manifest:file-entry manifest:media-type="image/svg+xml" manifest:full-path="Pictures/45.svg"/>
  <manifest:file-entry manifest:media-type="image/svg+xml" manifest:full-path="Pictures/44.svg"/>
  <manifest:file-entry manifest:media-type="image/svg+xml" manifest:full-path="Pictures/43.svg"/>
  <manifest:file-entry manifest:media-type="image/svg+xml" manifest:full-path="Pictures/42.svg"/>
  <manifest:file-entry manifest:media-type="image/svg+xml" manifest:full-path="Pictures/41.svg"/>
  <manifest:file-entry manifest:media-type="image/svg+xml" manifest:full-path="Pictures/40.svg"/>
  <manifest:file-entry manifest:media-type="image/svg+xml" manifest:full-path="Pictures/39.svg"/>
  <manifest:file-entry manifest:media-type="image/svg+xml" manifest:full-path="Pictures/38.svg"/>
  <manifest:file-entry manifest:media-type="image/svg+xml" manifest:full-path="Pictures/37.svg"/>
  <manifest:file-entry manifest:media-type="image/svg+xml" manifest:full-path="Pictures/36.svg"/>
  <manifest:file-entry manifest:media-type="image/svg+xml" manifest:full-path="Pictures/35.svg"/>
  <manifest:file-entry manifest:media-type="image/svg+xml" manifest:full-path="Pictures/34.svg"/>
  <manifest:file-entry manifest:media-type="image/svg+xml" manifest:full-path="Pictures/33.svg"/>
  <manifest:file-entry manifest:media-type="image/svg+xml" manifest:full-path="Pictures/32.svg"/>
  <manifest:file-entry manifest:media-type="image/svg+xml" manifest:full-path="Pictures/31.svg"/>
  <manifest:file-entry manifest:media-type="image/svg+xml" manifest:full-path="Pictures/30.svg"/>
  <manifest:file-entry manifest:media-type="image/svg+xml" manifest:full-path="Pictures/29.svg"/>
  <manifest:file-entry manifest:media-type="image/svg+xml" manifest:full-path="Pictures/28.svg"/>
  <manifest:file-entry manifest:media-type="image/svg+xml" manifest:full-path="Pictures/27.svg"/>
  <manifest:file-entry manifest:media-type="image/svg+xml" manifest:full-path="Pictures/26.svg"/>
  <manifest:file-entry manifest:media-type="image/svg+xml" manifest:full-path="Pictures/25.svg"/>
  <manifest:file-entry manifest:media-type="image/svg+xml" manifest:full-path="Pictures/24.svg"/>
  <manifest:file-entry manifest:media-type="image/svg+xml" manifest:full-path="Pictures/23.svg"/>
  <manifest:file-entry manifest:media-type="image/svg+xml" manifest:full-path="Pictures/22.svg"/>
  <manifest:file-entry manifest:media-type="image/svg+xml" manifest:full-path="Pictures/21.svg"/>
  <manifest:file-entry manifest:media-type="image/svg+xml" manifest:full-path="Pictures/20.svg"/>
  <manifest:file-entry manifest:media-type="image/svg+xml" manifest:full-path="Pictures/19.svg"/>
  <manifest:file-entry manifest:media-type="image/svg+xml" manifest:full-path="Pictures/18.svg"/>
  <manifest:file-entry manifest:media-type="image/svg+xml" manifest:full-path="Pictures/17.svg"/>
  <manifest:file-entry manifest:media-type="image/svg+xml" manifest:full-path="Pictures/16.svg"/>
  <manifest:file-entry manifest:media-type="image/svg+xml" manifest:full-path="Pictures/15.svg"/>
  <manifest:file-entry manifest:media-type="image/svg+xml" manifest:full-path="Pictures/14.svg"/>
  <manifest:file-entry manifest:media-type="image/svg+xml" manifest:full-path="Pictures/13.svg"/>
  <manifest:file-entry manifest:media-type="image/svg+xml" manifest:full-path="Pictures/12.svg"/>
  <manifest:file-entry manifest:media-type="image/svg+xml" manifest:full-path="Pictures/11.svg"/>
  <manifest:file-entry manifest:media-type="image/svg+xml" manifest:full-path="Pictures/10.svg"/>
  <manifest:file-entry manifest:media-type="image/svg+xml" manifest:full-path="Pictures/9.svg"/>
  <manifest:file-entry manifest:media-type="image/svg+xml" manifest:full-path="Pictures/8.svg"/>
  <manifest:file-entry manifest:media-type="image/svg+xml" manifest:full-path="Pictures/7.svg"/>
  <manifest:file-entry manifest:media-type="image/svg+xml" manifest:full-path="Pictures/6.svg"/>
  <manifest:file-entry manifest:media-type="image/svg+xml" manifest:full-path="Pictures/5.svg"/>
  <manifest:file-entry manifest:media-type="image/svg+xml" manifest:full-path="Pictures/4.svg"/>
  <manifest:file-entry manifest:media-type="image/svg+xml" manifest:full-path="Pictures/3.svg"/>
  <manifest:file-entry manifest:media-type="image/svg+xml" manifest:full-path="Pictures/2.svg"/>
  <manifest:file-entry manifest:media-type="image/svg+xml" manifest:full-path="Pictures/1.svg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9362*"/>
    </style:style>
    <style:style style:name="Table1.B" style:family="table-column">
      <style:table-column-properties style:rel-column-width="9362*"/>
    </style:style>
    <style:style style:name="Table1.C" style:family="table-column">
      <style:table-column-properties style:rel-column-width="9362*"/>
    </style:style>
    <style:style style:name="Table1.D" style:family="table-column">
      <style:table-column-properties style:rel-column-width="9362*"/>
    </style:style>
    <style:style style:name="Table1.E" style:family="table-column">
      <style:table-column-properties style:rel-column-width="9362*"/>
    </style:style>
    <style:style style:name="Table1.F" style:family="table-column">
      <style:table-column-properties style:rel-column-width="9362*"/>
    </style:style>
    <style:style style:name="Table1.G" style:family="table-column">
      <style:table-column-properties style:rel-column-width="936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6383*"/>
    </style:style>
    <style:style style:name="Table2.B" style:family="table-column">
      <style:table-column-properties style:rel-column-width="16383*"/>
    </style:style>
    <style:style style:name="Table2.C" style:family="table-column">
      <style:table-column-properties style:rel-column-width="16383*"/>
    </style:style>
    <style:style style:name="Table2.D" style:family="table-column">
      <style:table-column-properties style:rel-column-width="16383*"/>
    </style:style>
  </office:automatic-styles>
  <office:body>
    <office:text>
      <text:h text:style-name="Heading_20_1" text:outline-level="1"><text:bookmark-start text:name="buttons"/>Buttons<text:bookmark-end text:name="buttons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File</text:p>
            </table:table-cell>
            <table:table-cell table:style-name="TableHeaderRowCell" office:value-type="string">
              <text:p text:style-name="Table_20_Heading">IconNam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shortText</text:p>
            </table:table-cell>
            <table:table-cell table:style-name="TableHeaderRowCell" office:value-type="string">
              <text:p text:style-name="Table_20_Heading">longTex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components/ButtonDefs.ts#L44" office:name=""><text:span text:style-name="Definition"><text:span text:style-name="T1">AddonConfigAddOn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1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1" svg:width="0.41667in" svg:height="0.4166666666666667in"><draw:image xlink:href="Pictures/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" office:name=""><text:span text:style-name="Definition">Conf</text:span></text:a></text:p>
          </table:table-cell>
          <table:table-cell table:style-name="TableRowCell" office:value-type="string">
            <text:p text:style-name="Table_20_Contents">configure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" office:name=""><text:span text:style-name="Definition"><text:span text:style-name="T1">AddonConfigImage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7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Images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2" svg:width="0.41667in" svg:height="0.4166666666666667in"><draw:image xlink:href="Pictures/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" office:name=""><text:span text:style-name="Definition">Images</text:span></text:a></text:p>
          </table:table-cell>
          <table:table-cell table:style-name="TableRowCell" office:value-type="string">
            <text:p text:style-name="Table_20_Contents">image/icon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" office:name=""><text:span text:style-name="Definition"><text:span text:style-name="T1">AddonConfigPlu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40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3" svg:width="0.41667in" svg:height="0.4166666666666667in"><draw:image xlink:href="Pictures/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" office:name=""><text:span text:style-name="Definition">Add</text:span></text:a></text:p>
          </table:table-cell>
          <table:table-cell table:style-name="TableRowCell" office:value-type="string">
            <text:p text:style-name="Table_20_Contents">add user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" office:name=""><text:span text:style-name="Definition"><text:span text:style-name="T1">AddonConfigU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4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User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4" svg:width="0.41667in" svg:height="0.4166666666666667in"><draw:image xlink:href="Pictures/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" office:name=""><text:span text:style-name="Definition">User</text:span></text:a></text:p>
          </table:table-cell>
          <table:table-cell table:style-name="TableRowCell" office:value-type="string">
            <text:p text:style-name="Table_20_Contents">user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6" office:name=""><text:span text:style-name="Definition"><text:span text:style-name="T1">AisInfo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53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AisInfoHide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5" svg:width="0.41667in" svg:height="0.4166666666666667in"><draw:image xlink:href="Pictures/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0" office:name=""><text:span text:style-name="Definition">Hide</text:span></text:a></text:p>
          </table:table-cell>
          <table:table-cell table:style-name="TableRowCell" office:value-type="string">
            <text:p text:style-name="Table_20_Contents">hide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2" office:name=""><text:span text:style-name="Definition"><text:span text:style-name="T1">AisInfoLoc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39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6" svg:width="0.41667in" svg:height="0.4166666666666667in"><draw:image xlink:href="Pictures/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7" office:name=""><text:span text:style-name="Definition">Locate</text:span></text:a></text:p>
          </table:table-cell>
          <table:table-cell table:style-name="TableRowCell" office:value-type="string">
            <text:p text:style-name="Table_20_Contents">center to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<text:span text:style-name="T1">Ai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3" office:name=""><text:span text:style-name="Definition">gui/AisCfg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7" svg:width="0.41667in" svg:height="0.4166666666666667in"><draw:image xlink:href="Pictures/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4" office:name=""><text:span text:style-name="Definition">Targets</text:span></text:a></text:p>
          </table:table-cell>
          <table:table-cell table:style-name="TableRowCell" office:value-type="string">
            <text:p text:style-name="Table_20_Contents">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AisItems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72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0" office:name=""><text:span text:style-name="Definition"><text:span text:style-name="T1">AisLock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9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Lock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update_disabled.svg</text:span></text:a></text:p>
          </table:table-cell>
          <table:table-cell table:style-name="TableRowCell" office:value-type="string">
            <text:p text:style-name="Table_20_Contents"><draw:frame draw:name="img8" svg:width="0.41667in" svg:height="0.4166666666666667in"><draw:image xlink:href="Pictures/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8" office:name=""><text:span text:style-name="Definition">Pause</text:span></text:a></text:p>
          </table:table-cell>
          <table:table-cell table:style-name="TableRowCell" office:value-type="string">
            <text:p text:style-name="Table_20_Contents">pause upda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<text:span text:style-name="T1">AisNeares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0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AisNearest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ais-nearest.svg</text:span></text:a></text:p>
          </table:table-cell>
          <table:table-cell table:style-name="TableRowCell" office:value-type="string">
            <text:p text:style-name="Table_20_Contents"><draw:frame draw:name="img9" svg:width="0.41667in" svg:height="0.4166666666666667in"><draw:image xlink:href="Pictures/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2" office:name=""><text:span text:style-name="Definition">Nearest</text:span></text:a></text:p>
          </table:table-cell>
          <table:table-cell table:style-name="TableRowCell" office:value-type="string">
            <text:p text:style-name="Table_20_Contents">nearest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AisNearest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28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<text:span text:style-name="T1">AisSearch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45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earch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search.svg</text:span></text:a></text:p>
          </table:table-cell>
          <table:table-cell table:style-name="TableRowCell" office:value-type="string">
            <text:p text:style-name="Table_20_Contents"><draw:frame draw:name="img10" svg:width="0.41667in" svg:height="0.4166666666666667in"><draw:image xlink:href="Pictures/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1" office:name=""><text:span text:style-name="Definition">Search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6" office:name=""><text:span text:style-name="Definition"><text:span text:style-name="T1">AisSor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4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ort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sort.svg</text:span></text:a></text:p>
          </table:table-cell>
          <table:table-cell table:style-name="TableRowCell" office:value-type="string">
            <text:p text:style-name="Table_20_Contents"><draw:frame draw:name="img11" svg:width="0.41667in" svg:height="0.4166666666666667in"><draw:image xlink:href="Pictures/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5" office:name=""><text:span text:style-name="Definition">So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1" office:name=""><text:span text:style-name="Definition"><text:span text:style-name="T1">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81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Anchor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2" svg:width="0.41667in" svg:height="0.4166666666666667in"><draw:image xlink:href="Pictures/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2" office:name=""><text:span text:style-name="Definition">Anchor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9" office:name=""><text:span text:style-name="Definition"><text:span text:style-name="T1">Android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Browser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3" svg:width="0.41667in" svg:height="0.4166666666666667in"><draw:image xlink:href="Pictures/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5" office:name=""><text:span text:style-name="Definition">Browser</text:span></text:a></text:p>
          </table:table-cell>
          <table:table-cell table:style-name="TableRowCell" office:value-type="string">
            <text:p text:style-name="Table_20_Contents">external brows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" office:name=""><text:span text:style-name="Definition"><text:span text:style-name="T1">Back</text:span></text:span></text:a></text:p>
          </table:table-cell>
          <table:table-cell table:style-name="TableRowCell" office:value-type="string">
            <text:p text:style-name="Table_20_Contents"><text:a xlink:type="simple" xlink:href="../../viewer/gui/AddOnPageButtons.ts#L29" office:name=""><text:span text:style-name="Definition">gui/AddOnPageButtons.ts</text:span></text:a>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4" svg:width="0.41667in" svg:height="0.4166666666666667in"><draw:image xlink:href="Pictures/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" office:name=""><text:span text:style-name="Definition">Back</text:span></text:a></text:p>
          </table:table-cell>
          <table:table-cell table:style-name="TableRowCell" office:value-type="string">
            <text:p text:style-name="Table_20_Contents">go 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5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5" svg:width="0.41667in" svg:height="0.4166666666666667in"><draw:image xlink:href="Pictures/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" office:name=""><text:span text:style-name="Definition">Cancel</text:span></text:a></text:p>
          </table:table-cell>
          <table:table-cell table:style-name="TableRowCell" office:value-type="string">
            <text:p text:style-name="Table_20_Contents">leave / cance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35" office:name=""><text:span text:style-name="Definition">gui/General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UploadHandler.tsx#L313" office:name=""><text:span text:style-name="Definition">components/UploadHandler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7" office:name=""><text:span text:style-name="Definition"><text:span text:style-name="T1">CenterAction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88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CenterAction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center-action.svg</text:span></text:a></text:p>
          </table:table-cell>
          <table:table-cell table:style-name="TableRowCell" office:value-type="string">
            <text:p text:style-name="Table_20_Contents"><draw:frame draw:name="img16" svg:width="0.41667in" svg:height="0.4166666666666667in"><draw:image xlink:href="Pictures/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9" office:name=""><text:span text:style-name="Definition">Action</text:span></text:a></text:p>
          </table:table-cell>
          <table:table-cell table:style-name="TableRowCell" office:value-type="string">
            <text:p text:style-name="Table_20_Contents">map a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6" office:name=""><text:span text:style-name="Definition"><text:span text:style-name="T1">Cha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7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7" svg:width="0.41667in" svg:height="0.4166666666666667in"><draw:image xlink:href="Pictures/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8" office:name=""><text:span text:style-name="Definition">Charts</text:span></text:a></text:p>
          </table:table-cell>
          <table:table-cell table:style-name="TableRowCell" office:value-type="string">
            <text:p text:style-name="Table_20_Contents">list cha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0" office:name=""><text:span text:style-name="Definition"><text:span text:style-name="T1">Connected</text:span>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41" office:name=""><text:span text:style-name="Definition">gui/GeneralButtons.ts</text:span></text:a></text:p>
          </table:table-cell>
          <table:table-cell table:style-name="TableRowCell" office:value-type="string">
            <text:p text:style-name="Table_20_Contents">Connected</text:p>
          </table:table-cell>
          <table:table-cell table:style-name="TableRowCell" office:value-type="string">
            <text:p text:style-name="Table_20_Contents"><text:a xlink:type="simple" xlink:href="../../viewer/style/icons.less#L3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18" svg:width="0.41667in" svg:height="0.4166666666666667in"><draw:image xlink:href="Pictures/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3" office:name=""><text:span text:style-name="Definition">Conn</text:span></text:a></text:p>
          </table:table-cell>
          <table:table-cell table:style-name="TableRowCell" office:value-type="string">
            <text:p text:style-name="Table_20_Contents">connected m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3" office:name=""><text:span text:style-name="Definition"><text:span text:style-name="T1">CourseU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31" office:name=""><text:span text:style-name="Definition">gui/NavPage.tsx</text:span></text:a></text:p>
          </table:table-cell>
          <table:table-cell table:style-name="TableRowCell" office:value-type="string">
            <text:p text:style-name="Table_20_Contents">CourseUp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compass.svg</text:span></text:a></text:p>
          </table:table-cell>
          <table:table-cell table:style-name="TableRowCell" office:value-type="string">
            <text:p text:style-name="Table_20_Contents"><draw:frame draw:name="img19" svg:width="0.41667in" svg:height="0.4166666666666667in"><draw:image xlink:href="Pictures/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1" office:name=""><text:span text:style-name="Definition">Course</text:span></text:a></text:p>
          </table:table-cell>
          <table:table-cell table:style-name="TableRowCell" office:value-type="string">
            <text:p text:style-name="Table_20_Contents">course 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3" office:name=""><text:span text:style-name="Definition">CourseU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75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7" office:name=""><text:span text:style-name="Definition"><text:span text:style-name="T1">CreateFi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277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0" svg:width="0.41667in" svg:height="0.4166666666666667in"><draw:image xlink:href="Pictures/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3" office:name=""><text:span text:style-name="Definition">New</text:span></text:a></text:p>
          </table:table-cell>
          <table:table-cell table:style-name="TableRowCell" office:value-type="string">
            <text:p text:style-name="Table_20_Contents">create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0" office:name=""><text:span text:style-name="Definition"><text:span text:style-name="T1">DBAccep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1" office:name=""><text:span text:style-name="Definition">components/Eula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21" svg:width="0.41667in" svg:height="0.4166666666666667in"><draw:image xlink:href="Pictures/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3" office:name=""><text:span text:style-name="Definition">Accep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0" office:name=""><text:span text:style-name="Definition"><text:span text:style-name="T1">DBActiv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4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22" svg:width="0.41667in" svg:height="0.4166666666666667in"><draw:image xlink:href="Pictures/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5" office:name=""><text:span text:style-name="Definition">Activ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0" office:name=""><text:span text:style-name="Definition">DBActiva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61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<text:span text:style-name="T1">DB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252" office:name=""><text:span text:style-name="Definition">gui/NavPage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3" svg:width="0.41667in" svg:height="0.4166666666666667in"><draw:image xlink:href="Pictures/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2" office:name=""><text:span text:style-name="Definition">Ad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3" office:name=""><text:span text:style-name="Definition"><text:span text:style-name="T1">DBAddSu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mbinedWidget.jsx#L106" office:name=""><text:span text:style-name="Definition">components/CombinedWidget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4" svg:width="0.41667in" svg:height="0.4166666666666667in"><draw:image xlink:href="Pictures/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2" office:name=""><text:span text:style-name="Definition">+Sub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7" office:name=""><text:span text:style-name="Definition"><text:span text:style-name="T1">DB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0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5" svg:width="0.41667in" svg:height="0.4166666666666667in"><draw:image xlink:href="Pictures/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3" office:name=""><text:span text:style-name="Definition">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<text:span text:style-name="T1">DBAnchor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3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Boat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6" svg:width="0.41667in" svg:height="0.4166666666666667in"><draw:image xlink:href="Pictures/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7" office:name=""><text:span text:style-name="Definition">Boat</text:span></text:a></text:p>
          </table:table-cell>
          <table:table-cell table:style-name="TableRowCell" office:value-type="string">
            <text:p text:style-name="Table_20_Contents">at boat 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8" office:name=""><text:span text:style-name="Definition"><text:span text:style-name="T1">DBAnchorCen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7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7" svg:width="0.41667in" svg:height="0.4166666666666667in"><draw:image xlink:href="Pictures/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0" office:name=""><text:span text:style-name="Definition">Center</text:span></text:a></text:p>
          </table:table-cell>
          <table:table-cell table:style-name="TableRowCell" office:value-type="string">
            <text:p text:style-name="Table_20_Contents">at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2" office:name=""><text:span text:style-name="Definition"><text:span text:style-name="T1">DBAuto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78" office:name=""><text:span text:style-name="Definition">components/LogDialog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28" svg:width="0.41667in" svg:height="0.4166666666666667in"><draw:image xlink:href="Pictures/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7" office:name=""><text:span text:style-name="Definition">Aut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3" office:name=""><text:span text:style-name="Definition"><text:span text:style-name="T1">DB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89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9" svg:width="0.41667in" svg:height="0.4166666666666667in"><draw:image xlink:href="Pictures/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0" office:name=""><text:span text:style-name="Definition">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<text:span text:style-name="T1">DB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1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30" svg:width="0.41667in" svg:height="0.4166666666666667in"><draw:image xlink:href="Pictures/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4" office:name=""><text:span text:style-name="Definition">Cance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6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0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41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28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57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4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9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0" office:name=""><text:span text:style-name="Definition">components/Eula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0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6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3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5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5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3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8" office:name=""><text:span text:style-name="Definition">components/RemoteChannel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2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9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25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6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9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7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3" office:name=""><text:span text:style-name="Definition"><text:span text:style-name="T1">DB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653" office:name=""><text:span text:style-name="Definition">gui/NavPage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31" svg:width="0.41667in" svg:height="0.4166666666666667in"><draw:image xlink:href="Pictures/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5" office:name=""><text:span text:style-name="Definition">Cen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1" office:name=""><text:span text:style-name="Definition"><text:span text:style-name="T1">DBCleanTrack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01" office:name=""><text:span text:style-name="Definition">gui/NavPage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2" svg:width="0.41667in" svg:height="0.4166666666666667in"><draw:image xlink:href="Pictures/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8" office:name=""><text:span text:style-name="Definition">Clean trac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7" office:name=""><text:span text:style-name="Definition"><text:span text:style-name="T1">DBClea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7" office:name=""><text:span text:style-name="Definition">components/BasicDialogs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3" svg:width="0.41667in" svg:height="0.4166666666666667in"><draw:image xlink:href="Pictures/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3" office:name=""><text:span text:style-name="Definition">Clea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7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23" office:name=""><text:span text:style-name="Definition">components/ItemNam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8" office:name=""><text:span text:style-name="Definition"><text:span text:style-name="T1">DBColorUn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2" office:name=""><text:span text:style-name="Definition">components/ColorDialog.jsx</text:span></text:a></text:p>
          </table:table-cell>
          <table:table-cell table:style-name="TableRowCell" office:value-type="string">
            <text:p text:style-name="Table_20_Contents">ColorReset</text:p>
          </table:table-cell>
          <table:table-cell table:style-name="TableRowCell" office:value-type="string">
            <text:p text:style-name="Table_20_Contents"><text:a xlink:type="simple" xlink:href="../../viewer/style/icons.less#L315" office:name=""><text:span text:style-name="Definition">format_color_reset.svg</text:span></text:a></text:p>
          </table:table-cell>
          <table:table-cell table:style-name="TableRowCell" office:value-type="string">
            <text:p text:style-name="Table_20_Contents"><draw:frame draw:name="img34" svg:width="0.41667in" svg:height="0.4166666666666667in"><draw:image xlink:href="Pictures/33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1" office:name=""><text:span text:style-name="Definition"><text:span text:style-name="T1">DBCompu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46" office:name=""><text:span text:style-name="Definition">components/TrackConvertDialog.jsx</text:span></text:a></text:p>
          </table:table-cell>
          <table:table-cell table:style-name="TableRowCell" office:value-type="string">
            <text:p text:style-name="Table_20_Contents">Start</text:p>
          </table:table-cell>
          <table:table-cell table:style-name="TableRowCell" office:value-type="string">
            <text:p text:style-name="Table_20_Contents"><text:a xlink:type="simple" xlink:href="../../viewer/style/icons.less#L294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5" svg:width="0.41667in" svg:height="0.4166666666666667in"><draw:image xlink:href="Pictures/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9" office:name=""><text:span text:style-name="Definition">Comp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6" office:name=""><text:span text:style-name="Definition"><text:span text:style-name="T1">DBConfi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65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36" svg:width="0.41667in" svg:height="0.4166666666666667in"><draw:image xlink:href="Pictures/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2" office:name=""><text:span text:style-name="Definition">Confi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1" office:name=""><text:span text:style-name="Definition"><text:span text:style-name="T1">DB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3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Connect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37" svg:width="0.41667in" svg:height="0.4166666666666667in"><draw:image xlink:href="Pictures/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1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8" office:name=""><text:span text:style-name="Definition"><text:span text:style-name="T1">DBCop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95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opy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38" svg:width="0.41667in" svg:height="0.4166666666666667in"><draw:image xlink:href="Pictures/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9" office:name=""><text:span text:style-name="Definition">Cop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<text:span text:style-name="T1">DB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79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9" svg:width="0.41667in" svg:height="0.4166666666666667in"><draw:image xlink:href="Pictures/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3" office:name=""><text:span text:style-name="Definition">Dele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73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52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5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2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15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6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<text:span text:style-name="T1">DBDisab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67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Disabl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40" svg:width="0.41667in" svg:height="0.4166666666666667in"><draw:image xlink:href="Pictures/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4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7" office:name=""><text:span text:style-name="Definition"><text:span text:style-name="T1">DBDiscar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1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41" svg:width="0.41667in" svg:height="0.4166666666666667in"><draw:image xlink:href="Pictures/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4" office:name=""><text:span text:style-name="Definition">Discard change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7" office:name=""><text:span text:style-name="Definition"><text:span text:style-name="T1">DB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48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Disconnect</text:p>
          </table:table-cell>
          <table:table-cell table:style-name="TableRowCell" office:value-type="string">
            <text:p text:style-name="Table_20_Contents"><text:a xlink:type="simple" xlink:href="../../viewer/style/icons.less#L323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42" svg:width="0.41667in" svg:height="0.4166666666666667in"><draw:image xlink:href="Pictures/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1" office:name=""><text:span text:style-name="Definition">Dis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4" office:name=""><text:span text:style-name="Definition"><text:span text:style-name="T1">DBDown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4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Download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ic_file_download.svg</text:span></text:a></text:p>
          </table:table-cell>
          <table:table-cell table:style-name="TableRowCell" office:value-type="string">
            <text:p text:style-name="Table_20_Contents"><draw:frame draw:name="img43" svg:width="0.41667in" svg:height="0.4166666666666667in"><draw:image xlink:href="Pictures/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7" office:name=""><text:span text:style-name="Definition">Down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4" office:name=""><text:span text:style-name="Definition">DBDown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Button.tsx#L107" office:name=""><text:span text:style-name="Definition">components/DownloadButton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3" office:name=""><text:span text:style-name="Definition"><text:span text:style-name="T1">DBEditCs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44" svg:width="0.41667in" svg:height="0.4166666666666667in"><draw:image xlink:href="Pictures/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1" office:name=""><text:span text:style-name="Definition">Edit CS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6" office:name=""><text:span text:style-name="Definition"><text:span text:style-name="T1">DB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525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45" svg:width="0.41667in" svg:height="0.4166666666666667in"><draw:image xlink:href="Pictures/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5" office:name=""><text:span text:style-name="Definition">Edi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6" office:name=""><text:span text:style-name="Definition">DBEditLayou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53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7" office:name=""><text:span text:style-name="Definition"><text:span text:style-name="T1">DBEdi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674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46" svg:width="0.41667in" svg:height="0.4166666666666667in"><draw:image xlink:href="Pictures/45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7" office:name=""><text:span text:style-name="Definition">DBEdit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69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3" office:name=""><text:span text:style-name="Definition"><text:span text:style-name="T1">DBEmpty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7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mptyRoute</text:p>
          </table:table-cell>
          <table:table-cell table:style-name="TableRowCell" office:value-type="string">
            <text:p text:style-name="Table_20_Contents"><text:a xlink:type="simple" xlink:href="../../viewer/style/icons.less#L301" office:name=""><text:span text:style-name="Definition">delete_sweep.svg</text:span></text:a></text:p>
          </table:table-cell>
          <table:table-cell table:style-name="TableRowCell" office:value-type="string">
            <text:p text:style-name="Table_20_Contents"><draw:frame draw:name="img47" svg:width="0.41667in" svg:height="0.4166666666666667in"><draw:image xlink:href="Pictures/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8" office:name=""><text:span text:style-name="Definition">Empt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1" office:name=""><text:span text:style-name="Definition"><text:span text:style-name="T1">DB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46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Hide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visibility_off.svg</text:span></text:a></text:p>
          </table:table-cell>
          <table:table-cell table:style-name="TableRowCell" office:value-type="string">
            <text:p text:style-name="Table_20_Contents"><draw:frame draw:name="img48" svg:width="0.41667in" svg:height="0.4166666666666667in"><draw:image xlink:href="Pictures/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3" office:name=""><text:span text:style-name="Definition">Hid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5" office:name=""><text:span text:style-name="Definition"><text:span text:style-name="T1">DBHide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49" svg:width="0.41667in" svg:height="0.4166666666666667in"><draw:image xlink:href="Pictures/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4" office:name=""><text:span text:style-name="Definition">Hide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6" office:name=""><text:span text:style-name="Definition"><text:span text:style-name="T1">DBHide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8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50" svg:width="0.41667in" svg:height="0.4166666666666667in"><draw:image xlink:href="Pictures/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7" office:name=""><text:span text:style-name="Definition">Hide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<text:span text:style-name="T1">DBIgn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678" office:name=""><text:span text:style-name="Definition">components/Settin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../../viewer/style/button_text.less#L354" office:name=""><text:span text:style-name="Definition">Ignore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Ignore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7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7" office:name=""><text:span text:style-name="Definition"><text:span text:style-name="T1">DBInfo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64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51" svg:width="0.41667in" svg:height="0.4166666666666667in"><draw:image xlink:href="Pictures/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0" office:name=""><text:span text:style-name="Definition">Inf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1" office:name=""><text:span text:style-name="Definition"><text:span text:style-name="T1">DBInse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2" svg:width="0.41667in" svg:height="0.4166666666666667in"><draw:image xlink:href="Pictures/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6" office:name=""><text:span text:style-name="Definition">Ins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3" office:name=""><text:span text:style-name="Definition"><text:span text:style-name="T1">DBInsert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3" svg:width="0.41667in" svg:height="0.4166666666666667in"><draw:image xlink:href="Pictures/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8" office:name=""><text:span text:style-name="Definition">Insert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9" office:name=""><text:span text:style-name="Definition"><text:span text:style-name="T1">DBInsert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0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54" svg:width="0.41667in" svg:height="0.4166666666666667in"><draw:image xlink:href="Pictures/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5" office:name=""><text:span text:style-name="Definition">Insert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9" office:name=""><text:span text:style-name="Definition"><text:span text:style-name="T1">DBInsertRoute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6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5" svg:width="0.41667in" svg:height="0.4166666666666667in"><draw:image xlink:href="Pictures/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9" office:name=""><text:span text:style-name="Definition">Route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5" office:name=""><text:span text:style-name="Definition"><text:span text:style-name="T1">DBInsertRouteBefor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5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6" svg:width="0.41667in" svg:height="0.4166666666666667in"><draw:image xlink:href="Pictures/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6" office:name=""><text:span text:style-name="Definition">Route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7" office:name=""><text:span text:style-name="Definition"><text:span text:style-name="T1">DBInve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8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InvertRoute</text:p>
          </table:table-cell>
          <table:table-cell table:style-name="TableRowCell" office:value-type="string">
            <text:p text:style-name="Table_20_Contents"><text:a xlink:type="simple" xlink:href="../../viewer/style/icons.less#L304" office:name=""><text:span text:style-name="Definition">invertroute.svg</text:span></text:a></text:p>
          </table:table-cell>
          <table:table-cell table:style-name="TableRowCell" office:value-type="string">
            <text:p text:style-name="Table_20_Contents"><draw:frame draw:name="img57" svg:width="0.41667in" svg:height="0.4166666666666667in"><draw:image xlink:href="Pictures/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1" office:name=""><text:span text:style-name="Definition">Inv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9" office:name=""><text:span text:style-name="Definition"><text:span text:style-name="T1">DBLoad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3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58" svg:width="0.41667in" svg:height="0.4166666666666667in"><draw:image xlink:href="Pictures/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0" office:name=""><text:span text:style-name="Definition">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3" office:name=""><text:span text:style-name="Definition"><text:span text:style-name="T1">DBLo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23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59" svg:width="0.41667in" svg:height="0.4166666666666667in"><draw:image xlink:href="Pictures/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3" office:name=""><text:span text:style-name="Definition">Lo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3" office:name=""><text:span text:style-name="Definition">DBLog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00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5" office:name=""><text:span text:style-name="Definition"><text:span text:style-name="T1">DB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32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4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60" svg:width="0.41667in" svg:height="0.4166666666666667in"><draw:image xlink:href="Pictures/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1" office:name=""><text:span text:style-name="Definition">Measu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3" office:name=""><text:span text:style-name="Definition"><text:span text:style-name="T1">DBMeasureOff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51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Off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-off.svg</text:span></text:a></text:p>
          </table:table-cell>
          <table:table-cell table:style-name="TableRowCell" office:value-type="string">
            <text:p text:style-name="Table_20_Contents"><draw:frame draw:name="img61" svg:width="0.41667in" svg:height="0.4166666666666667in"><draw:image xlink:href="Pictures/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7" office:name=""><text:span text:style-name="Definition">Measu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<text:span text:style-name="T1">DBN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8" office:name=""><text:span text:style-name="Definition">components/UserAppDialog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2" svg:width="0.41667in" svg:height="0.4166666666666667in"><draw:image xlink:href="Pictures/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6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New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88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5" office:name=""><text:span text:style-name="Definition"><text:span text:style-name="T1">DB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2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3" svg:width="0.41667in" svg:height="0.4166666666666667in"><draw:image xlink:href="Pictures/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7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<text:span text:style-name="T1">DBOk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1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64" svg:width="0.41667in" svg:height="0.4166666666666667in"><draw:image xlink:href="Pictures/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1" office:name=""><text:span text:style-name="Definition">O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1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0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1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6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6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3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90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8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6" office:name=""><text:span text:style-name="Definition"><text:span text:style-name="T1">DBOpenCh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55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65" svg:width="0.41667in" svg:height="0.4166666666666667in"><draw:image xlink:href="Pictures/64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4" office:name=""><text:span text:style-name="Definition"><text:span text:style-name="T1">DB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98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66" svg:width="0.41667in" svg:height="0.4166666666666667in"><draw:image xlink:href="Pictures/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9" office:name=""><text:span text:style-name="Definition">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4" office:name=""><text:span text:style-name="Definition">DBOverlays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9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8" office:name=""><text:span text:style-name="Definition"><text:span text:style-name="T1">DBPre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79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67" svg:width="0.41667in" svg:height="0.4166666666666667in"><draw:image xlink:href="Pictures/6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6" office:name=""><text:span text:style-name="Definition">Pre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8" office:name=""><text:span text:style-name="Definition"><text:span text:style-name="T1">DBPropos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38" office:name=""><text:span text:style-name="Definition">components/ItemNameDialog.jsx</text:span></text:a></text:p>
          </table:table-cell>
          <table:table-cell table:style-name="TableRowCell" office:value-type="string">
            <text:p text:style-name="Table_20_Contents">Propose</text:p>
          </table:table-cell>
          <table:table-cell table:style-name="TableRowCell" office:value-type="string">
            <text:p text:style-name="Table_20_Contents"><text:a xlink:type="simple" xlink:href="../../viewer/style/icons.less#L319" office:name=""><text:span text:style-name="Definition">prompt_suggestion.svg</text:span></text:a></text:p>
          </table:table-cell>
          <table:table-cell table:style-name="TableRowCell" office:value-type="string">
            <text:p text:style-name="Table_20_Contents"><draw:frame draw:name="img68" svg:width="0.41667in" svg:height="0.4166666666666667in"><draw:image xlink:href="Pictures/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7" office:name=""><text:span text:style-name="Definition">Propose</text:span></text:a></text:p>
          </table:table-cell>
          <table:table-cell table:style-name="TableRowCell" office:value-type="string">
            <text:p text:style-name="Table_20_Contents">propose new na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2" office:name=""><text:span text:style-name="Definition"><text:span text:style-name="T1">DB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14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69" svg:width="0.41667in" svg:height="0.4166666666666667in"><draw:image xlink:href="Pictures/6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1" office:name=""><text:span text:style-name="Definition">Re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2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3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2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ErrorListDialog.jsx#L39" office:name=""><text:span text:style-name="Definition">components/ErrorLis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8" office:name=""><text:span text:style-name="Definition"><text:span text:style-name="T1">DBRenam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4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70" svg:width="0.41667in" svg:height="0.4166666666666667in"><draw:image xlink:href="Pictures/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0" office:name=""><text:span text:style-name="Definition">Rena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8" office:name=""><text:span text:style-name="Definition">DBRenam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70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1" office:name=""><text:span text:style-name="Definition"><text:span text:style-name="T1">DBRenumber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9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enumberRoute</text:p>
          </table:table-cell>
          <table:table-cell table:style-name="TableRowCell" office:value-type="string">
            <text:p text:style-name="Table_20_Contents"><text:a xlink:type="simple" xlink:href="../../viewer/style/icons.less#L307" office:name=""><text:span text:style-name="Definition">format_list_numbered.svg</text:span></text:a></text:p>
          </table:table-cell>
          <table:table-cell table:style-name="TableRowCell" office:value-type="string">
            <text:p text:style-name="Table_20_Contents"><draw:frame draw:name="img71" svg:width="0.41667in" svg:height="0.4166666666666667in"><draw:image xlink:href="Pictures/7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4" office:name=""><text:span text:style-name="Definition">Renumb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3" office:name=""><text:span text:style-name="Definition"><text:span text:style-name="T1">DBRe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62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72" svg:width="0.41667in" svg:height="0.4166666666666667in"><draw:image xlink:href="Pictures/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0" office:name=""><text:span text:style-name="Definition">Rese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3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5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3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48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3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2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9" office:name=""><text:span text:style-name="Definition"><text:span text:style-name="T1">DBRest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97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73" svg:width="0.41667in" svg:height="0.4166666666666667in"><draw:image xlink:href="Pictures/7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0" office:name=""><text:span text:style-name="Definition">Resta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3" office:name=""><text:span text:style-name="Definition"><text:span text:style-name="T1">DBRoutePoint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5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74" svg:width="0.41667in" svg:height="0.4166666666666667in"><draw:image xlink:href="Pictures/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3" office:name=""><text:span text:style-name="Definition">Point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0" office:name=""><text:span text:style-name="Definition"><text:span text:style-name="T1">DBSav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90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75" svg:width="0.41667in" svg:height="0.4166666666666667in"><draw:image xlink:href="Pictures/7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Sa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0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4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6" office:name=""><text:span text:style-name="Definition"><text:span text:style-name="T1">DBSaveA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9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aveAs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76" svg:width="0.41667in" svg:height="0.4166666666666667in"><draw:image xlink:href="Pictures/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6" office:name=""><text:span text:style-name="Definition">Save A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0" office:name=""><text:span text:style-name="Definition"><text:span text:style-name="T1">DBSchem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6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cheme</text:p>
          </table:table-cell>
          <table:table-cell table:style-name="TableRowCell" office:value-type="string">
            <text:p text:style-name="Table_20_Contents"><text:a xlink:type="simple" xlink:href="../../viewer/style/icons.less#L330" office:name=""><text:span text:style-name="Definition">table_convert.svg</text:span></text:a></text:p>
          </table:table-cell>
          <table:table-cell table:style-name="TableRowCell" office:value-type="string">
            <text:p text:style-name="Table_20_Contents"><draw:frame draw:name="img77" svg:width="0.41667in" svg:height="0.4166666666666667in"><draw:image xlink:href="Pictures/7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6" office:name=""><text:span text:style-name="Definition">Sche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1" office:name=""><text:span text:style-name="Definition"><text:span text:style-name="T1">DBShow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27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78" svg:width="0.41667in" svg:height="0.4166666666666667in"><draw:image xlink:href="Pictures/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1" office:name=""><text:span text:style-name="Definition">Show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2" office:name=""><text:span text:style-name="Definition"><text:span text:style-name="T1">DBShow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1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79" svg:width="0.41667in" svg:height="0.4166666666666667in"><draw:image xlink:href="Pictures/7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4" office:name=""><text:span text:style-name="Definition">Show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3" office:name=""><text:span text:style-name="Definition"><text:span text:style-name="T1">DBSta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641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80" svg:width="0.41667in" svg:height="0.4166666666666667in"><draw:image xlink:href="Pictures/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2" office:name=""><text:span text:style-name="Definition">Start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5" office:name=""><text:span text:style-name="Definition"><text:span text:style-name="T1">DBSto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82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Stop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stop_circle.svg</text:span></text:a></text:p>
          </table:table-cell>
          <table:table-cell table:style-name="TableRowCell" office:value-type="string">
            <text:p text:style-name="Table_20_Contents"><draw:frame draw:name="img81" svg:width="0.41667in" svg:height="0.4166666666666667in"><draw:image xlink:href="Pictures/8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7" office:name=""><text:span text:style-name="Definition">Sto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4" office:name=""><text:span text:style-name="Definition"><text:span text:style-name="T1">DBTo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14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82" svg:width="0.41667in" svg:height="0.4166666666666667in"><draw:image xlink:href="Pictures/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8" office:name=""><text:span text:style-name="Definition">To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4" office:name=""><text:span text:style-name="Definition">DB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66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4" office:name=""><text:span text:style-name="Definition">DBToRou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41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5" office:name=""><text:span text:style-name="Definition"><text:span text:style-name="T1">DBUpd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20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83" svg:width="0.41667in" svg:height="0.4166666666666667in"><draw:image xlink:href="Pictures/8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9" office:name=""><text:span text:style-name="Definition">Upd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2" office:name=""><text:span text:style-name="Definition"><text:span text:style-name="T1">DB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34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84" svg:width="0.41667in" svg:height="0.4166666666666667in"><draw:image xlink:href="Pictures/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2" office:name=""><text:span text:style-name="Definition">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9" office:name=""><text:span text:style-name="Definition"><text:span text:style-name="T1">DBWpaConnect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10" office:name=""><text:span text:style-name="Definition">gui/WpaPage.jsx</text:span></text:a></text:p>
          </table:table-cell>
          <table:table-cell table:style-name="TableRowCell" office:value-type="string">
            <text:p text:style-name="Table_20_Contents">WpaConnect</text:p>
          </table:table-cell>
          <table:table-cell table:style-name="TableRowCell" office:value-type="string">
            <text:p text:style-name="Table_20_Contents"><text:a xlink:type="simple" xlink:href="../../viewer/style/icons.less#L311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85" svg:width="0.41667in" svg:height="0.4166666666666667in"><draw:image xlink:href="Pictures/84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5" office:name=""><text:span text:style-name="Definition"><text:span text:style-name="T1">DBWpaDis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03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Off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wifi_off.svg</text:span></text:a></text:p>
          </table:table-cell>
          <table:table-cell table:style-name="TableRowCell" office:value-type="string">
            <text:p text:style-name="Table_20_Contents"><draw:frame draw:name="img86" svg:width="0.41667in" svg:height="0.4166666666666667in"><draw:image xlink:href="Pictures/85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1" office:name=""><text:span text:style-name="Definition"><text:span text:style-name="T1">DBWpaEn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96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87" svg:width="0.41667in" svg:height="0.4166666666666667in"><draw:image xlink:href="Pictures/86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7" office:name=""><text:span text:style-name="Definition"><text:span text:style-name="T1">DBWpaRemov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89" office:name=""><text:span text:style-name="Definition">gui/Wpa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88" svg:width="0.41667in" svg:height="0.4166666666666667in"><draw:image xlink:href="Pictures/87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9" office:name=""><text:span text:style-name="Definition"><text:span text:style-name="T1">DefaultValu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109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89" svg:width="0.41667in" svg:height="0.4166666666666667in"><draw:image xlink:href="Pictures/8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7" office:name=""><text:span text:style-name="Definition">Default</text:span></text:a></text:p>
          </table:table-cell>
          <table:table-cell table:style-name="TableRowCell" office:value-type="string">
            <text:p text:style-name="Table_20_Contents">default valu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2" office:name=""><text:span text:style-name="Definition"><text:span text:style-name="T1">Dim</text:span></text:span></text:a></text:p>
          </table:table-cell>
          <table:table-cell table:style-name="TableRowCell" office:value-type="string">
            <text:p text:style-name="Table_20_Contents"><text:a xlink:type="simple" xlink:href="../../viewer/util/dimhandler.ts#L164" office:name=""><text:span text:style-name="Definition">util/dimhandler.ts</text:span></text:a></text:p>
          </table:table-cell>
          <table:table-cell table:style-name="TableRowCell" office:value-type="string">
            <text:p text:style-name="Table_20_Contents">Dim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brightness_low.svg</text:span></text:a></text:p>
          </table:table-cell>
          <table:table-cell table:style-name="TableRowCell" office:value-type="string">
            <text:p text:style-name="Table_20_Contents"><draw:frame draw:name="img90" svg:width="0.41667in" svg:height="0.4166666666666667in"><draw:image xlink:href="Pictures/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8" office:name=""><text:span text:style-name="Definition">Dim</text:span></text:a></text:p>
          </table:table-cell>
          <table:table-cell table:style-name="TableRowCell" office:value-type="string">
            <text:p text:style-name="Table_20_Contents">dim backl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355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91" svg:width="0.41667in" svg:height="0.4166666666666667in"><draw:image xlink:href="Pictures/9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0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8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83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383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StatusItems.tsx#L42" office:name=""><text:span text:style-name="Definition">components/StatusItem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8" office:name=""><text:span text:style-name="Definition"><text:span text:style-name="T1">EditPag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17" office:name=""><text:span text:style-name="Definition">components/EditPageDialog.tsx</text:span></text:a></text:p>
          </table:table-cell>
          <table:table-cell table:style-name="TableRowCell" office:value-type="string">
            <text:p text:style-name="Table_20_Contents">EditPage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tune.svg</text:span></text:a></text:p>
          </table:table-cell>
          <table:table-cell table:style-name="TableRowCell" office:value-type="string">
            <text:p text:style-name="Table_20_Contents"><draw:frame draw:name="img92" svg:width="0.41667in" svg:height="0.4166666666666667in"><draw:image xlink:href="Pictures/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0" office:name=""><text:span text:style-name="Definition">Config</text:span></text:a></text:p>
          </table:table-cell>
          <table:table-cell table:style-name="TableRowCell" office:value-type="string">
            <text:p text:style-name="Table_20_Contents">page layout confi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5" office:name=""><text:span text:style-name="Definition"><text:span text:style-name="T1">FullScreen</text:span></text:span></text:a></text:p>
          </table:table-cell>
          <table:table-cell table:style-name="TableRowCell" office:value-type="string">
            <text:p text:style-name="Table_20_Contents"><text:a xlink:type="simple" xlink:href="../../viewer/util/Fullscreen.ts#L84" office:name=""><text:span text:style-name="Definition">util/Fullscreen.ts</text:span></text:a></text:p>
          </table:table-cell>
          <table:table-cell table:style-name="TableRowCell" office:value-type="string">
            <text:p text:style-name="Table_20_Contents">FullScreen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fullscreen.svg</text:span></text:a></text:p>
          </table:table-cell>
          <table:table-cell table:style-name="TableRowCell" office:value-type="string">
            <text:p text:style-name="Table_20_Contents"><draw:frame draw:name="img93" svg:width="0.41667in" svg:height="0.4166666666666667in"><draw:image xlink:href="Pictures/9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" office:name=""><text:span text:style-name="Definition">Full</text:span></text:a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6" office:name=""><text:span text:style-name="Definition"><text:span text:style-name="T1">Gps1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4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</text:p>
          </table:table-cell>
          <table:table-cell table:style-name="TableRowCell" office:value-type="string">
            <text:p text:style-name="Table_20_Contents"><text:a xlink:type="simple" xlink:href="../../viewer/style/icons.less#L43" office:name=""><text:span text:style-name="Definition">num-1.svg</text:span></text:a></text:p>
          </table:table-cell>
          <table:table-cell table:style-name="TableRowCell" office:value-type="string">
            <text:p text:style-name="Table_20_Contents"><draw:frame draw:name="img94" svg:width="0.41667in" svg:height="0.4166666666666667in"><draw:image xlink:href="Pictures/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2" office:name=""><text:span text:style-name="Definition"/></text:a></text:p>
          </table:table-cell>
          <table:table-cell table:style-name="TableRowCell" office:value-type="string">
            <text:p text:style-name="Table_20_Contents">dashboard 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2" office:name=""><text:span text:style-name="Definition"><text:span text:style-name="T1">Gps10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3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0</text:p>
          </table:table-cell>
          <table:table-cell table:style-name="TableRowCell" office:value-type="string">
            <text:p text:style-name="Table_20_Contents"><text:a xlink:type="simple" xlink:href="../../viewer/style/icons.less#L70" office:name=""><text:span text:style-name="Definition">num-10.svg</text:span></text:a></text:p>
          </table:table-cell>
          <table:table-cell table:style-name="TableRowCell" office:value-type="string">
            <text:p text:style-name="Table_20_Contents"><draw:frame draw:name="img95" svg:width="0.41667in" svg:height="0.4166666666666667in"><draw:image xlink:href="Pictures/9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9" office:name=""><text:span text:style-name="Definition"/></text:a></text:p>
          </table:table-cell>
          <table:table-cell table:style-name="TableRowCell" office:value-type="string">
            <text:p text:style-name="Table_20_Contents">dashboard 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0" office:name=""><text:span text:style-name="Definition"><text:span text:style-name="T1">Gps2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5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2</text:p>
          </table:table-cell>
          <table:table-cell table:style-name="TableRowCell" office:value-type="string">
            <text:p text:style-name="Table_20_Contents"><text:a xlink:type="simple" xlink:href="../../viewer/style/icons.less#L46" office:name=""><text:span text:style-name="Definition">num-2.svg</text:span></text:a></text:p>
          </table:table-cell>
          <table:table-cell table:style-name="TableRowCell" office:value-type="string">
            <text:p text:style-name="Table_20_Contents"><draw:frame draw:name="img96" svg:width="0.41667in" svg:height="0.4166666666666667in"><draw:image xlink:href="Pictures/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5" office:name=""><text:span text:style-name="Definition"/></text:a></text:p>
          </table:table-cell>
          <table:table-cell table:style-name="TableRowCell" office:value-type="string">
            <text:p text:style-name="Table_20_Contents">dashboard 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4" office:name=""><text:span text:style-name="Definition"><text:span text:style-name="T1">Gps3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6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3</text:p>
          </table:table-cell>
          <table:table-cell table:style-name="TableRowCell" office:value-type="string">
            <text:p text:style-name="Table_20_Contents"><text:a xlink:type="simple" xlink:href="../../viewer/style/icons.less#L49" office:name=""><text:span text:style-name="Definition">num-3.svg</text:span></text:a></text:p>
          </table:table-cell>
          <table:table-cell table:style-name="TableRowCell" office:value-type="string">
            <text:p text:style-name="Table_20_Contents"><draw:frame draw:name="img97" svg:width="0.41667in" svg:height="0.4166666666666667in"><draw:image xlink:href="Pictures/9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8" office:name=""><text:span text:style-name="Definition"/></text:a></text:p>
          </table:table-cell>
          <table:table-cell table:style-name="TableRowCell" office:value-type="string">
            <text:p text:style-name="Table_20_Contents">dashboard 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8" office:name=""><text:span text:style-name="Definition"><text:span text:style-name="T1">Gps4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7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4</text:p>
          </table:table-cell>
          <table:table-cell table:style-name="TableRowCell" office:value-type="string">
            <text:p text:style-name="Table_20_Contents"><text:a xlink:type="simple" xlink:href="../../viewer/style/icons.less#L52" office:name=""><text:span text:style-name="Definition">num-4.svg</text:span></text:a></text:p>
          </table:table-cell>
          <table:table-cell table:style-name="TableRowCell" office:value-type="string">
            <text:p text:style-name="Table_20_Contents"><draw:frame draw:name="img98" svg:width="0.41667in" svg:height="0.4166666666666667in"><draw:image xlink:href="Pictures/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1" office:name=""><text:span text:style-name="Definition"/></text:a></text:p>
          </table:table-cell>
          <table:table-cell table:style-name="TableRowCell" office:value-type="string">
            <text:p text:style-name="Table_20_Contents">dashboard 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2" office:name=""><text:span text:style-name="Definition"><text:span text:style-name="T1">Gps5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8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5</text:p>
          </table:table-cell>
          <table:table-cell table:style-name="TableRowCell" office:value-type="string">
            <text:p text:style-name="Table_20_Contents"><text:a xlink:type="simple" xlink:href="../../viewer/style/icons.less#L55" office:name=""><text:span text:style-name="Definition">num-5.svg</text:span></text:a></text:p>
          </table:table-cell>
          <table:table-cell table:style-name="TableRowCell" office:value-type="string">
            <text:p text:style-name="Table_20_Contents"><draw:frame draw:name="img99" svg:width="0.41667in" svg:height="0.4166666666666667in"><draw:image xlink:href="Pictures/9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4" office:name=""><text:span text:style-name="Definition"/></text:a></text:p>
          </table:table-cell>
          <table:table-cell table:style-name="TableRowCell" office:value-type="string">
            <text:p text:style-name="Table_20_Contents">dashboard 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6" office:name=""><text:span text:style-name="Definition"><text:span text:style-name="T1">Gps6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9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6</text:p>
          </table:table-cell>
          <table:table-cell table:style-name="TableRowCell" office:value-type="string">
            <text:p text:style-name="Table_20_Contents"><text:a xlink:type="simple" xlink:href="../../viewer/style/icons.less#L58" office:name=""><text:span text:style-name="Definition">num-6.svg</text:span></text:a></text:p>
          </table:table-cell>
          <table:table-cell table:style-name="TableRowCell" office:value-type="string">
            <text:p text:style-name="Table_20_Contents"><draw:frame draw:name="img100" svg:width="0.41667in" svg:height="0.4166666666666667in"><draw:image xlink:href="Pictures/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7" office:name=""><text:span text:style-name="Definition"/></text:a></text:p>
          </table:table-cell>
          <table:table-cell table:style-name="TableRowCell" office:value-type="string">
            <text:p text:style-name="Table_20_Contents">dashboard 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0" office:name=""><text:span text:style-name="Definition"><text:span text:style-name="T1">Gps7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7</text:p>
          </table:table-cell>
          <table:table-cell table:style-name="TableRowCell" office:value-type="string">
            <text:p text:style-name="Table_20_Contents"><text:a xlink:type="simple" xlink:href="../../viewer/style/icons.less#L61" office:name=""><text:span text:style-name="Definition">num-7.svg</text:span></text:a></text:p>
          </table:table-cell>
          <table:table-cell table:style-name="TableRowCell" office:value-type="string">
            <text:p text:style-name="Table_20_Contents"><draw:frame draw:name="img101" svg:width="0.41667in" svg:height="0.4166666666666667in"><draw:image xlink:href="Pictures/10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0" office:name=""><text:span text:style-name="Definition"/></text:a></text:p>
          </table:table-cell>
          <table:table-cell table:style-name="TableRowCell" office:value-type="string">
            <text:p text:style-name="Table_20_Contents">dashboard 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4" office:name=""><text:span text:style-name="Definition"><text:span text:style-name="T1">Gps8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1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8</text:p>
          </table:table-cell>
          <table:table-cell table:style-name="TableRowCell" office:value-type="string">
            <text:p text:style-name="Table_20_Contents"><text:a xlink:type="simple" xlink:href="../../viewer/style/icons.less#L64" office:name=""><text:span text:style-name="Definition">num-8.svg</text:span></text:a></text:p>
          </table:table-cell>
          <table:table-cell table:style-name="TableRowCell" office:value-type="string">
            <text:p text:style-name="Table_20_Contents"><draw:frame draw:name="img102" svg:width="0.41667in" svg:height="0.4166666666666667in"><draw:image xlink:href="Pictures/1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3" office:name=""><text:span text:style-name="Definition"/></text:a></text:p>
          </table:table-cell>
          <table:table-cell table:style-name="TableRowCell" office:value-type="string">
            <text:p text:style-name="Table_20_Contents">dashboard 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8" office:name=""><text:span text:style-name="Definition"><text:span text:style-name="T1">Gps9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2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9</text:p>
          </table:table-cell>
          <table:table-cell table:style-name="TableRowCell" office:value-type="string">
            <text:p text:style-name="Table_20_Contents"><text:a xlink:type="simple" xlink:href="../../viewer/style/icons.less#L67" office:name=""><text:span text:style-name="Definition">num-9.svg</text:span></text:a></text:p>
          </table:table-cell>
          <table:table-cell table:style-name="TableRowCell" office:value-type="string">
            <text:p text:style-name="Table_20_Contents"><draw:frame draw:name="img103" svg:width="0.41667in" svg:height="0.4166666666666667in"><draw:image xlink:href="Pictures/10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6" office:name=""><text:span text:style-name="Definition"/></text:a></text:p>
          </table:table-cell>
          <table:table-cell table:style-name="TableRowCell" office:value-type="string">
            <text:p text:style-name="Table_20_Contents">dashboard 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<text:span text:style-name="T1">Gps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51" office:name=""><text:span text:style-name="Definition">gui/NavPage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04" svg:width="0.41667in" svg:height="0.4166666666666667in"><draw:image xlink:href="Pictures/1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7" office:name=""><text:span text:style-name="Definition">GPS</text:span></text:a></text:p>
          </table:table-cell>
          <table:table-cell table:style-name="TableRowCell" office:value-type="string">
            <text:p text:style-name="Table_20_Contents">center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GpsCenter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8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5" office:name=""><text:span text:style-name="Definition"><text:span text:style-name="T1">Hel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70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Help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ic_help_outline.svg</text:span></text:a></text:p>
          </table:table-cell>
          <table:table-cell table:style-name="TableRowCell" office:value-type="string">
            <text:p text:style-name="Table_20_Contents"><draw:frame draw:name="img105" svg:width="0.41667in" svg:height="0.4166666666666667in"><draw:image xlink:href="Pictures/10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4" office:name=""><text:span text:style-name="Definition">Hel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0" office:name=""><text:span text:style-name="Definition"><text:span text:style-name="T1">Impo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40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Imports</text:p>
          </table:table-cell>
          <table:table-cell table:style-name="TableRowCell" office:value-type="string">
            <text:p text:style-name="Table_20_Contents"><text:a xlink:type="simple" xlink:href="../../viewer/style/icons.less#L13" office:name=""><text:span text:style-name="Definition">swap_horiz.svg</text:span></text:a></text:p>
          </table:table-cell>
          <table:table-cell table:style-name="TableRowCell" office:value-type="string">
            <text:p text:style-name="Table_20_Contents"><draw:frame draw:name="img106" svg:width="0.41667in" svg:height="0.4166666666666667in"><draw:image xlink:href="Pictures/1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1" office:name=""><text:span text:style-name="Definition">Imports</text:span></text:a></text:p>
          </table:table-cell>
          <table:table-cell table:style-name="TableRowCell" office:value-type="string">
            <text:p text:style-name="Table_20_Contents">chart impo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4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.tsx#L86" office:name=""><text:span text:style-name="Definition">gui/LayoutsPage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07" svg:width="0.41667in" svg:height="0.4166666666666667in"><draw:image xlink:href="Pictures/10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7" office:name=""><text:span text:style-name="Definition">Layout</text:span></text:a></text:p>
          </table:table-cell>
          <table:table-cell table:style-name="TableRowCell" office:value-type="string">
            <text:p text:style-name="Table_20_Contents">select / 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2" office:name=""><text:span text:style-name="Definition"><text:span text:style-name="T1">LayoutFinish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8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08" svg:width="0.41667in" svg:height="0.4166666666666667in"><draw:image xlink:href="Pictures/1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3" office:name=""><text:span text:style-name="Definition">Layout</text:span></text:a></text:p>
          </table:table-cell>
          <table:table-cell table:style-name="TableRowCell" office:value-type="string">
            <text:p text:style-name="Table_20_Contents">finish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9" office:name=""><text:span text:style-name="Definition"><text:span text:style-name="T1">LockMark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13" office:name=""><text:span text:style-name="Definition">gui/NavPage.tsx</text:span></text:a></text:p>
          </table:table-cell>
          <table:table-cell table:style-name="TableRowCell" office:value-type="string">
            <text:p text:style-name="Table_20_Contents">LockMarker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109" svg:width="0.41667in" svg:height="0.4166666666666667in"><draw:image xlink:href="Pictures/10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8" office:name=""><text:span text:style-name="Definition">Start</text:span></text:a></text:p>
          </table:table-cell>
          <table:table-cell table:style-name="TableRowCell" office:value-type="string">
            <text:p text:style-name="Table_20_Contents">start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9" office:name=""><text:span text:style-name="Definition">LockMarker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5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5" office:name=""><text:span text:style-name="Definition"><text:span text:style-name="T1">LockPo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91" office:name=""><text:span text:style-name="Definition">gui/NavPage.tsx</text:span></text:a></text:p>
          </table:table-cell>
          <table:table-cell table:style-name="TableRowCell" office:value-type="string">
            <text:p text:style-name="Table_20_Contents">LockPos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10" svg:width="0.41667in" svg:height="0.4166666666666667in"><draw:image xlink:href="Pictures/1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5" office:name=""><text:span text:style-name="Definition">Lock</text:span></text:a></text:p>
          </table:table-cell>
          <table:table-cell table:style-name="TableRowCell" office:value-type="string">
            <text:p text:style-name="Table_20_Contents">lock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5" office:name=""><text:span text:style-name="Definition">LockPo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8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7" office:name=""><text:span text:style-name="Definition"><text:span text:style-name="T1">MainExi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9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11" svg:width="0.41667in" svg:height="0.4166666666666667in"><draw:image xlink:href="Pictures/1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" office:name=""><text:span text:style-name="Definition">Exit</text:span></text:a></text:p>
          </table:table-cell>
          <table:table-cell table:style-name="TableRowCell" office:value-type="string">
            <text:p text:style-name="Table_20_Contents">exit Av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7" office:name=""><text:span text:style-name="Definition">MainExit</text:span></text:a></text:p>
          </table:table-cell>
          <table:table-cell table:style-name="TableRowCell" office:value-type="string">
            <text:p text:style-name="Table_20_Contents"><text:a xlink:type="simple" xlink:href="../../viewer/gui/WarningPage.tsx#L125" office:name=""><text:span text:style-name="Definition">gui/Warning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9" office:name=""><text:span text:style-name="Definition"><text:span text:style-name="T1">MainInfo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112" svg:width="0.41667in" svg:height="0.4166666666666667in"><draw:image xlink:href="Pictures/1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0" office:name=""><text:span text:style-name="Definition">Info</text:span></text:a></text:p>
          </table:table-cell>
          <table:table-cell table:style-name="TableRowCell" office:value-type="string">
            <text:p text:style-name="Table_20_Contents">version and licen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7" office:name=""><text:span text:style-name="Definition"><text:span text:style-name="T1">Main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348" office:name=""><text:span text:style-name="Definition">gui/MainNav.tsx</text:span></text:a></text:p>
          </table:table-cell>
          <table:table-cell table:style-name="TableRowCell" office:value-type="string">
            <text:p text:style-name="Table_20_Contents">MainNav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menu-200.svg</text:span></text:a></text:p>
          </table:table-cell>
          <table:table-cell table:style-name="TableRowCell" office:value-type="string">
            <text:p text:style-name="Table_20_Contents"><draw:frame draw:name="img113" svg:width="0.41667in" svg:height="0.4166666666666667in"><draw:image xlink:href="Pictures/1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3" office:name=""><text:span text:style-name="Definition">Menu</text:span></text:a></text:p>
          </table:table-cell>
          <table:table-cell table:style-name="TableRowCell" office:value-type="string">
            <text:p text:style-name="Table_20_Contents">main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<text:span text:style-name="T1">NavAdd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7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14" svg:width="0.41667in" svg:height="0.4166666666666667in"><draw:image xlink:href="Pictures/1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2" office:name=""><text:span text:style-name="Definition">+ Before</text:span></text:a></text:p>
          </table:table-cell>
          <table:table-cell table:style-name="TableRowCell" office:value-type="string">
            <text:p text:style-name="Table_20_Contents">add before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NavAd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13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<text:span text:style-name="T1">NavAdd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8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15" svg:width="0.41667in" svg:height="0.4166666666666667in"><draw:image xlink:href="Pictures/1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9" office:name=""><text:span text:style-name="Definition">+ After</text:span></text:a></text:p>
          </table:table-cell>
          <table:table-cell table:style-name="TableRowCell" office:value-type="string">
            <text:p text:style-name="Table_20_Contents">add after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NavAddAf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96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<text:span text:style-name="T1">Nav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3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Delete</text:p>
          </table:table-cell>
          <table:table-cell table:style-name="TableRowCell" office:value-type="string">
            <text:p text:style-name="Table_20_Contents"><text:a xlink:type="simple" xlink:href="../../viewer/style/icons.less#L171" office:name=""><text:span text:style-name="Definition">wpminus.svg</text:span></text:a></text:p>
          </table:table-cell>
          <table:table-cell table:style-name="TableRowCell" office:value-type="string">
            <text:p text:style-name="Table_20_Contents"><draw:frame draw:name="img116" svg:width="0.41667in" svg:height="0.4166666666666667in"><draw:image xlink:href="Pictures/1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5" office:name=""><text:span text:style-name="Definition">Delete</text:span></text:a></text:p>
          </table:table-cell>
          <table:table-cell table:style-name="TableRowCell" office:value-type="string">
            <text:p text:style-name="Table_20_Contents">delete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3" office:name=""><text:span text:style-name="Definition"><text:span text:style-name="T1">NavGoto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5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17" svg:width="0.41667in" svg:height="0.4166666666666667in"><draw:image xlink:href="Pictures/1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1" office:name=""><text:span text:style-name="Definition">Start</text:span></text:a></text:p>
          </table:table-cell>
          <table:table-cell table:style-name="TableRowCell" office:value-type="string">
            <text:p text:style-name="Table_20_Contents">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3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63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3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72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3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17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0" office:name=""><text:span text:style-name="Definition"><text:span text:style-name="T1">NavMapWidget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75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MapWidgets</text:p>
          </table:table-cell>
          <table:table-cell table:style-name="TableRowCell" office:value-type="string">
            <text:p text:style-name="Table_20_Contents"><text:a xlink:type="simple" xlink:href="../../viewer/style/icons.less#L246" office:name=""><text:span text:style-name="Definition">assistant_nav.svg</text:span></text:a></text:p>
          </table:table-cell>
          <table:table-cell table:style-name="TableRowCell" office:value-type="string">
            <text:p text:style-name="Table_20_Contents"><draw:frame draw:name="img118" svg:width="0.41667in" svg:height="0.4166666666666667in"><draw:image xlink:href="Pictures/1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9" office:name=""><text:span text:style-name="Definition">On Map</text:span></text:a></text:p>
          </table:table-cell>
          <table:table-cell table:style-name="TableRowCell" office:value-type="string">
            <text:p text:style-name="Table_20_Contents">map 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7" office:name=""><text:span text:style-name="Definition"><text:span text:style-name="T1">NavNex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20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Next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nextwp.svg</text:span></text:a></text:p>
          </table:table-cell>
          <table:table-cell table:style-name="TableRowCell" office:value-type="string">
            <text:p text:style-name="Table_20_Contents"><draw:frame draw:name="img119" svg:width="0.41667in" svg:height="0.4166666666666667in"><draw:image xlink:href="Pictures/1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4" office:name=""><text:span text:style-name="Definition">Next</text:span></text:a></text:p>
          </table:table-cell>
          <table:table-cell table:style-name="TableRowCell" office:value-type="string">
            <text:p text:style-name="Table_20_Contents">goto 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<text:span text:style-name="T1">NavOverlay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8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electChart</text:p>
          </table:table-cell>
          <table:table-cell table:style-name="TableRowCell" office:value-type="string">
            <text:p text:style-name="Table_20_Contents"><text:a xlink:type="simple" xlink:href="../../viewer/style/icons.less#L183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20" svg:width="0.41667in" svg:height="0.4166666666666667in"><draw:image xlink:href="Pictures/1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0" office:name=""><text:span text:style-name="Definition">Charts</text:span></text:a></text:p>
          </table:table-cell>
          <table:table-cell table:style-name="TableRowCell" office:value-type="string">
            <text:p text:style-name="Table_20_Contents">charts/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gui/NavPage.tsx#L84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130" office:name=""><text:span text:style-name="Definition">components/Map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<text:span text:style-name="T1">Nav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35" office:name=""><text:span text:style-name="Definition">gui/NavPage.tsx</text:span></text:a></text:p>
          </table:table-cell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21" svg:width="0.41667in" svg:height="0.4166666666666667in"><draw:image xlink:href="Pictures/1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0" office:name=""><text:span text:style-name="Definition">Restart</text:span></text:a></text:p>
          </table:table-cell>
          <table:table-cell table:style-name="TableRowCell" office:value-type="string">
            <text:p text:style-name="Table_20_Contents">re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<text:span text:style-name="T1">NavTo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99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22" svg:width="0.41667in" svg:height="0.4166666666666667in"><draw:image xlink:href="Pictures/1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8" office:name=""><text:span text:style-name="Definition">Center</text:span></text:a></text:p>
          </table:table-cell>
          <table:table-cell table:style-name="TableRowCell" office:value-type="string">
            <text:p text:style-name="Table_20_Contents">wp to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NavToCen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44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7" office:name=""><text:span text:style-name="Definition"><text:span text:style-name="T1">Nigh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4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Night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night.svg</text:span></text:a></text:p>
          </table:table-cell>
          <table:table-cell table:style-name="TableRowCell" office:value-type="string">
            <text:p text:style-name="Table_20_Contents"><draw:frame draw:name="img123" svg:width="0.41667in" svg:height="0.4166666666666667in"><draw:image xlink:href="Pictures/1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" office:name=""><text:span text:style-name="Definition">Night</text:span></text:a></text:p>
          </table:table-cell>
          <table:table-cell table:style-name="TableRowCell" office:value-type="string">
            <text:p text:style-name="Table_20_Contents">night m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1" office:name=""><text:span text:style-name="Definition"><text:span text:style-name="T1">Overflo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uttonList.tsx#L169" office:name=""><text:span text:style-name="Definition">components/ButtonList.tsx</text:span></text:a></text:p>
          </table:table-cell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<text:a xlink:type="simple" xlink:href="../../viewer/style/icons.less#L264" office:name=""><text:span text:style-name="Definition">more_left.svg</text:span></text:a></text:p>
          </table:table-cell>
          <table:table-cell table:style-name="TableRowCell" office:value-type="string">
            <text:p text:style-name="Table_20_Contents"><draw:frame draw:name="img124" svg:width="0.41667in" svg:height="0.4166666666666667in"><draw:image xlink:href="Pictures/1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6" office:name=""><text:span text:style-name="Definition">More</text:span></text:a></text:p>
          </table:table-cell>
          <table:table-cell table:style-name="TableRowCell" office:value-type="string">
            <text:p text:style-name="Table_20_Contents">mo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4" office:name=""><text:span text:style-name="Definition"><text:span text:style-name="T1">Overlay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4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25" svg:width="0.41667in" svg:height="0.4166666666666667in"><draw:image xlink:href="Pictures/1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4" office:name=""><text:span text:style-name="Definition">Overlays</text:span></text:a></text:p>
          </table:table-cell>
          <table:table-cell table:style-name="TableRowCell" office:value-type="string">
            <text:p text:style-name="Table_20_Contents">overlay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<text:span text:style-name="T1">ReloadUI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65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26" svg:width="0.41667in" svg:height="0.4166666666666667in"><draw:image xlink:href="Pictures/1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" office:name=""><text:span text:style-name="Definition">Reload</text:span></text:a></text:p>
          </table:table-cell>
          <table:table-cell table:style-name="TableRowCell" office:value-type="string">
            <text:p text:style-name="Table_20_Contents">reload AvNav U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1" office:name=""><text:span text:style-name="Definition"><text:span text:style-name="T1">RemoteChann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95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RemoteChannel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settings_remote.svg</text:span></text:a></text:p>
          </table:table-cell>
          <table:table-cell table:style-name="TableRowCell" office:value-type="string">
            <text:p text:style-name="Table_20_Contents"><draw:frame draw:name="img127" svg:width="0.41667in" svg:height="0.4166666666666667in"><draw:image xlink:href="Pictures/1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" office:name=""><text:span text:style-name="Definition">Remote</text:span></text:a></text:p>
          </table:table-cell>
          <table:table-cell table:style-name="TableRowCell" office:value-type="string">
            <text:p text:style-name="Table_20_Contents">remote contro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6" office:name=""><text:span text:style-name="Definition"><text:span text:style-name="T1">Revert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layouthandler.ts#L1133" office:name=""><text:span text:style-name="Definition">util/layouthandler.ts</text:span></text:a></text:p>
          </table:table-cell>
          <table:table-cell table:style-name="TableRowCell" office:value-type="string">
            <text:p text:style-name="Table_20_Contents">Undo</text:p>
          </table:table-cell>
          <table:table-cell table:style-name="TableRowCell" office:value-type="string">
            <text:p text:style-name="Table_20_Contents"><text:a xlink:type="simple" xlink:href="../../viewer/style/icons.less#L249" office:name=""><text:span text:style-name="Definition">ic_undo.svg</text:span></text:a></text:p>
          </table:table-cell>
          <table:table-cell table:style-name="TableRowCell" office:value-type="string">
            <text:p text:style-name="Table_20_Contents"><draw:frame draw:name="img128" svg:width="0.41667in" svg:height="0.4166666666666667in"><draw:image xlink:href="Pictures/1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6" office:name=""><text:span text:style-name="Definition">Undo</text:span></text:a></text:p>
          </table:table-cell>
          <table:table-cell table:style-name="TableRowCell" office:value-type="string">
            <text:p text:style-name="Table_20_Contents">undo layout chan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2" office:name=""><text:span text:style-name="Definition"><text:span text:style-name="T1">RouteAdd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31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29" svg:width="0.41667in" svg:height="0.4166666666666667in"><draw:image xlink:href="Pictures/1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7" office:name=""><text:span text:style-name="Definition">Add</text:span></text:a></text:p>
          </table:table-cell>
          <table:table-cell table:style-name="TableRowCell" office:value-type="string">
            <text:p text:style-name="Table_20_Contents">add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3" office:name=""><text:span text:style-name="Definition"><text:span text:style-name="T1">RouteMenu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7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Menu</text:p>
          </table:table-cell>
          <table:table-cell table:style-name="TableRowCell" office:value-type="string">
            <text:p text:style-name="Table_20_Contents"><text:a xlink:type="simple" xlink:href="../../viewer/style/icons.less#L180" office:name=""><text:span text:style-name="Definition">menu_open.svg</text:span></text:a></text:p>
          </table:table-cell>
          <table:table-cell table:style-name="TableRowCell" office:value-type="string">
            <text:p text:style-name="Table_20_Contents"><draw:frame draw:name="img130" svg:width="0.41667in" svg:height="0.4166666666666667in"><draw:image xlink:href="Pictures/1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6" office:name=""><text:span text:style-name="Definition">Menu</text:span></text:a></text:p>
          </table:table-cell>
          <table:table-cell table:style-name="TableRowCell" office:value-type="string">
            <text:p text:style-name="Table_20_Contents">route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0" office:name=""><text:span text:style-name="Definition"><text:span text:style-name="T1">SectionView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ection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category-200.svg</text:span></text:a></text:p>
          </table:table-cell>
          <table:table-cell table:style-name="TableRowCell" office:value-type="string">
            <text:p text:style-name="Table_20_Contents"><draw:frame draw:name="img131" svg:width="0.41667in" svg:height="0.4166666666666667in"><draw:image xlink:href="Pictures/1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1" office:name=""><text:span text:style-name="Definition">Groups</text:span></text:a></text:p>
          </table:table-cell>
          <table:table-cell table:style-name="TableRowCell" office:value-type="string">
            <text:p text:style-name="Table_20_Contents">settings grou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<text:span text:style-name="T1">ServerView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1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Server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atabase-200.svg</text:span></text:a></text:p>
          </table:table-cell>
          <table:table-cell table:style-name="TableRowCell" office:value-type="string">
            <text:p text:style-name="Table_20_Contents"><draw:frame draw:name="img132" svg:width="0.41667in" svg:height="0.4166666666666667in"><draw:image xlink:href="Pictures/1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9" office:name=""><text:span text:style-name="Definition">Server</text:span></text:a></text:p>
          </table:table-cell>
          <table:table-cell table:style-name="TableRowCell" office:value-type="string">
            <text:p text:style-name="Table_20_Contents">server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0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0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1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8" office:name=""><text:span text:style-name="Definition"><text:span text:style-name="T1">SettingsDefault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8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133" svg:width="0.41667in" svg:height="0.4166666666666667in"><draw:image xlink:href="Pictures/1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7" office:name=""><text:span text:style-name="Definition">Defaults</text:span></text:a></text:p>
          </table:table-cell>
          <table:table-cell table:style-name="TableRowCell" office:value-type="string">
            <text:p text:style-name="Table_20_Contents">reset to defaul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4" office:name=""><text:span text:style-name="Definition"><text:span text:style-name="T1">Setting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34" svg:width="0.41667in" svg:height="0.4166666666666667in"><draw:image xlink:href="Pictures/1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4" office:name=""><text:span text:style-name="Definition">List</text:span></text:a></text:p>
          </table:table-cell>
          <table:table-cell table:style-name="TableRowCell" office:value-type="string">
            <text:p text:style-name="Table_20_Contents">store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4" office:name=""><text:span text:style-name="Definition"><text:span text:style-name="T1">SettingsLayoutOff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296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Off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ballot-off.svg</text:span></text:a></text:p>
          </table:table-cell>
          <table:table-cell table:style-name="TableRowCell" office:value-type="string">
            <text:p text:style-name="Table_20_Contents"><draw:frame draw:name="img135" svg:width="0.41667in" svg:height="0.4166666666666667in"><draw:image xlink:href="Pictures/1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9" office:name=""><text:span text:style-name="Definition">Rem</text:span></text:a></text:p>
          </table:table-cell>
          <table:table-cell table:style-name="TableRowCell" office:value-type="string">
            <text:p text:style-name="Table_20_Contents">remove from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2" office:name=""><text:span text:style-name="Definition"><text:span text:style-name="T1">Settings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4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136" svg:width="0.41667in" svg:height="0.4166666666666667in"><draw:image xlink:href="Pictures/1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0" office:name=""><text:span text:style-name="Definition">Load</text:span></text:a></text:p>
          </table:table-cell>
          <table:table-cell table:style-name="TableRowCell" office:value-type="string">
            <text:p text:style-name="Table_20_Contents">loa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6" office:name=""><text:span text:style-name="Definition"><text:span text:style-name="T1">SettingsSave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56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137" svg:width="0.41667in" svg:height="0.4166666666666667in"><draw:image xlink:href="Pictures/1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3" office:name=""><text:span text:style-name="Definition">Save</text:span></text:a></text:p>
          </table:table-cell>
          <table:table-cell table:style-name="TableRowCell" office:value-type="string">
            <text:p text:style-name="Table_20_Contents">save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0" office:name=""><text:span text:style-name="Definition"><text:span text:style-name="T1">SettingsSplitReset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8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plitReset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reset_split.svg</text:span></text:a></text:p>
          </table:table-cell>
          <table:table-cell table:style-name="TableRowCell" office:value-type="string">
            <text:p text:style-name="Table_20_Contents"><draw:frame draw:name="img138" svg:width="0.41667in" svg:height="0.4166666666666667in"><draw:image xlink:href="Pictures/1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6" office:name=""><text:span text:style-name="Definition">Reset</text:span></text:a></text:p>
          </table:table-cell>
          <table:table-cell table:style-name="TableRowCell" office:value-type="string">
            <text:p text:style-name="Table_20_Contents">reset spli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7" office:name=""><text:span text:style-name="Definition"><text:span text:style-name="T1">ShowRoutePanel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38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39" svg:width="0.41667in" svg:height="0.4166666666666667in"><draw:image xlink:href="Pictures/1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4" office:name=""><text:span text:style-name="Definition">Route</text:span></text:a></text:p>
          </table:table-cell>
          <table:table-cell table:style-name="TableRowCell" office:value-type="string">
            <text:p text:style-name="Table_20_Contents">edit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7" office:name=""><text:span text:style-name="Definition">ShowRoutePanel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<text:span text:style-name="T1">Show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43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Settings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40" svg:width="0.41667in" svg:height="0.4166666666666667in"><draw:image xlink:href="Pictures/1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2" office:name=""><text:span text:style-name="Definition">Display</text:span></text:a></text:p>
          </table:table-cell>
          <table:table-cell table:style-name="TableRowCell" office:value-type="string">
            <text:p text:style-name="Table_20_Contents">display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52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8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emotePageButtons.ts#L31" office:name=""><text:span text:style-name="Definition">gui/Remote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81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7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9" office:name=""><text:span text:style-name="Definition"><text:span text:style-name="T1">Split</text:span></text:span></text:a></text:p>
          </table:table-cell>
          <table:table-cell table:style-name="TableRowCell" office:value-type="string">
            <text:p text:style-name="Table_20_Contents"><text:a xlink:type="simple" xlink:href="../../viewer/util/splitsupport.ts#L122" office:name=""><text:span text:style-name="Definition">util/splitsupport.ts</text:span></text:a></text:p>
          </table:table-cell>
          <table:table-cell table:style-name="TableRowCell" office:value-type="string">
            <text:p text:style-name="Table_20_Contents">Split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vertical_split.svg</text:span></text:a></text:p>
          </table:table-cell>
          <table:table-cell table:style-name="TableRowCell" office:value-type="string">
            <text:p text:style-name="Table_20_Contents"><draw:frame draw:name="img141" svg:width="0.41667in" svg:height="0.4166666666666667in"><draw:image xlink:href="Pictures/1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" office:name=""><text:span text:style-name="Definition">Split</text:span></text:a></text:p>
          </table:table-cell>
          <table:table-cell table:style-name="TableRowCell" office:value-type="string">
            <text:p text:style-name="Table_20_Contents">split displa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1" office:name=""><text:span text:style-name="Definition"><text:span text:style-name="T1">StatusAdd</text:span></text:span></text:a></text:p>
          </table:table-cell>
          <table:table-cell table:style-name="TableRowCell" office:value-type="string">
            <text:p text:style-name="Table_20_Contents"><text:a xlink:type="simple" xlink:href="../../viewer/gui/ChannelsPageButtons.ts#L31" office:name=""><text:span text:style-name="Definition">gui/Channels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42" svg:width="0.41667in" svg:height="0.4166666666666667in"><draw:image xlink:href="Pictures/1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4" office:name=""><text:span text:style-name="Definition">Add</text:span></text:a></text:p>
          </table:table-cell>
          <table:table-cell table:style-name="TableRowCell" office:value-type="string">
            <text:p text:style-name="Table_20_Contents">add conne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1" office:name=""><text:span text:style-name="Definition">StatusAdd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88" office:name=""><text:span text:style-name="Definition">gui/Server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1" office:name=""><text:span text:style-name="Definition"><text:span text:style-name="T1">StatusAddresses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QRCode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qrcode.svg</text:span></text:a></text:p>
          </table:table-cell>
          <table:table-cell table:style-name="TableRowCell" office:value-type="string">
            <text:p text:style-name="Table_20_Contents"><draw:frame draw:name="img143" svg:width="0.41667in" svg:height="0.4166666666666667in"><draw:image xlink:href="Pictures/1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9" office:name=""><text:span text:style-name="Definition">Net</text:span></text:a></text:p>
          </table:table-cell>
          <table:table-cell table:style-name="TableRowCell" office:value-type="string">
            <text:p text:style-name="Table_20_Contents">own network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3" office:name=""><text:span text:style-name="Definition"><text:span text:style-name="T1">StatusAll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Expand</text:p>
          </table:table-cell>
          <table:table-cell table:style-name="TableRowCell" office:value-type="string">
            <text:p text:style-name="Table_20_Contents"><text:a xlink:type="simple" xlink:href="../../viewer/style/icons.less#L40" office:name=""><text:span text:style-name="Definition">expand-all-200.svg</text:span></text:a></text:p>
          </table:table-cell>
          <table:table-cell table:style-name="TableRowCell" office:value-type="string">
            <text:p text:style-name="Table_20_Contents"><draw:frame draw:name="img144" svg:width="0.41667in" svg:height="0.4166666666666667in"><draw:image xlink:href="Pictures/1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3" office:name=""><text:span text:style-name="Definition">Expand</text:span></text:a></text:p>
          </table:table-cell>
          <table:table-cell table:style-name="TableRowCell" office:value-type="string">
            <text:p text:style-name="Table_20_Contents">show al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5" office:name=""><text:span text:style-name="Definition"><text:span text:style-name="T1">StatusAndroid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Android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ic_android.svg</text:span></text:a></text:p>
          </table:table-cell>
          <table:table-cell table:style-name="TableRowCell" office:value-type="string">
            <text:p text:style-name="Table_20_Contents"><draw:frame draw:name="img145" svg:width="0.41667in" svg:height="0.4166666666666667in"><draw:image xlink:href="Pictures/1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2" office:name=""><text:span text:style-name="Definition">Android</text:span></text:a></text:p>
          </table:table-cell>
          <table:table-cell table:style-name="TableRowCell" office:value-type="string">
            <text:p text:style-name="Table_20_Contents">androi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5" office:name=""><text:span text:style-name="Definition"><text:span text:style-name="T1">StatusDebu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73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Debug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bug_report.svg</text:span></text:a></text:p>
          </table:table-cell>
          <table:table-cell table:style-name="TableRowCell" office:value-type="string">
            <text:p text:style-name="Table_20_Contents"><draw:frame draw:name="img146" svg:width="0.41667in" svg:height="0.4166666666666667in"><draw:image xlink:href="Pictures/1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7" office:name=""><text:span text:style-name="Definition">Debug</text:span></text:a></text:p>
          </table:table-cell>
          <table:table-cell table:style-name="TableRowCell" office:value-type="string">
            <text:p text:style-name="Table_20_Contents">enable debu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1" office:name=""><text:span text:style-name="Definition"><text:span text:style-name="T1">StatusLo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47" svg:width="0.41667in" svg:height="0.4166666666666667in"><draw:image xlink:href="Pictures/1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4" office:name=""><text:span text:style-name="Definition">Log</text:span></text:a></text:p>
          </table:table-cell>
          <table:table-cell table:style-name="TableRowCell" office:value-type="string">
            <text:p text:style-name="Table_20_Contents">AvNav 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7" office:name=""><text:span text:style-name="Definition"><text:span text:style-name="T1">Status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48" svg:width="0.41667in" svg:height="0.4166666666666667in"><draw:image xlink:href="Pictures/1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1" office:name=""><text:span text:style-name="Definition">Restart</text:span></text:a></text:p>
          </table:table-cell>
          <table:table-cell table:style-name="TableRowCell" office:value-type="string">
            <text:p text:style-name="Table_20_Contents">restart AvNav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3" office:name=""><text:span text:style-name="Definition"><text:span text:style-name="T1">StatusShutdown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124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Shutdown</text:p>
          </table:table-cell>
          <table:table-cell table:style-name="TableRowCell" office:value-type="string">
            <text:p text:style-name="Table_20_Contents"><text:a xlink:type="simple" xlink:href="../../viewer/style/icons.less#L225" office:name=""><text:span text:style-name="Definition">ic_power.svg</text:span></text:a></text:p>
          </table:table-cell>
          <table:table-cell table:style-name="TableRowCell" office:value-type="string">
            <text:p text:style-name="Table_20_Contents"><draw:frame draw:name="img149" svg:width="0.41667in" svg:height="0.4166666666666667in"><draw:image xlink:href="Pictures/1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8" office:name=""><text:span text:style-name="Definition">Halt</text:span></text:a></text:p>
          </table:table-cell>
          <table:table-cell table:style-name="TableRowCell" office:value-type="string">
            <text:p text:style-name="Table_20_Contents">shutdown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7" office:name=""><text:span text:style-name="Definition"><text:span text:style-name="T1">StatusWpa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150" svg:width="0.41667in" svg:height="0.4166666666666667in"><draw:image xlink:href="Pictures/1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6" office:name=""><text:span text:style-name="Definition">Wifi</text:span></text:a></text:p>
          </table:table-cell>
          <table:table-cell table:style-name="TableRowCell" office:value-type="string">
            <text:p text:style-name="Table_20_Contents">configure Wif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<text:span text:style-name="T1">StopNav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6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Stop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51" svg:width="0.41667in" svg:height="0.4166666666666667in"><draw:image xlink:href="Pictures/1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3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65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62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82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6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4" office:name=""><text:span text:style-name="Definition"><text:span text:style-name="T1">Stored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3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52" svg:width="0.41667in" svg:height="0.4166666666666667in"><draw:image xlink:href="Pictures/1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6" office:name=""><text:span text:style-name="Definition">List</text:span></text:a></text:p>
          </table:table-cell>
          <table:table-cell table:style-name="TableRowCell" office:value-type="string">
            <text:p text:style-name="Table_20_Contents">list stored 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6" office:name=""><text:span text:style-name="Definition"><text:span text:style-name="T1">Sync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44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Sync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sync.svg</text:span></text:a></text:p>
          </table:table-cell>
          <table:table-cell table:style-name="TableRowCell" office:value-type="string">
            <text:p text:style-name="Table_20_Contents"><draw:frame draw:name="img153" svg:width="0.41667in" svg:height="0.4166666666666667in"><draw:image xlink:href="Pictures/1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0" office:name=""><text:span text:style-name="Definition">Sync</text:span></text:a></text:p>
          </table:table-cell>
          <table:table-cell table:style-name="TableRowCell" office:value-type="string">
            <text:p text:style-name="Table_20_Contents">sync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9" office:name=""><text:span text:style-name="Definition"><text:span text:style-name="T1">TrackItems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4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54" svg:width="0.41667in" svg:height="0.4166666666666667in"><draw:image xlink:href="Pictures/1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3" office:name=""><text:span text:style-name="Definition">List</text:span></text:a></text:p>
          </table:table-cell>
          <table:table-cell table:style-name="TableRowCell" office:value-type="string">
            <text:p text:style-name="Table_20_Contents">list tracks / lo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<text:span text:style-name="T1">Up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70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Upload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ic_file_upload.svg</text:span></text:a></text:p>
          </table:table-cell>
          <table:table-cell table:style-name="TableRowCell" office:value-type="string">
            <text:p text:style-name="Table_20_Contents"><draw:frame draw:name="img155" svg:width="0.41667in" svg:height="0.4166666666666667in"><draw:image xlink:href="Pictures/1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5" office:name=""><text:span text:style-name="Definition">Upload</text:span></text:a></text:p>
          </table:table-cell>
          <table:table-cell table:style-name="TableRowCell" office:value-type="string">
            <text:p text:style-name="Table_20_Contents">import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29" office:name=""><text:span text:style-name="Definition">gui/Layou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7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298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6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PluginsPageButtons.ts#L31" office:name=""><text:span text:style-name="Definition">gui/Plugin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63" office:name=""><text:span text:style-name="Definition">components/Edi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19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4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IconDialog.jsx#L144" office:name=""><text:span text:style-name="Definition">components/Icon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<text:span text:style-name="T1">WpEdi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8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56" svg:width="0.41667in" svg:height="0.4166666666666667in"><draw:image xlink:href="Pictures/1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1" office:name=""><text:span text:style-name="Definition">Edit</text:span></text:a></text:p>
          </table:table-cell>
          <table:table-cell table:style-name="TableRowCell" office:value-type="string">
            <text:p text:style-name="Table_20_Contents">edi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WpEdit</text:span></text:a></text:p>
          </table:table-cell>
          <table:table-cell table:style-name="TableRowCell" office:value-type="string">
            <text:p text:style-name="Table_20_Contents"><text:a xlink:type="simple" xlink:href="../../viewer/gui/NavPage.tsx#L28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1" office:name=""><text:span text:style-name="Definition"><text:span text:style-name="T1">WpGoto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06" office:name=""><text:span text:style-name="Definition">gui/NavPage.tsx</text:span></text:a></text:p>
          </table:table-cell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57" svg:width="0.41667in" svg:height="0.4166666666666667in"><draw:image xlink:href="Pictures/1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7" office:name=""><text:span text:style-name="Definition">Start</text:span></text:a></text:p>
          </table:table-cell>
          <table:table-cell table:style-name="TableRowCell" office:value-type="string">
            <text:p text:style-name="Table_20_Contents">start w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<text:span text:style-name="T1">WpLoca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7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58" svg:width="0.41667in" svg:height="0.4166666666666667in"><draw:image xlink:href="Pictures/1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8" office:name=""><text:span text:style-name="Definition">Locate</text:span></text:a></text:p>
          </table:table-cell>
          <table:table-cell table:style-name="TableRowCell" office:value-type="string">
            <text:p text:style-name="Table_20_Contents">center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WpLocate</text:span></text:a></text:p>
          </table:table-cell>
          <table:table-cell table:style-name="TableRowCell" office:value-type="string">
            <text:p text:style-name="Table_20_Contents"><text:a xlink:type="simple" xlink:href="../../viewer/gui/NavPage.tsx#L27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<text:span text:style-name="T1">WpNex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9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Next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c_arrow_forward.svg</text:span></text:a></text:p>
          </table:table-cell>
          <table:table-cell table:style-name="TableRowCell" office:value-type="string">
            <text:p text:style-name="Table_20_Contents"><draw:frame draw:name="img159" svg:width="0.41667in" svg:height="0.4166666666666667in"><draw:image xlink:href="Pictures/1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4" office:name=""><text:span text:style-name="Definition">Next</text:span></text:a></text:p>
          </table:table-cell>
          <table:table-cell table:style-name="TableRowCell" office:value-type="string">
            <text:p text:style-name="Table_20_Contents">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WpNext</text:span></text:a></text:p>
          </table:table-cell>
          <table:table-cell table:style-name="TableRowCell" office:value-type="string">
            <text:p text:style-name="Table_20_Contents"><text:a xlink:type="simple" xlink:href="../../viewer/gui/NavPage.tsx#L34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<text:span text:style-name="T1">WpPreviou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0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Previou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60" svg:width="0.41667in" svg:height="0.4166666666666667in"><draw:image xlink:href="Pictures/1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7" office:name=""><text:span text:style-name="Definition">Previous</text:span></text:a></text:p>
          </table:table-cell>
          <table:table-cell table:style-name="TableRowCell" office:value-type="string">
            <text:p text:style-name="Table_20_Contents">previous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WpPrevious</text:span></text:a></text:p>
          </table:table-cell>
          <table:table-cell table:style-name="TableRowCell" office:value-type="string">
            <text:p text:style-name="Table_20_Contents"><text:a xlink:type="simple" xlink:href="../../viewer/gui/NavPage.tsx#L36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<text:span text:style-name="T1">ZoomIn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8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In</text:p>
          </table:table-cell>
          <table:table-cell table:style-name="TableRowCell" office:value-type="string">
            <text:p text:style-name="Table_20_Contents"><text:a xlink:type="simple" xlink:href="../../viewer/style/icons.less#L186" office:name=""><text:span text:style-name="Definition">ic_zoom_in.svg</text:span></text:a></text:p>
          </table:table-cell>
          <table:table-cell table:style-name="TableRowCell" office:value-type="string">
            <text:p text:style-name="Table_20_Contents"><draw:frame draw:name="img161" svg:width="0.41667in" svg:height="0.4166666666666667in"><draw:image xlink:href="Pictures/1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3" office:name=""><text:span text:style-name="Definition">Zoom +</text:span></text:a></text:p>
          </table:table-cell>
          <table:table-cell table:style-name="TableRowCell" office:value-type="string">
            <text:p text:style-name="Table_20_Contents">zoom 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.tsx#L78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0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<text:span text:style-name="T1">ZoomOu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9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Out</text:p>
          </table:table-cell>
          <table:table-cell table:style-name="TableRowCell" office:value-type="string">
            <text:p text:style-name="Table_20_Contents"><text:a xlink:type="simple" xlink:href="../../viewer/style/icons.less#L189" office:name=""><text:span text:style-name="Definition">ic_zoom_out.svg</text:span></text:a></text:p>
          </table:table-cell>
          <table:table-cell table:style-name="TableRowCell" office:value-type="string">
            <text:p text:style-name="Table_20_Contents"><draw:frame draw:name="img162" svg:width="0.41667in" svg:height="0.4166666666666667in"><draw:image xlink:href="Pictures/1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6" office:name=""><text:span text:style-name="Definition">Zoom -</text:span></text:a></text:p>
          </table:table-cell>
          <table:table-cell table:style-name="TableRowCell" office:value-type="string">
            <text:p text:style-name="Table_20_Contents">zoom 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.tsx#L78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s"/>Icons<text:bookmark-end text:name="icons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Usag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images/icons-new#L198" office:name=""><text:span text:style-name="Definition"><text:span text:style-name="T1">Ancho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8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63" svg:width="0.41667in" svg:height="0.4166666666666667in"><draw:image xlink:href="Pictures/16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8" office:name=""><text:span text:style-name="Definition">Anchor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2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01" office:name=""><text:span text:style-name="Definition"><text:span text:style-name="T1">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56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64" svg:width="0.41667in" svg:height="0.4166666666666667in"><draw:image xlink:href="Pictures/16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6" office:name=""><text:span text:style-name="Definition"><text:span text:style-name="T1">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ressPage.tsx#L40" office:name=""><text:span text:style-name="Definition">gui/Addres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65" svg:width="0.41667in" svg:height="0.4166666666666667in"><draw:image xlink:href="Pictures/16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<text:span text:style-name="T1">Chart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66" svg:width="0.41667in" svg:height="0.4166666666666667in"><draw:image xlink:href="Pictures/16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9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4" office:name=""><text:span text:style-name="Definition"><text:span text:style-name="T1">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4" office:name=""><text:span text:style-name="Definition">checkbox-marked-outline.svg</text:span></text:a></text:p>
          </table:table-cell>
          <table:table-cell table:style-name="TableRowCell" office:value-type="string">
            <text:p text:style-name="Table_20_Contents"><draw:frame draw:name="img167" svg:width="0.41667in" svg:height="0.4166666666666667in"><draw:image xlink:href="Pictures/16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23" office:name=""><text:span text:style-name="Definition"><text:span text:style-name="T1">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86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3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168" svg:width="0.41667in" svg:height="0.4166666666666667in"><draw:image xlink:href="Pictures/16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5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69" svg:width="0.41667in" svg:height="0.4166666666666667in"><draw:image xlink:href="Pictures/16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0" office:name=""><text:span text:style-name="Definition"><text:span text:style-name="T1">ITDirectory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0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170" svg:width="0.41667in" svg:height="0.4166666666666667in"><draw:image xlink:href="Pictures/16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4" office:name=""><text:span text:style-name="Definition"><text:span text:style-name="T1">ITHtm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4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71" svg:width="0.41667in" svg:height="0.4166666666666667in"><draw:image xlink:href="Pictures/17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3" office:name=""><text:span text:style-name="Definition"><text:span text:style-name="T1">ITOth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3" office:name=""><text:span text:style-name="Definition">draft.svg</text:span></text:a></text:p>
          </table:table-cell>
          <table:table-cell table:style-name="TableRowCell" office:value-type="string">
            <text:p text:style-name="Table_20_Contents"><draw:frame draw:name="img172" svg:width="0.41667in" svg:height="0.4166666666666667in"><draw:image xlink:href="Pictures/17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8" office:name=""><text:span text:style-name="Definition"><text:span text:style-name="T1">ITServ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8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173" svg:width="0.41667in" svg:height="0.4166666666666667in"><draw:image xlink:href="Pictures/17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7" office:name=""><text:span text:style-name="Definition"><text:span text:style-name="T1">ITTex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7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74" svg:width="0.41667in" svg:height="0.4166666666666667in"><draw:image xlink:href="Pictures/17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1" office:name=""><text:span text:style-name="Definition"><text:span text:style-name="T1">ITUserSpecia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4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1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75" svg:width="0.41667in" svg:height="0.4166666666666667in"><draw:image xlink:href="Pictures/17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" office:name=""><text:span text:style-name="Definition"><text:span text:style-name="T1">Image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1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176" svg:width="0.41667in" svg:height="0.4166666666666667in"><draw:image xlink:href="Pictures/17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1" office:name=""><text:span text:style-name="Definition"><text:span text:style-name="T1">JSChang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9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1" office:name=""><text:span text:style-name="Definition">javascript.svg</text:span></text:a></text:p>
          </table:table-cell>
          <table:table-cell table:style-name="TableRowCell" office:value-type="string">
            <text:p text:style-name="Table_20_Contents"><draw:frame draw:name="img177" svg:width="0.41667in" svg:height="0.4166666666666667in"><draw:image xlink:href="Pictures/17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07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78" svg:width="0.41667in" svg:height="0.4166666666666667in"><draw:image xlink:href="Pictures/17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8" office:name=""><text:span text:style-name="Definition"><text:span text:style-name="T1">Lef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57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8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179" svg:width="0.41667in" svg:height="0.4166666666666667in"><draw:image xlink:href="Pictures/17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1" office:name=""><text:span text:style-name="Definition"><text:span text:style-name="T1">MNCat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74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1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80" svg:width="0.41667in" svg:height="0.4166666666666667in"><draw:image xlink:href="Pictures/17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4" office:name=""><text:span text:style-name="Definition"><text:span text:style-name="T1">MNCatSe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75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build-200.svg</text:span></text:a></text:p>
          </table:table-cell>
          <table:table-cell table:style-name="TableRowCell" office:value-type="string">
            <text:p text:style-name="Table_20_Contents"><draw:frame draw:name="img181" svg:width="0.41667in" svg:height="0.4166666666666667in"><draw:image xlink:href="Pictures/18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3" office:name=""><text:span text:style-name="Definition"><text:span text:style-name="T1">MNCollaps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264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3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82" svg:width="0.41667in" svg:height="0.4166666666666667in"><draw:image xlink:href="Pictures/18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7" office:name=""><text:span text:style-name="Definition"><text:span text:style-name="T1">MNExpand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7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83" svg:width="0.41667in" svg:height="0.4166666666666667in"><draw:image xlink:href="Pictures/18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7" office:name=""><text:span text:style-name="Definition">MNExpanded</text:span></text:a></text:p>
          </table:table-cell>
          <table:table-cell table:style-name="TableRowCell" office:value-type="string">
            <text:p text:style-name="Table_20_Contents"><text:a xlink:type="simple" xlink:href="../../viewer/gui/MainNav.tsx#L272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10" office:name=""><text:span text:style-name="Definition"><text:span text:style-name="T1">MO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ob.ts#L61" office:name=""><text:span text:style-name="Definition">components/Mob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drowning.svg</text:span></text:a></text:p>
          </table:table-cell>
          <table:table-cell table:style-name="TableRowCell" office:value-type="string">
            <text:p text:style-name="Table_20_Contents"><draw:frame draw:name="img184" svg:width="0.41667in" svg:height="0.4166666666666667in"><draw:image xlink:href="Pictures/18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4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5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4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85" svg:width="0.41667in" svg:height="0.4166666666666667in"><draw:image xlink:href="Pictures/18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4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3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0" office:name=""><text:span text:style-name="Definition"><text:span text:style-name="T1">MeasureFla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27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0" office:name=""><text:span text:style-name="Definition">outlined_flag.svg</text:span></text:a></text:p>
          </table:table-cell>
          <table:table-cell table:style-name="TableRowCell" office:value-type="string">
            <text:p text:style-name="Table_20_Contents"><draw:frame draw:name="img186" svg:width="0.41667in" svg:height="0.4166666666666667in"><draw:image xlink:href="Pictures/18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<text:span text:style-name="T1">M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8" office:name=""><text:span text:style-name="Definition">ic_chevron_right.svg</text:span></text:a></text:p>
          </table:table-cell>
          <table:table-cell table:style-name="TableRowCell" office:value-type="string">
            <text:p text:style-name="Table_20_Contents"><draw:frame draw:name="img187" svg:width="0.41667in" svg:height="0.4166666666666667in"><draw:image xlink:href="Pictures/18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7" office:name=""><text:span text:style-name="Definition"><text:span text:style-name="T1">NavStop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6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88" svg:width="0.41667in" svg:height="0.4166666666666667in"><draw:image xlink:href="Pictures/18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<text:span text:style-name="T1">Overlay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2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89" svg:width="0.41667in" svg:height="0.4166666666666667in"><draw:image xlink:href="Pictures/18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ChartsSelectDialog.tsx#L67" office:name=""><text:span text:style-name="Definition">components/ChartsSelec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0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" office:name=""><text:span text:style-name="Definition"><text:span text:style-name="T1">Plugin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3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" office:name=""><text:span text:style-name="Definition">extension.svg</text:span></text:a></text:p>
          </table:table-cell>
          <table:table-cell table:style-name="TableRowCell" office:value-type="string">
            <text:p text:style-name="Table_20_Contents"><draw:frame draw:name="img190" svg:width="0.41667in" svg:height="0.4166666666666667in"><draw:image xlink:href="Pictures/18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0" office:name=""><text:span text:style-name="Definition"><text:span text:style-name="T1">Radio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0" office:name=""><text:span text:style-name="Definition">radio_button_checked.svg</text:span></text:a></text:p>
          </table:table-cell>
          <table:table-cell table:style-name="TableRowCell" office:value-type="string">
            <text:p text:style-name="Table_20_Contents"><draw:frame draw:name="img191" svg:width="0.41667in" svg:height="0.4166666666666667in"><draw:image xlink:href="Pictures/19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1" office:name=""><text:span text:style-name="Definition"><text:span text:style-name="T1">Righ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3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92" svg:width="0.41667in" svg:height="0.4166666666666667in"><draw:image xlink:href="Pictures/19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<text:span text:style-name="T1">Route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93" svg:width="0.41667in" svg:height="0.4166666666666667in"><draw:image xlink:href="Pictures/19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<text:span text:style-name="T1">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281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94" svg:width="0.41667in" svg:height="0.4166666666666667in"><draw:image xlink:href="Pictures/19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9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2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<text:span text:style-name="T1">Track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" office:name=""><text:span text:style-name="Definition">track.svg</text:span></text:a></text:p>
          </table:table-cell>
          <table:table-cell table:style-name="TableRowCell" office:value-type="string">
            <text:p text:style-name="Table_20_Contents"><draw:frame draw:name="img195" svg:width="0.41667in" svg:height="0.4166666666666667in"><draw:image xlink:href="Pictures/19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7" office:name=""><text:span text:style-name="Definition"><text:span text:style-name="T1">Us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0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196" svg:width="0.41667in" svg:height="0.4166666666666667in"><draw:image xlink:href="Pictures/19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3" office:name=""><text:span text:style-name="Definition"><text:span text:style-name="T1">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197" svg:width="0.41667in" svg:height="0.4166666666666667in"><draw:image xlink:href="Pictures/19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6" office:name=""><text:span text:style-name="Definition"><text:span text:style-name="T1">Waypoin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42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6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198" svg:width="0.41667in" svg:height="0.4166666666666667in"><draw:image xlink:href="Pictures/19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6" office:name=""><text:span text:style-name="Definition">Waypoint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1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5-10T14:13:15Z</meta:creation-date>
    <dc:date>2026-05-10T14:13:15Z</dc:date>
  </office:meta>
</office:document-meta>
</file>