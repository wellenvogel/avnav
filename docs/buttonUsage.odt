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701.svg"/>
  <manifest:file-entry manifest:media-type="image/svg+xml" manifest:full-path="Pictures/700.svg"/>
  <manifest:file-entry manifest:media-type="image/svg+xml" manifest:full-path="Pictures/699.svg"/>
  <manifest:file-entry manifest:media-type="image/svg+xml" manifest:full-path="Pictures/698.svg"/>
  <manifest:file-entry manifest:media-type="image/svg+xml" manifest:full-path="Pictures/697.svg"/>
  <manifest:file-entry manifest:media-type="image/svg+xml" manifest:full-path="Pictures/696.svg"/>
  <manifest:file-entry manifest:media-type="image/svg+xml" manifest:full-path="Pictures/695.svg"/>
  <manifest:file-entry manifest:media-type="image/svg+xml" manifest:full-path="Pictures/694.svg"/>
  <manifest:file-entry manifest:media-type="image/svg+xml" manifest:full-path="Pictures/693.svg"/>
  <manifest:file-entry manifest:media-type="image/svg+xml" manifest:full-path="Pictures/692.svg"/>
  <manifest:file-entry manifest:media-type="image/svg+xml" manifest:full-path="Pictures/691.svg"/>
  <manifest:file-entry manifest:media-type="image/svg+xml" manifest:full-path="Pictures/690.svg"/>
  <manifest:file-entry manifest:media-type="image/svg+xml" manifest:full-path="Pictures/689.svg"/>
  <manifest:file-entry manifest:media-type="image/svg+xml" manifest:full-path="Pictures/688.svg"/>
  <manifest:file-entry manifest:media-type="image/svg+xml" manifest:full-path="Pictures/687.svg"/>
  <manifest:file-entry manifest:media-type="image/svg+xml" manifest:full-path="Pictures/686.svg"/>
  <manifest:file-entry manifest:media-type="image/svg+xml" manifest:full-path="Pictures/685.svg"/>
  <manifest:file-entry manifest:media-type="image/svg+xml" manifest:full-path="Pictures/684.svg"/>
  <manifest:file-entry manifest:media-type="image/svg+xml" manifest:full-path="Pictures/683.svg"/>
  <manifest:file-entry manifest:media-type="image/svg+xml" manifest:full-path="Pictures/682.svg"/>
  <manifest:file-entry manifest:media-type="image/svg+xml" manifest:full-path="Pictures/681.svg"/>
  <manifest:file-entry manifest:media-type="image/svg+xml" manifest:full-path="Pictures/680.svg"/>
  <manifest:file-entry manifest:media-type="image/svg+xml" manifest:full-path="Pictures/679.svg"/>
  <manifest:file-entry manifest:media-type="image/svg+xml" manifest:full-path="Pictures/678.svg"/>
  <manifest:file-entry manifest:media-type="image/svg+xml" manifest:full-path="Pictures/677.svg"/>
  <manifest:file-entry manifest:media-type="image/svg+xml" manifest:full-path="Pictures/676.svg"/>
  <manifest:file-entry manifest:media-type="image/svg+xml" manifest:full-path="Pictures/675.svg"/>
  <manifest:file-entry manifest:media-type="image/svg+xml" manifest:full-path="Pictures/674.svg"/>
  <manifest:file-entry manifest:media-type="image/svg+xml" manifest:full-path="Pictures/673.svg"/>
  <manifest:file-entry manifest:media-type="image/svg+xml" manifest:full-path="Pictures/672.svg"/>
  <manifest:file-entry manifest:media-type="image/svg+xml" manifest:full-path="Pictures/671.svg"/>
  <manifest:file-entry manifest:media-type="image/svg+xml" manifest:full-path="Pictures/670.svg"/>
  <manifest:file-entry manifest:media-type="image/svg+xml" manifest:full-path="Pictures/669.svg"/>
  <manifest:file-entry manifest:media-type="image/svg+xml" manifest:full-path="Pictures/668.svg"/>
  <manifest:file-entry manifest:media-type="image/svg+xml" manifest:full-path="Pictures/667.svg"/>
  <manifest:file-entry manifest:media-type="image/svg+xml" manifest:full-path="Pictures/666.svg"/>
  <manifest:file-entry manifest:media-type="image/svg+xml" manifest:full-path="Pictures/665.svg"/>
  <manifest:file-entry manifest:media-type="image/svg+xml" manifest:full-path="Pictures/664.svg"/>
  <manifest:file-entry manifest:media-type="image/svg+xml" manifest:full-path="Pictures/663.svg"/>
  <manifest:file-entry manifest:media-type="image/svg+xml" manifest:full-path="Pictures/662.svg"/>
  <manifest:file-entry manifest:media-type="image/svg+xml" manifest:full-path="Pictures/661.svg"/>
  <manifest:file-entry manifest:media-type="image/svg+xml" manifest:full-path="Pictures/660.svg"/>
  <manifest:file-entry manifest:media-type="image/svg+xml" manifest:full-path="Pictures/659.svg"/>
  <manifest:file-entry manifest:media-type="image/svg+xml" manifest:full-path="Pictures/658.svg"/>
  <manifest:file-entry manifest:media-type="image/svg+xml" manifest:full-path="Pictures/657.svg"/>
  <manifest:file-entry manifest:media-type="image/svg+xml" manifest:full-path="Pictures/656.svg"/>
  <manifest:file-entry manifest:media-type="image/svg+xml" manifest:full-path="Pictures/655.svg"/>
  <manifest:file-entry manifest:media-type="image/svg+xml" manifest:full-path="Pictures/654.svg"/>
  <manifest:file-entry manifest:media-type="image/svg+xml" manifest:full-path="Pictures/653.svg"/>
  <manifest:file-entry manifest:media-type="image/svg+xml" manifest:full-path="Pictures/652.svg"/>
  <manifest:file-entry manifest:media-type="image/svg+xml" manifest:full-path="Pictures/651.svg"/>
  <manifest:file-entry manifest:media-type="image/svg+xml" manifest:full-path="Pictures/650.svg"/>
  <manifest:file-entry manifest:media-type="image/svg+xml" manifest:full-path="Pictures/649.svg"/>
  <manifest:file-entry manifest:media-type="image/svg+xml" manifest:full-path="Pictures/648.svg"/>
  <manifest:file-entry manifest:media-type="image/svg+xml" manifest:full-path="Pictures/647.svg"/>
  <manifest:file-entry manifest:media-type="image/svg+xml" manifest:full-path="Pictures/646.svg"/>
  <manifest:file-entry manifest:media-type="image/svg+xml" manifest:full-path="Pictures/645.svg"/>
  <manifest:file-entry manifest:media-type="image/svg+xml" manifest:full-path="Pictures/644.svg"/>
  <manifest:file-entry manifest:media-type="image/svg+xml" manifest:full-path="Pictures/643.svg"/>
  <manifest:file-entry manifest:media-type="image/svg+xml" manifest:full-path="Pictures/642.svg"/>
  <manifest:file-entry manifest:media-type="image/svg+xml" manifest:full-path="Pictures/641.svg"/>
  <manifest:file-entry manifest:media-type="image/svg+xml" manifest:full-path="Pictures/640.svg"/>
  <manifest:file-entry manifest:media-type="image/svg+xml" manifest:full-path="Pictures/639.svg"/>
  <manifest:file-entry manifest:media-type="image/svg+xml" manifest:full-path="Pictures/638.svg"/>
  <manifest:file-entry manifest:media-type="image/svg+xml" manifest:full-path="Pictures/637.svg"/>
  <manifest:file-entry manifest:media-type="image/svg+xml" manifest:full-path="Pictures/636.svg"/>
  <manifest:file-entry manifest:media-type="image/svg+xml" manifest:full-path="Pictures/635.svg"/>
  <manifest:file-entry manifest:media-type="image/svg+xml" manifest:full-path="Pictures/634.svg"/>
  <manifest:file-entry manifest:media-type="image/svg+xml" manifest:full-path="Pictures/633.svg"/>
  <manifest:file-entry manifest:media-type="image/svg+xml" manifest:full-path="Pictures/632.svg"/>
  <manifest:file-entry manifest:media-type="image/svg+xml" manifest:full-path="Pictures/631.svg"/>
  <manifest:file-entry manifest:media-type="image/svg+xml" manifest:full-path="Pictures/630.svg"/>
  <manifest:file-entry manifest:media-type="image/svg+xml" manifest:full-path="Pictures/629.svg"/>
  <manifest:file-entry manifest:media-type="image/svg+xml" manifest:full-path="Pictures/628.svg"/>
  <manifest:file-entry manifest:media-type="image/svg+xml" manifest:full-path="Pictures/627.svg"/>
  <manifest:file-entry manifest:media-type="image/svg+xml" manifest:full-path="Pictures/626.svg"/>
  <manifest:file-entry manifest:media-type="image/svg+xml" manifest:full-path="Pictures/625.svg"/>
  <manifest:file-entry manifest:media-type="image/svg+xml" manifest:full-path="Pictures/624.svg"/>
  <manifest:file-entry manifest:media-type="image/svg+xml" manifest:full-path="Pictures/623.svg"/>
  <manifest:file-entry manifest:media-type="image/svg+xml" manifest:full-path="Pictures/622.svg"/>
  <manifest:file-entry manifest:media-type="image/svg+xml" manifest:full-path="Pictures/621.svg"/>
  <manifest:file-entry manifest:media-type="image/svg+xml" manifest:full-path="Pictures/620.svg"/>
  <manifest:file-entry manifest:media-type="image/svg+xml" manifest:full-path="Pictures/619.svg"/>
  <manifest:file-entry manifest:media-type="image/svg+xml" manifest:full-path="Pictures/618.svg"/>
  <manifest:file-entry manifest:media-type="image/svg+xml" manifest:full-path="Pictures/617.svg"/>
  <manifest:file-entry manifest:media-type="image/svg+xml" manifest:full-path="Pictures/616.svg"/>
  <manifest:file-entry manifest:media-type="image/svg+xml" manifest:full-path="Pictures/615.svg"/>
  <manifest:file-entry manifest:media-type="image/svg+xml" manifest:full-path="Pictures/614.svg"/>
  <manifest:file-entry manifest:media-type="image/svg+xml" manifest:full-path="Pictures/613.svg"/>
  <manifest:file-entry manifest:media-type="image/svg+xml" manifest:full-path="Pictures/612.svg"/>
  <manifest:file-entry manifest:media-type="image/svg+xml" manifest:full-path="Pictures/611.svg"/>
  <manifest:file-entry manifest:media-type="image/svg+xml" manifest:full-path="Pictures/610.svg"/>
  <manifest:file-entry manifest:media-type="image/svg+xml" manifest:full-path="Pictures/609.svg"/>
  <manifest:file-entry manifest:media-type="image/svg+xml" manifest:full-path="Pictures/608.svg"/>
  <manifest:file-entry manifest:media-type="image/svg+xml" manifest:full-path="Pictures/607.svg"/>
  <manifest:file-entry manifest:media-type="image/svg+xml" manifest:full-path="Pictures/606.svg"/>
  <manifest:file-entry manifest:media-type="image/svg+xml" manifest:full-path="Pictures/605.svg"/>
  <manifest:file-entry manifest:media-type="image/svg+xml" manifest:full-path="Pictures/604.svg"/>
  <manifest:file-entry manifest:media-type="image/svg+xml" manifest:full-path="Pictures/603.svg"/>
  <manifest:file-entry manifest:media-type="image/svg+xml" manifest:full-path="Pictures/602.svg"/>
  <manifest:file-entry manifest:media-type="image/svg+xml" manifest:full-path="Pictures/601.svg"/>
  <manifest:file-entry manifest:media-type="image/svg+xml" manifest:full-path="Pictures/600.svg"/>
  <manifest:file-entry manifest:media-type="image/svg+xml" manifest:full-path="Pictures/599.svg"/>
  <manifest:file-entry manifest:media-type="image/svg+xml" manifest:full-path="Pictures/598.svg"/>
  <manifest:file-entry manifest:media-type="image/svg+xml" manifest:full-path="Pictures/597.svg"/>
  <manifest:file-entry manifest:media-type="image/svg+xml" manifest:full-path="Pictures/596.svg"/>
  <manifest:file-entry manifest:media-type="image/svg+xml" manifest:full-path="Pictures/595.svg"/>
  <manifest:file-entry manifest:media-type="image/svg+xml" manifest:full-path="Pictures/594.svg"/>
  <manifest:file-entry manifest:media-type="image/svg+xml" manifest:full-path="Pictures/593.svg"/>
  <manifest:file-entry manifest:media-type="image/svg+xml" manifest:full-path="Pictures/592.svg"/>
  <manifest:file-entry manifest:media-type="image/svg+xml" manifest:full-path="Pictures/591.svg"/>
  <manifest:file-entry manifest:media-type="image/svg+xml" manifest:full-path="Pictures/590.svg"/>
  <manifest:file-entry manifest:media-type="image/svg+xml" manifest:full-path="Pictures/589.svg"/>
  <manifest:file-entry manifest:media-type="image/svg+xml" manifest:full-path="Pictures/588.svg"/>
  <manifest:file-entry manifest:media-type="image/svg+xml" manifest:full-path="Pictures/587.svg"/>
  <manifest:file-entry manifest:media-type="image/svg+xml" manifest:full-path="Pictures/586.svg"/>
  <manifest:file-entry manifest:media-type="image/svg+xml" manifest:full-path="Pictures/585.svg"/>
  <manifest:file-entry manifest:media-type="image/svg+xml" manifest:full-path="Pictures/584.svg"/>
  <manifest:file-entry manifest:media-type="image/svg+xml" manifest:full-path="Pictures/583.svg"/>
  <manifest:file-entry manifest:media-type="image/svg+xml" manifest:full-path="Pictures/582.svg"/>
  <manifest:file-entry manifest:media-type="image/svg+xml" manifest:full-path="Pictures/581.svg"/>
  <manifest:file-entry manifest:media-type="image/svg+xml" manifest:full-path="Pictures/580.svg"/>
  <manifest:file-entry manifest:media-type="image/svg+xml" manifest:full-path="Pictures/579.svg"/>
  <manifest:file-entry manifest:media-type="image/svg+xml" manifest:full-path="Pictures/578.svg"/>
  <manifest:file-entry manifest:media-type="image/svg+xml" manifest:full-path="Pictures/577.svg"/>
  <manifest:file-entry manifest:media-type="image/svg+xml" manifest:full-path="Pictures/576.svg"/>
  <manifest:file-entry manifest:media-type="image/svg+xml" manifest:full-path="Pictures/575.svg"/>
  <manifest:file-entry manifest:media-type="image/svg+xml" manifest:full-path="Pictures/574.svg"/>
  <manifest:file-entry manifest:media-type="image/svg+xml" manifest:full-path="Pictures/573.svg"/>
  <manifest:file-entry manifest:media-type="image/svg+xml" manifest:full-path="Pictures/572.svg"/>
  <manifest:file-entry manifest:media-type="image/svg+xml" manifest:full-path="Pictures/571.svg"/>
  <manifest:file-entry manifest:media-type="image/svg+xml" manifest:full-path="Pictures/570.svg"/>
  <manifest:file-entry manifest:media-type="image/svg+xml" manifest:full-path="Pictures/569.svg"/>
  <manifest:file-entry manifest:media-type="image/svg+xml" manifest:full-path="Pictures/568.svg"/>
  <manifest:file-entry manifest:media-type="image/svg+xml" manifest:full-path="Pictures/567.svg"/>
  <manifest:file-entry manifest:media-type="image/svg+xml" manifest:full-path="Pictures/566.svg"/>
  <manifest:file-entry manifest:media-type="image/svg+xml" manifest:full-path="Pictures/565.svg"/>
  <manifest:file-entry manifest:media-type="image/svg+xml" manifest:full-path="Pictures/564.svg"/>
  <manifest:file-entry manifest:media-type="image/svg+xml" manifest:full-path="Pictures/563.svg"/>
  <manifest:file-entry manifest:media-type="image/svg+xml" manifest:full-path="Pictures/562.svg"/>
  <manifest:file-entry manifest:media-type="image/svg+xml" manifest:full-path="Pictures/561.svg"/>
  <manifest:file-entry manifest:media-type="image/svg+xml" manifest:full-path="Pictures/560.svg"/>
  <manifest:file-entry manifest:media-type="image/svg+xml" manifest:full-path="Pictures/559.svg"/>
  <manifest:file-entry manifest:media-type="image/svg+xml" manifest:full-path="Pictures/558.svg"/>
  <manifest:file-entry manifest:media-type="image/svg+xml" manifest:full-path="Pictures/557.svg"/>
  <manifest:file-entry manifest:media-type="image/svg+xml" manifest:full-path="Pictures/556.svg"/>
  <manifest:file-entry manifest:media-type="image/svg+xml" manifest:full-path="Pictures/555.svg"/>
  <manifest:file-entry manifest:media-type="image/svg+xml" manifest:full-path="Pictures/554.svg"/>
  <manifest:file-entry manifest:media-type="image/svg+xml" manifest:full-path="Pictures/553.svg"/>
  <manifest:file-entry manifest:media-type="image/svg+xml" manifest:full-path="Pictures/552.svg"/>
  <manifest:file-entry manifest:media-type="image/svg+xml" manifest:full-path="Pictures/551.svg"/>
  <manifest:file-entry manifest:media-type="image/svg+xml" manifest:full-path="Pictures/550.svg"/>
  <manifest:file-entry manifest:media-type="image/svg+xml" manifest:full-path="Pictures/549.svg"/>
  <manifest:file-entry manifest:media-type="image/svg+xml" manifest:full-path="Pictures/548.svg"/>
  <manifest:file-entry manifest:media-type="image/svg+xml" manifest:full-path="Pictures/547.svg"/>
  <manifest:file-entry manifest:media-type="image/svg+xml" manifest:full-path="Pictures/546.svg"/>
  <manifest:file-entry manifest:media-type="image/svg+xml" manifest:full-path="Pictures/545.svg"/>
  <manifest:file-entry manifest:media-type="image/svg+xml" manifest:full-path="Pictures/544.svg"/>
  <manifest:file-entry manifest:media-type="image/svg+xml" manifest:full-path="Pictures/543.svg"/>
  <manifest:file-entry manifest:media-type="image/svg+xml" manifest:full-path="Pictures/542.svg"/>
  <manifest:file-entry manifest:media-type="image/svg+xml" manifest:full-path="Pictures/541.svg"/>
  <manifest:file-entry manifest:media-type="image/svg+xml" manifest:full-path="Pictures/540.svg"/>
  <manifest:file-entry manifest:media-type="image/svg+xml" manifest:full-path="Pictures/539.svg"/>
  <manifest:file-entry manifest:media-type="image/svg+xml" manifest:full-path="Pictures/538.svg"/>
  <manifest:file-entry manifest:media-type="image/svg+xml" manifest:full-path="Pictures/537.svg"/>
  <manifest:file-entry manifest:media-type="image/svg+xml" manifest:full-path="Pictures/536.svg"/>
  <manifest:file-entry manifest:media-type="image/svg+xml" manifest:full-path="Pictures/535.svg"/>
  <manifest:file-entry manifest:media-type="image/svg+xml" manifest:full-path="Pictures/534.svg"/>
  <manifest:file-entry manifest:media-type="image/svg+xml" manifest:full-path="Pictures/533.svg"/>
  <manifest:file-entry manifest:media-type="image/svg+xml" manifest:full-path="Pictures/532.svg"/>
  <manifest:file-entry manifest:media-type="image/svg+xml" manifest:full-path="Pictures/531.svg"/>
  <manifest:file-entry manifest:media-type="image/svg+xml" manifest:full-path="Pictures/530.svg"/>
  <manifest:file-entry manifest:media-type="image/svg+xml" manifest:full-path="Pictures/529.svg"/>
  <manifest:file-entry manifest:media-type="image/svg+xml" manifest:full-path="Pictures/528.svg"/>
  <manifest:file-entry manifest:media-type="image/svg+xml" manifest:full-path="Pictures/527.svg"/>
  <manifest:file-entry manifest:media-type="image/svg+xml" manifest:full-path="Pictures/526.svg"/>
  <manifest:file-entry manifest:media-type="image/svg+xml" manifest:full-path="Pictures/525.svg"/>
  <manifest:file-entry manifest:media-type="image/svg+xml" manifest:full-path="Pictures/524.svg"/>
  <manifest:file-entry manifest:media-type="image/svg+xml" manifest:full-path="Pictures/523.svg"/>
  <manifest:file-entry manifest:media-type="image/svg+xml" manifest:full-path="Pictures/522.svg"/>
  <manifest:file-entry manifest:media-type="image/svg+xml" manifest:full-path="Pictures/521.svg"/>
  <manifest:file-entry manifest:media-type="image/svg+xml" manifest:full-path="Pictures/520.svg"/>
  <manifest:file-entry manifest:media-type="image/svg+xml" manifest:full-path="Pictures/519.svg"/>
  <manifest:file-entry manifest:media-type="image/svg+xml" manifest:full-path="Pictures/518.svg"/>
  <manifest:file-entry manifest:media-type="image/svg+xml" manifest:full-path="Pictures/517.svg"/>
  <manifest:file-entry manifest:media-type="image/svg+xml" manifest:full-path="Pictures/516.svg"/>
  <manifest:file-entry manifest:media-type="image/svg+xml" manifest:full-path="Pictures/515.svg"/>
  <manifest:file-entry manifest:media-type="image/svg+xml" manifest:full-path="Pictures/514.svg"/>
  <manifest:file-entry manifest:media-type="image/svg+xml" manifest:full-path="Pictures/513.svg"/>
  <manifest:file-entry manifest:media-type="image/svg+xml" manifest:full-path="Pictures/512.svg"/>
  <manifest:file-entry manifest:media-type="image/svg+xml" manifest:full-path="Pictures/511.svg"/>
  <manifest:file-entry manifest:media-type="image/svg+xml" manifest:full-path="Pictures/510.svg"/>
  <manifest:file-entry manifest:media-type="image/svg+xml" manifest:full-path="Pictures/509.svg"/>
  <manifest:file-entry manifest:media-type="image/svg+xml" manifest:full-path="Pictures/508.svg"/>
  <manifest:file-entry manifest:media-type="image/svg+xml" manifest:full-path="Pictures/507.svg"/>
  <manifest:file-entry manifest:media-type="image/svg+xml" manifest:full-path="Pictures/506.svg"/>
  <manifest:file-entry manifest:media-type="image/svg+xml" manifest:full-path="Pictures/505.svg"/>
  <manifest:file-entry manifest:media-type="image/svg+xml" manifest:full-path="Pictures/504.svg"/>
  <manifest:file-entry manifest:media-type="image/svg+xml" manifest:full-path="Pictures/503.svg"/>
  <manifest:file-entry manifest:media-type="image/svg+xml" manifest:full-path="Pictures/502.svg"/>
  <manifest:file-entry manifest:media-type="image/svg+xml" manifest:full-path="Pictures/501.svg"/>
  <manifest:file-entry manifest:media-type="image/svg+xml" manifest:full-path="Pictures/500.svg"/>
  <manifest:file-entry manifest:media-type="image/svg+xml" manifest:full-path="Pictures/499.svg"/>
  <manifest:file-entry manifest:media-type="image/svg+xml" manifest:full-path="Pictures/498.svg"/>
  <manifest:file-entry manifest:media-type="image/svg+xml" manifest:full-path="Pictures/497.svg"/>
  <manifest:file-entry manifest:media-type="image/svg+xml" manifest:full-path="Pictures/496.svg"/>
  <manifest:file-entry manifest:media-type="image/svg+xml" manifest:full-path="Pictures/495.svg"/>
  <manifest:file-entry manifest:media-type="image/svg+xml" manifest:full-path="Pictures/494.svg"/>
  <manifest:file-entry manifest:media-type="image/svg+xml" manifest:full-path="Pictures/493.svg"/>
  <manifest:file-entry manifest:media-type="image/svg+xml" manifest:full-path="Pictures/492.svg"/>
  <manifest:file-entry manifest:media-type="image/svg+xml" manifest:full-path="Pictures/491.svg"/>
  <manifest:file-entry manifest:media-type="image/svg+xml" manifest:full-path="Pictures/490.svg"/>
  <manifest:file-entry manifest:media-type="image/svg+xml" manifest:full-path="Pictures/489.svg"/>
  <manifest:file-entry manifest:media-type="image/svg+xml" manifest:full-path="Pictures/488.svg"/>
  <manifest:file-entry manifest:media-type="image/svg+xml" manifest:full-path="Pictures/487.svg"/>
  <manifest:file-entry manifest:media-type="image/svg+xml" manifest:full-path="Pictures/486.svg"/>
  <manifest:file-entry manifest:media-type="image/svg+xml" manifest:full-path="Pictures/485.svg"/>
  <manifest:file-entry manifest:media-type="image/svg+xml" manifest:full-path="Pictures/484.svg"/>
  <manifest:file-entry manifest:media-type="image/svg+xml" manifest:full-path="Pictures/483.svg"/>
  <manifest:file-entry manifest:media-type="image/svg+xml" manifest:full-path="Pictures/482.svg"/>
  <manifest:file-entry manifest:media-type="image/svg+xml" manifest:full-path="Pictures/481.svg"/>
  <manifest:file-entry manifest:media-type="image/svg+xml" manifest:full-path="Pictures/480.svg"/>
  <manifest:file-entry manifest:media-type="image/svg+xml" manifest:full-path="Pictures/479.svg"/>
  <manifest:file-entry manifest:media-type="image/svg+xml" manifest:full-path="Pictures/478.svg"/>
  <manifest:file-entry manifest:media-type="image/svg+xml" manifest:full-path="Pictures/477.svg"/>
  <manifest:file-entry manifest:media-type="image/svg+xml" manifest:full-path="Pictures/476.svg"/>
  <manifest:file-entry manifest:media-type="image/svg+xml" manifest:full-path="Pictures/475.svg"/>
  <manifest:file-entry manifest:media-type="image/svg+xml" manifest:full-path="Pictures/474.svg"/>
  <manifest:file-entry manifest:media-type="image/svg+xml" manifest:full-path="Pictures/473.svg"/>
  <manifest:file-entry manifest:media-type="image/svg+xml" manifest:full-path="Pictures/472.svg"/>
  <manifest:file-entry manifest:media-type="image/svg+xml" manifest:full-path="Pictures/471.svg"/>
  <manifest:file-entry manifest:media-type="image/svg+xml" manifest:full-path="Pictures/470.svg"/>
  <manifest:file-entry manifest:media-type="image/svg+xml" manifest:full-path="Pictures/469.svg"/>
  <manifest:file-entry manifest:media-type="image/svg+xml" manifest:full-path="Pictures/468.svg"/>
  <manifest:file-entry manifest:media-type="image/svg+xml" manifest:full-path="Pictures/467.svg"/>
  <manifest:file-entry manifest:media-type="image/svg+xml" manifest:full-path="Pictures/466.svg"/>
  <manifest:file-entry manifest:media-type="image/svg+xml" manifest:full-path="Pictures/465.svg"/>
  <manifest:file-entry manifest:media-type="image/svg+xml" manifest:full-path="Pictures/464.svg"/>
  <manifest:file-entry manifest:media-type="image/svg+xml" manifest:full-path="Pictures/463.svg"/>
  <manifest:file-entry manifest:media-type="image/svg+xml" manifest:full-path="Pictures/462.svg"/>
  <manifest:file-entry manifest:media-type="image/svg+xml" manifest:full-path="Pictures/461.svg"/>
  <manifest:file-entry manifest:media-type="image/svg+xml" manifest:full-path="Pictures/460.svg"/>
  <manifest:file-entry manifest:media-type="image/svg+xml" manifest:full-path="Pictures/459.svg"/>
  <manifest:file-entry manifest:media-type="image/svg+xml" manifest:full-path="Pictures/458.svg"/>
  <manifest:file-entry manifest:media-type="image/svg+xml" manifest:full-path="Pictures/457.svg"/>
  <manifest:file-entry manifest:media-type="image/svg+xml" manifest:full-path="Pictures/456.svg"/>
  <manifest:file-entry manifest:media-type="image/svg+xml" manifest:full-path="Pictures/455.svg"/>
  <manifest:file-entry manifest:media-type="image/svg+xml" manifest:full-path="Pictures/454.svg"/>
  <manifest:file-entry manifest:media-type="image/svg+xml" manifest:full-path="Pictures/453.svg"/>
  <manifest:file-entry manifest:media-type="image/svg+xml" manifest:full-path="Pictures/452.svg"/>
  <manifest:file-entry manifest:media-type="image/svg+xml" manifest:full-path="Pictures/451.svg"/>
  <manifest:file-entry manifest:media-type="image/svg+xml" manifest:full-path="Pictures/450.svg"/>
  <manifest:file-entry manifest:media-type="image/svg+xml" manifest:full-path="Pictures/449.svg"/>
  <manifest:file-entry manifest:media-type="image/svg+xml" manifest:full-path="Pictures/448.svg"/>
  <manifest:file-entry manifest:media-type="image/svg+xml" manifest:full-path="Pictures/447.svg"/>
  <manifest:file-entry manifest:media-type="image/svg+xml" manifest:full-path="Pictures/446.svg"/>
  <manifest:file-entry manifest:media-type="image/svg+xml" manifest:full-path="Pictures/445.svg"/>
  <manifest:file-entry manifest:media-type="image/svg+xml" manifest:full-path="Pictures/444.svg"/>
  <manifest:file-entry manifest:media-type="image/svg+xml" manifest:full-path="Pictures/443.svg"/>
  <manifest:file-entry manifest:media-type="image/svg+xml" manifest:full-path="Pictures/442.svg"/>
  <manifest:file-entry manifest:media-type="image/svg+xml" manifest:full-path="Pictures/441.svg"/>
  <manifest:file-entry manifest:media-type="image/svg+xml" manifest:full-path="Pictures/440.svg"/>
  <manifest:file-entry manifest:media-type="image/svg+xml" manifest:full-path="Pictures/439.svg"/>
  <manifest:file-entry manifest:media-type="image/svg+xml" manifest:full-path="Pictures/438.svg"/>
  <manifest:file-entry manifest:media-type="image/svg+xml" manifest:full-path="Pictures/437.svg"/>
  <manifest:file-entry manifest:media-type="image/svg+xml" manifest:full-path="Pictures/436.svg"/>
  <manifest:file-entry manifest:media-type="image/svg+xml" manifest:full-path="Pictures/435.svg"/>
  <manifest:file-entry manifest:media-type="image/svg+xml" manifest:full-path="Pictures/434.svg"/>
  <manifest:file-entry manifest:media-type="image/svg+xml" manifest:full-path="Pictures/433.svg"/>
  <manifest:file-entry manifest:media-type="image/svg+xml" manifest:full-path="Pictures/432.svg"/>
  <manifest:file-entry manifest:media-type="image/svg+xml" manifest:full-path="Pictures/431.svg"/>
  <manifest:file-entry manifest:media-type="image/svg+xml" manifest:full-path="Pictures/430.svg"/>
  <manifest:file-entry manifest:media-type="image/svg+xml" manifest:full-path="Pictures/429.svg"/>
  <manifest:file-entry manifest:media-type="image/svg+xml" manifest:full-path="Pictures/428.svg"/>
  <manifest:file-entry manifest:media-type="image/svg+xml" manifest:full-path="Pictures/427.svg"/>
  <manifest:file-entry manifest:media-type="image/svg+xml" manifest:full-path="Pictures/426.svg"/>
  <manifest:file-entry manifest:media-type="image/svg+xml" manifest:full-path="Pictures/425.svg"/>
  <manifest:file-entry manifest:media-type="image/svg+xml" manifest:full-path="Pictures/424.svg"/>
  <manifest:file-entry manifest:media-type="image/svg+xml" manifest:full-path="Pictures/423.svg"/>
  <manifest:file-entry manifest:media-type="image/svg+xml" manifest:full-path="Pictures/422.svg"/>
  <manifest:file-entry manifest:media-type="image/svg+xml" manifest:full-path="Pictures/421.svg"/>
  <manifest:file-entry manifest:media-type="image/svg+xml" manifest:full-path="Pictures/420.svg"/>
  <manifest:file-entry manifest:media-type="image/svg+xml" manifest:full-path="Pictures/419.svg"/>
  <manifest:file-entry manifest:media-type="image/svg+xml" manifest:full-path="Pictures/418.svg"/>
  <manifest:file-entry manifest:media-type="image/svg+xml" manifest:full-path="Pictures/417.svg"/>
  <manifest:file-entry manifest:media-type="image/svg+xml" manifest:full-path="Pictures/416.svg"/>
  <manifest:file-entry manifest:media-type="image/svg+xml" manifest:full-path="Pictures/415.svg"/>
  <manifest:file-entry manifest:media-type="image/svg+xml" manifest:full-path="Pictures/414.svg"/>
  <manifest:file-entry manifest:media-type="image/svg+xml" manifest:full-path="Pictures/413.svg"/>
  <manifest:file-entry manifest:media-type="image/svg+xml" manifest:full-path="Pictures/412.svg"/>
  <manifest:file-entry manifest:media-type="image/svg+xml" manifest:full-path="Pictures/411.svg"/>
  <manifest:file-entry manifest:media-type="image/svg+xml" manifest:full-path="Pictures/410.svg"/>
  <manifest:file-entry manifest:media-type="image/svg+xml" manifest:full-path="Pictures/409.svg"/>
  <manifest:file-entry manifest:media-type="image/svg+xml" manifest:full-path="Pictures/408.svg"/>
  <manifest:file-entry manifest:media-type="image/svg+xml" manifest:full-path="Pictures/407.svg"/>
  <manifest:file-entry manifest:media-type="image/svg+xml" manifest:full-path="Pictures/406.svg"/>
  <manifest:file-entry manifest:media-type="image/svg+xml" manifest:full-path="Pictures/405.svg"/>
  <manifest:file-entry manifest:media-type="image/svg+xml" manifest:full-path="Pictures/404.svg"/>
  <manifest:file-entry manifest:media-type="image/svg+xml" manifest:full-path="Pictures/403.svg"/>
  <manifest:file-entry manifest:media-type="image/svg+xml" manifest:full-path="Pictures/402.svg"/>
  <manifest:file-entry manifest:media-type="image/svg+xml" manifest:full-path="Pictures/401.svg"/>
  <manifest:file-entry manifest:media-type="image/svg+xml" manifest:full-path="Pictures/400.svg"/>
  <manifest:file-entry manifest:media-type="image/svg+xml" manifest:full-path="Pictures/399.svg"/>
  <manifest:file-entry manifest:media-type="image/svg+xml" manifest:full-path="Pictures/398.svg"/>
  <manifest:file-entry manifest:media-type="image/svg+xml" manifest:full-path="Pictures/397.svg"/>
  <manifest:file-entry manifest:media-type="image/svg+xml" manifest:full-path="Pictures/396.svg"/>
  <manifest:file-entry manifest:media-type="image/svg+xml" manifest:full-path="Pictures/395.svg"/>
  <manifest:file-entry manifest:media-type="image/svg+xml" manifest:full-path="Pictures/394.svg"/>
  <manifest:file-entry manifest:media-type="image/svg+xml" manifest:full-path="Pictures/393.svg"/>
  <manifest:file-entry manifest:media-type="image/svg+xml" manifest:full-path="Pictures/392.svg"/>
  <manifest:file-entry manifest:media-type="image/svg+xml" manifest:full-path="Pictures/391.svg"/>
  <manifest:file-entry manifest:media-type="image/svg+xml" manifest:full-path="Pictures/390.svg"/>
  <manifest:file-entry manifest:media-type="image/svg+xml" manifest:full-path="Pictures/389.svg"/>
  <manifest:file-entry manifest:media-type="image/svg+xml" manifest:full-path="Pictures/388.svg"/>
  <manifest:file-entry manifest:media-type="image/svg+xml" manifest:full-path="Pictures/387.svg"/>
  <manifest:file-entry manifest:media-type="image/svg+xml" manifest:full-path="Pictures/386.svg"/>
  <manifest:file-entry manifest:media-type="image/svg+xml" manifest:full-path="Pictures/385.svg"/>
  <manifest:file-entry manifest:media-type="image/svg+xml" manifest:full-path="Pictures/384.svg"/>
  <manifest:file-entry manifest:media-type="image/svg+xml" manifest:full-path="Pictures/383.svg"/>
  <manifest:file-entry manifest:media-type="image/svg+xml" manifest:full-path="Pictures/382.svg"/>
  <manifest:file-entry manifest:media-type="image/svg+xml" manifest:full-path="Pictures/381.svg"/>
  <manifest:file-entry manifest:media-type="image/svg+xml" manifest:full-path="Pictures/380.svg"/>
  <manifest:file-entry manifest:media-type="image/svg+xml" manifest:full-path="Pictures/379.svg"/>
  <manifest:file-entry manifest:media-type="image/svg+xml" manifest:full-path="Pictures/378.svg"/>
  <manifest:file-entry manifest:media-type="image/svg+xml" manifest:full-path="Pictures/377.svg"/>
  <manifest:file-entry manifest:media-type="image/svg+xml" manifest:full-path="Pictures/376.svg"/>
  <manifest:file-entry manifest:media-type="image/svg+xml" manifest:full-path="Pictures/375.svg"/>
  <manifest:file-entry manifest:media-type="image/svg+xml" manifest:full-path="Pictures/374.svg"/>
  <manifest:file-entry manifest:media-type="image/svg+xml" manifest:full-path="Pictures/373.svg"/>
  <manifest:file-entry manifest:media-type="image/svg+xml" manifest:full-path="Pictures/372.svg"/>
  <manifest:file-entry manifest:media-type="image/svg+xml" manifest:full-path="Pictures/371.svg"/>
  <manifest:file-entry manifest:media-type="image/svg+xml" manifest:full-path="Pictures/370.svg"/>
  <manifest:file-entry manifest:media-type="image/svg+xml" manifest:full-path="Pictures/369.svg"/>
  <manifest:file-entry manifest:media-type="image/svg+xml" manifest:full-path="Pictures/368.svg"/>
  <manifest:file-entry manifest:media-type="image/svg+xml" manifest:full-path="Pictures/367.svg"/>
  <manifest:file-entry manifest:media-type="image/svg+xml" manifest:full-path="Pictures/366.svg"/>
  <manifest:file-entry manifest:media-type="image/svg+xml" manifest:full-path="Pictures/365.svg"/>
  <manifest:file-entry manifest:media-type="image/svg+xml" manifest:full-path="Pictures/364.svg"/>
  <manifest:file-entry manifest:media-type="image/svg+xml" manifest:full-path="Pictures/363.svg"/>
  <manifest:file-entry manifest:media-type="image/svg+xml" manifest:full-path="Pictures/362.svg"/>
  <manifest:file-entry manifest:media-type="image/svg+xml" manifest:full-path="Pictures/361.svg"/>
  <manifest:file-entry manifest:media-type="image/svg+xml" manifest:full-path="Pictures/360.svg"/>
  <manifest:file-entry manifest:media-type="image/svg+xml" manifest:full-path="Pictures/359.svg"/>
  <manifest:file-entry manifest:media-type="image/svg+xml" manifest:full-path="Pictures/358.svg"/>
  <manifest:file-entry manifest:media-type="image/svg+xml" manifest:full-path="Pictures/357.svg"/>
  <manifest:file-entry manifest:media-type="image/svg+xml" manifest:full-path="Pictures/356.svg"/>
  <manifest:file-entry manifest:media-type="image/svg+xml" manifest:full-path="Pictures/355.svg"/>
  <manifest:file-entry manifest:media-type="image/svg+xml" manifest:full-path="Pictures/354.svg"/>
  <manifest:file-entry manifest:media-type="image/svg+xml" manifest:full-path="Pictures/353.svg"/>
  <manifest:file-entry manifest:media-type="image/svg+xml" manifest:full-path="Pictures/352.svg"/>
  <manifest:file-entry manifest:media-type="image/svg+xml" manifest:full-path="Pictures/351.svg"/>
  <manifest:file-entry manifest:media-type="image/svg+xml" manifest:full-path="Pictures/350.svg"/>
  <manifest:file-entry manifest:media-type="image/svg+xml" manifest:full-path="Pictures/349.svg"/>
  <manifest:file-entry manifest:media-type="image/svg+xml" manifest:full-path="Pictures/348.svg"/>
  <manifest:file-entry manifest:media-type="image/svg+xml" manifest:full-path="Pictures/347.svg"/>
  <manifest:file-entry manifest:media-type="image/svg+xml" manifest:full-path="Pictures/346.svg"/>
  <manifest:file-entry manifest:media-type="image/svg+xml" manifest:full-path="Pictures/345.svg"/>
  <manifest:file-entry manifest:media-type="image/svg+xml" manifest:full-path="Pictures/344.svg"/>
  <manifest:file-entry manifest:media-type="image/svg+xml" manifest:full-path="Pictures/343.svg"/>
  <manifest:file-entry manifest:media-type="image/svg+xml" manifest:full-path="Pictures/342.svg"/>
  <manifest:file-entry manifest:media-type="image/svg+xml" manifest:full-path="Pictures/341.svg"/>
  <manifest:file-entry manifest:media-type="image/svg+xml" manifest:full-path="Pictures/340.svg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107*"/>
    </style:style>
    <style:style style:name="Table2.B" style:family="table-column">
      <style:table-column-properties style:rel-column-width="13107*"/>
    </style:style>
    <style:style style:name="Table2.C" style:family="table-column">
      <style:table-column-properties style:rel-column-width="13107*"/>
    </style:style>
    <style:style style:name="Table2.D" style:family="table-column">
      <style:table-column-properties style:rel-column-width="13107*"/>
    </style:style>
    <style:style style:name="Table2.E" style:family="table-column">
      <style:table-column-properties style:rel-column-width="1310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7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7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9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5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29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5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2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7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3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6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4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7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2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1" office:name=""><text:span text:style-name="Definition">gui/Gp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2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99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9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1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86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9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8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72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4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3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2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Add 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6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8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2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9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1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2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7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68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60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2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5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tsx#L144" office:name=""><text:span text:style-name="Definition">components/Waypoin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7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36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55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4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DB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75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5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0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7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tsx#L149" office:name=""><text:span text:style-name="Definition">components/ItemName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AlarmWidget.tsx#L45" office:name=""><text:span text:style-name="Definition">components/AlarmWidge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AlarmWidget.tsx#L67" office:name=""><text:span text:style-name="Definition">components/AlarmWidge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74" office:name=""><text:span text:style-name="Definition"><text:span text:style-name="T1">DBCol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13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Color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8" office:name=""><text:span text:style-name="Definition">Color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0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4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2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12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Curren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Curren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1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7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1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507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tsx#L132" office:name=""><text:span text:style-name="Definition">components/Waypoin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4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6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4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6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2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45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0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80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8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9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0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1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3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118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3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3" office:name=""><text:span text:style-name="Definition">DBHid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9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2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0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450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44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Ign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9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75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0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0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53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7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2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3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5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3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2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1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2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9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1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7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50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8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04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3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23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21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6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5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gui/NavPage.tsx#L25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2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6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tsx#L148" office:name=""><text:span text:style-name="Definition">components/Waypoin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53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56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8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71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2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7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82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1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7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tsx#L164" office:name=""><text:span text:style-name="Definition">components/ItemName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4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2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39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8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8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2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2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4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3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8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3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7" office:name=""><text:span text:style-name="Definition"><text:span text:style-name="T1">DBSh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118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6" office:name=""><text:span text:style-name="Definition">Sho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8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6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440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9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5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09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5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DBStop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88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4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3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5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3" office:name=""><text:span text:style-name="Definition">DBUserApp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860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1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5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2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6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6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700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74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Edit</text:span></text:a></text:p>
          </table:table-cell>
          <table:table-cell table:style-name="TableRowCell" office:value-type="string">
            <text:p text:style-name="Table_20_Contents">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2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99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5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2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8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6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10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6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3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2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81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7" office:name=""><text:span text:style-name="Definition">components/Mob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85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1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1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2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Add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3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1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7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0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Tools</text:span></text:a></text:p>
          </table:table-cell>
          <table:table-cell table:style-name="TableRowCell" office:value-type="string">
            <text:p text:style-name="Table_20_Contents">Show nav tool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4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3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88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5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72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0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31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29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4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8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5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NavRestart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48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NavRestart</text:span></text:a></text:p>
          </table:table-cell>
          <table:table-cell table:style-name="TableRowCell" office:value-type="string">
            <text:p text:style-name="Table_20_Contents"><text:a xlink:type="simple" xlink:href="../../viewer/gui/NavPage.tsx#L31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5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4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1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6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7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18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tsx#L115" office:name=""><text:span text:style-name="Definition">components/Waypoin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3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5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5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0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8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5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14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9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2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8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5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3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2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3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9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7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9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87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62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4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2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0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102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2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1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<text:span text:style-name="T1">StopW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1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3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StopW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2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2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68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4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7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4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9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33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332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6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22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6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1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2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90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4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5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6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7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7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Wp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0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1" svg:width="0.41667in" svg:height="0.4166666666666667in"><draw:image xlink:href="Pictures/3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6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9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342" svg:width="0.41667in" svg:height="0.4166666666666667in"><draw:image xlink:href="Pictures/34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3" svg:width="0.41667in" svg:height="0.4166666666666667in"><draw:image xlink:href="Pictures/3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7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6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22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344" svg:width="0.41667in" svg:height="0.4166666666666667in"><draw:image xlink:href="Pictures/34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5" svg:width="0.41667in" svg:height="0.4166666666666667in"><draw:image xlink:href="Pictures/3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7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346" svg:width="0.41667in" svg:height="0.4166666666666667in"><draw:image xlink:href="Pictures/34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7" svg:width="0.41667in" svg:height="0.4166666666666667in"><draw:image xlink:href="Pictures/34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348" svg:width="0.41667in" svg:height="0.4166666666666667in"><draw:image xlink:href="Pictures/34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9" svg:width="0.41667in" svg:height="0.4166666666666667in"><draw:image xlink:href="Pictures/34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350" svg:width="0.41667in" svg:height="0.4166666666666667in"><draw:image xlink:href="Pictures/34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1" svg:width="0.41667in" svg:height="0.4166666666666667in"><draw:image xlink:href="Pictures/35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4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91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52" svg:width="0.41667in" svg:height="0.4166666666666667in"><draw:image xlink:href="Pictures/35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3" svg:width="0.41667in" svg:height="0.4166666666666667in"><draw:image xlink:href="Pictures/35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4" svg:width="0.41667in" svg:height="0.4166666666666667in"><draw:image xlink:href="Pictures/35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5" svg:width="0.41667in" svg:height="0.4166666666666667in"><draw:image xlink:href="Pictures/35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9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356" svg:width="0.41667in" svg:height="0.4166666666666667in"><draw:image xlink:href="Pictures/35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7" svg:width="0.41667in" svg:height="0.4166666666666667in"><draw:image xlink:href="Pictures/35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9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358" svg:width="0.41667in" svg:height="0.4166666666666667in"><draw:image xlink:href="Pictures/35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9" svg:width="0.41667in" svg:height="0.4166666666666667in"><draw:image xlink:href="Pictures/35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21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60" svg:width="0.41667in" svg:height="0.4166666666666667in"><draw:image xlink:href="Pictures/35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1" svg:width="0.41667in" svg:height="0.4166666666666667in"><draw:image xlink:href="Pictures/36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631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1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FeatureInfoDialog.jsx#L15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9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362" svg:width="0.41667in" svg:height="0.4166666666666667in"><draw:image xlink:href="Pictures/36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3" svg:width="0.41667in" svg:height="0.4166666666666667in"><draw:image xlink:href="Pictures/36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2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364" svg:width="0.41667in" svg:height="0.4166666666666667in"><draw:image xlink:href="Pictures/36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5" svg:width="0.41667in" svg:height="0.4166666666666667in"><draw:image xlink:href="Pictures/36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5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366" svg:width="0.41667in" svg:height="0.4166666666666667in"><draw:image xlink:href="Pictures/36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7" svg:width="0.41667in" svg:height="0.4166666666666667in"><draw:image xlink:href="Pictures/36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8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1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368" svg:width="0.41667in" svg:height="0.4166666666666667in"><draw:image xlink:href="Pictures/36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9" svg:width="0.41667in" svg:height="0.4166666666666667in"><draw:image xlink:href="Pictures/36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1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370" svg:width="0.41667in" svg:height="0.4166666666666667in"><draw:image xlink:href="Pictures/36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1" svg:width="0.41667in" svg:height="0.4166666666666667in"><draw:image xlink:href="Pictures/3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4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372" svg:width="0.41667in" svg:height="0.4166666666666667in"><draw:image xlink:href="Pictures/37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3" svg:width="0.41667in" svg:height="0.4166666666666667in"><draw:image xlink:href="Pictures/3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7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374" svg:width="0.41667in" svg:height="0.4166666666666667in"><draw:image xlink:href="Pictures/37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5" svg:width="0.41667in" svg:height="0.4166666666666667in"><draw:image xlink:href="Pictures/3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376" svg:width="0.41667in" svg:height="0.4166666666666667in"><draw:image xlink:href="Pictures/37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7" svg:width="0.41667in" svg:height="0.4166666666666667in"><draw:image xlink:href="Pictures/3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5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378" svg:width="0.41667in" svg:height="0.4166666666666667in"><draw:image xlink:href="Pictures/37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9" svg:width="0.41667in" svg:height="0.4166666666666667in"><draw:image xlink:href="Pictures/3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5" office:name=""><text:span text:style-name="Definition">Layout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1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380" svg:width="0.41667in" svg:height="0.4166666666666667in"><draw:image xlink:href="Pictures/37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1" svg:width="0.41667in" svg:height="0.4166666666666667in"><draw:image xlink:href="Pictures/3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9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382" svg:width="0.41667in" svg:height="0.4166666666666667in"><draw:image xlink:href="Pictures/38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3" svg:width="0.41667in" svg:height="0.4166666666666667in"><draw:image xlink:href="Pictures/3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3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384" svg:width="0.41667in" svg:height="0.4166666666666667in"><draw:image xlink:href="Pictures/38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5" svg:width="0.41667in" svg:height="0.4166666666666667in"><draw:image xlink:href="Pictures/3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7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386" svg:width="0.41667in" svg:height="0.4166666666666667in"><draw:image xlink:href="Pictures/38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7" svg:width="0.41667in" svg:height="0.4166666666666667in"><draw:image xlink:href="Pictures/3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36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2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388" svg:width="0.41667in" svg:height="0.4166666666666667in"><draw:image xlink:href="Pictures/38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9" svg:width="0.41667in" svg:height="0.4166666666666667in"><draw:image xlink:href="Pictures/3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2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1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390" svg:width="0.41667in" svg:height="0.4166666666666667in"><draw:image xlink:href="Pictures/38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1" svg:width="0.41667in" svg:height="0.4166666666666667in"><draw:image xlink:href="Pictures/3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1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4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7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7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392" svg:width="0.41667in" svg:height="0.4166666666666667in"><draw:image xlink:href="Pictures/39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3" svg:width="0.41667in" svg:height="0.4166666666666667in"><draw:image xlink:href="Pictures/3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3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394" svg:width="0.41667in" svg:height="0.4166666666666667in"><draw:image xlink:href="Pictures/39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5" svg:width="0.41667in" svg:height="0.4166666666666667in"><draw:image xlink:href="Pictures/3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4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0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96" svg:width="0.41667in" svg:height="0.4166666666666667in"><draw:image xlink:href="Pictures/39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7" svg:width="0.41667in" svg:height="0.4166666666666667in"><draw:image xlink:href="Pictures/3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6" office:name=""><text:span text:style-name="Definition"><text:span text:style-name="T1">Ok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90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398" svg:width="0.41667in" svg:height="0.4166666666666667in"><draw:image xlink:href="Pictures/39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9" svg:width="0.41667in" svg:height="0.4166666666666667in"><draw:image xlink:href="Pictures/3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5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400" svg:width="0.41667in" svg:height="0.4166666666666667in"><draw:image xlink:href="Pictures/39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1" svg:width="0.41667in" svg:height="0.4166666666666667in"><draw:image xlink:href="Pictures/4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5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70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5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5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8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402" svg:width="0.41667in" svg:height="0.4166666666666667in"><draw:image xlink:href="Pictures/40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3" svg:width="0.41667in" svg:height="0.4166666666666667in"><draw:image xlink:href="Pictures/40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8" office:name=""><text:span text:style-name="Definition">Plugin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90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404" svg:width="0.41667in" svg:height="0.4166666666666667in"><draw:image xlink:href="Pictures/40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5" svg:width="0.41667in" svg:height="0.4166666666666667in"><draw:image xlink:href="Pictures/40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93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406" svg:width="0.41667in" svg:height="0.4166666666666667in"><draw:image xlink:href="Pictures/40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7" svg:width="0.41667in" svg:height="0.4166666666666667in"><draw:image xlink:href="Pictures/40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8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408" svg:width="0.41667in" svg:height="0.4166666666666667in"><draw:image xlink:href="Pictures/40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9" svg:width="0.41667in" svg:height="0.4166666666666667in"><draw:image xlink:href="Pictures/40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11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410" svg:width="0.41667in" svg:height="0.4166666666666667in"><draw:image xlink:href="Pictures/40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1" svg:width="0.41667in" svg:height="0.4166666666666667in"><draw:image xlink:href="Pictures/41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11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11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20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7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0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412" svg:width="0.41667in" svg:height="0.4166666666666667in"><draw:image xlink:href="Pictures/41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3" svg:width="0.41667in" svg:height="0.4166666666666667in"><draw:image xlink:href="Pictures/41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1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414" svg:width="0.41667in" svg:height="0.4166666666666667in"><draw:image xlink:href="Pictures/41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5" svg:width="0.41667in" svg:height="0.4166666666666667in"><draw:image xlink:href="Pictures/41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1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gui/MainNav.tsx#L35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1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1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1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416" svg:width="0.41667in" svg:height="0.4166666666666667in"><draw:image xlink:href="Pictures/41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7" svg:width="0.41667in" svg:height="0.4166666666666667in"><draw:image xlink:href="Pictures/41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1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1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4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418" svg:width="0.41667in" svg:height="0.4166666666666667in"><draw:image xlink:href="Pictures/41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9" svg:width="0.41667in" svg:height="0.4166666666666667in"><draw:image xlink:href="Pictures/41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420" svg:width="0.41667in" svg:height="0.4166666666666667in"><draw:image xlink:href="Pictures/41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1" svg:width="0.41667in" svg:height="0.4166666666666667in"><draw:image xlink:href="Pictures/42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6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422" svg:width="0.41667in" svg:height="0.4166666666666667in"><draw:image xlink:href="Pictures/42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3" svg:width="0.41667in" svg:height="0.4166666666666667in"><draw:image xlink:href="Pictures/42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9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9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424" svg:width="0.41667in" svg:height="0.4166666666666667in"><draw:image xlink:href="Pictures/42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5" svg:width="0.41667in" svg:height="0.4166666666666667in"><draw:image xlink:href="Pictures/42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9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426" svg:width="0.41667in" svg:height="0.4166666666666667in"><draw:image xlink:href="Pictures/42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7" svg:width="0.41667in" svg:height="0.4166666666666667in"><draw:image xlink:href="Pictures/426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428" svg:width="0.41667in" svg:height="0.4166666666666667in"><draw:image xlink:href="Pictures/42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9" svg:width="0.41667in" svg:height="0.4166666666666667in"><draw:image xlink:href="Pictures/428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430" svg:width="0.41667in" svg:height="0.4166666666666667in"><draw:image xlink:href="Pictures/42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1" svg:width="0.41667in" svg:height="0.4166666666666667in"><draw:image xlink:href="Pictures/430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432" svg:width="0.41667in" svg:height="0.4166666666666667in"><draw:image xlink:href="Pictures/43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3" svg:width="0.41667in" svg:height="0.4166666666666667in"><draw:image xlink:href="Pictures/432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434" svg:width="0.41667in" svg:height="0.4166666666666667in"><draw:image xlink:href="Pictures/43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5" svg:width="0.41667in" svg:height="0.4166666666666667in"><draw:image xlink:href="Pictures/434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436" svg:width="0.41667in" svg:height="0.4166666666666667in"><draw:image xlink:href="Pictures/43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7" svg:width="0.41667in" svg:height="0.4166666666666667in"><draw:image xlink:href="Pictures/436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438" svg:width="0.41667in" svg:height="0.4166666666666667in"><draw:image xlink:href="Pictures/43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9" svg:width="0.41667in" svg:height="0.4166666666666667in"><draw:image xlink:href="Pictures/438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440" svg:width="0.41667in" svg:height="0.4166666666666667in"><draw:image xlink:href="Pictures/43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1" svg:width="0.41667in" svg:height="0.4166666666666667in"><draw:image xlink:href="Pictures/440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442" svg:width="0.41667in" svg:height="0.4166666666666667in"><draw:image xlink:href="Pictures/44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3" svg:width="0.41667in" svg:height="0.4166666666666667in"><draw:image xlink:href="Pictures/442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444" svg:width="0.41667in" svg:height="0.4166666666666667in"><draw:image xlink:href="Pictures/44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5" svg:width="0.41667in" svg:height="0.4166666666666667in"><draw:image xlink:href="Pictures/444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446" svg:width="0.41667in" svg:height="0.4166666666666667in"><draw:image xlink:href="Pictures/44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7" svg:width="0.41667in" svg:height="0.4166666666666667in"><draw:image xlink:href="Pictures/446.svg" xlink:type="simple" xlink:show="embed" xlink:actuate="onLoad"/></draw:frame></text:p>
          </table:table-cell>
          <table:table-cell table:style-name="TableRowCell" office:value-type="string">
            <text:p text:style-name="Table_20_Contents">DBAnchorBoat,DBCurren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448" svg:width="0.41667in" svg:height="0.4166666666666667in"><draw:image xlink:href="Pictures/44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9" svg:width="0.41667in" svg:height="0.4166666666666667in"><draw:image xlink:href="Pictures/448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450" svg:width="0.41667in" svg:height="0.4166666666666667in"><draw:image xlink:href="Pictures/44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1" svg:width="0.41667in" svg:height="0.4166666666666667in"><draw:image xlink:href="Pictures/450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452" svg:width="0.41667in" svg:height="0.4166666666666667in"><draw:image xlink:href="Pictures/451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3" svg:width="0.41667in" svg:height="0.4166666666666667in"><draw:image xlink:href="Pictures/452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454" svg:width="0.41667in" svg:height="0.4166666666666667in"><draw:image xlink:href="Pictures/453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5" svg:width="0.41667in" svg:height="0.4166666666666667in"><draw:image xlink:href="Pictures/454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456" svg:width="0.41667in" svg:height="0.4166666666666667in"><draw:image xlink:href="Pictures/455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7" svg:width="0.41667in" svg:height="0.4166666666666667in"><draw:image xlink:href="Pictures/456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458" svg:width="0.41667in" svg:height="0.4166666666666667in"><draw:image xlink:href="Pictures/457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9" svg:width="0.41667in" svg:height="0.4166666666666667in"><draw:image xlink:href="Pictures/458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460" svg:width="0.41667in" svg:height="0.4166666666666667in"><draw:image xlink:href="Pictures/459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1" svg:width="0.41667in" svg:height="0.4166666666666667in"><draw:image xlink:href="Pictures/46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4" office:name=""><text:span text:style-name="Definition">Color</text:span></text:a></text:p>
          </table:table-cell>
          <table:table-cell table:style-name="TableRowCell" office:value-type="string">
            <text:p text:style-name="Table_20_Contents"><draw:frame draw:name="img462" svg:width="0.41667in" svg:height="0.4166666666666667in"><draw:image xlink:href="Pictures/461.svg" xlink:type="simple" xlink:show="embed" xlink:actuate="onLoad"/></draw:frame></text:p>
          </table:table-cell>
          <table:table-cell table:style-name="TableRowCell" office:value-type="string">
            <text:p text:style-name="Table_20_Contents">DBCol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463" svg:width="0.41667in" svg:height="0.4166666666666667in"><draw:image xlink:href="Pictures/4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4" svg:width="0.41667in" svg:height="0.4166666666666667in"><draw:image xlink:href="Pictures/463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465" svg:width="0.41667in" svg:height="0.4166666666666667in"><draw:image xlink:href="Pictures/4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6" svg:width="0.41667in" svg:height="0.4166666666666667in"><draw:image xlink:href="Pictures/465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467" svg:width="0.41667in" svg:height="0.4166666666666667in"><draw:image xlink:href="Pictures/4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8" svg:width="0.41667in" svg:height="0.4166666666666667in"><draw:image xlink:href="Pictures/467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69" svg:width="0.41667in" svg:height="0.4166666666666667in"><draw:image xlink:href="Pictures/4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0" svg:width="0.41667in" svg:height="0.4166666666666667in"><draw:image xlink:href="Pictures/469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7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471" svg:width="0.41667in" svg:height="0.4166666666666667in"><draw:image xlink:href="Pictures/4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2" svg:width="0.41667in" svg:height="0.4166666666666667in"><draw:image xlink:href="Pictures/471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0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473" svg:width="0.41667in" svg:height="0.4166666666666667in"><draw:image xlink:href="Pictures/4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4" svg:width="0.41667in" svg:height="0.4166666666666667in"><draw:image xlink:href="Pictures/473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3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475" svg:width="0.41667in" svg:height="0.4166666666666667in"><draw:image xlink:href="Pictures/4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6" svg:width="0.41667in" svg:height="0.4166666666666667in"><draw:image xlink:href="Pictures/475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6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477" svg:width="0.41667in" svg:height="0.4166666666666667in"><draw:image xlink:href="Pictures/4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8" svg:width="0.41667in" svg:height="0.4166666666666667in"><draw:image xlink:href="Pictures/477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9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479" svg:width="0.41667in" svg:height="0.4166666666666667in"><draw:image xlink:href="Pictures/4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0" svg:width="0.41667in" svg:height="0.4166666666666667in"><draw:image xlink:href="Pictures/479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2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481" svg:width="0.41667in" svg:height="0.4166666666666667in"><draw:image xlink:href="Pictures/4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2" svg:width="0.41667in" svg:height="0.4166666666666667in"><draw:image xlink:href="Pictures/481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483" svg:width="0.41667in" svg:height="0.4166666666666667in"><draw:image xlink:href="Pictures/4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4" svg:width="0.41667in" svg:height="0.4166666666666667in"><draw:image xlink:href="Pictures/483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8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485" svg:width="0.41667in" svg:height="0.4166666666666667in"><draw:image xlink:href="Pictures/4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6" svg:width="0.41667in" svg:height="0.4166666666666667in"><draw:image xlink:href="Pictures/485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1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487" svg:width="0.41667in" svg:height="0.4166666666666667in"><draw:image xlink:href="Pictures/4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8" svg:width="0.41667in" svg:height="0.4166666666666667in"><draw:image xlink:href="Pictures/487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4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489" svg:width="0.41667in" svg:height="0.4166666666666667in"><draw:image xlink:href="Pictures/4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0" svg:width="0.41667in" svg:height="0.4166666666666667in"><draw:image xlink:href="Pictures/489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7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491" svg:width="0.41667in" svg:height="0.4166666666666667in"><draw:image xlink:href="Pictures/4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2" svg:width="0.41667in" svg:height="0.4166666666666667in"><draw:image xlink:href="Pictures/491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0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493" svg:width="0.41667in" svg:height="0.4166666666666667in"><draw:image xlink:href="Pictures/4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4" svg:width="0.41667in" svg:height="0.4166666666666667in"><draw:image xlink:href="Pictures/493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495" svg:width="0.41667in" svg:height="0.4166666666666667in"><draw:image xlink:href="Pictures/4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6" svg:width="0.41667in" svg:height="0.4166666666666667in"><draw:image xlink:href="Pictures/495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6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497" svg:width="0.41667in" svg:height="0.4166666666666667in"><draw:image xlink:href="Pictures/4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8" svg:width="0.41667in" svg:height="0.4166666666666667in"><draw:image xlink:href="Pictures/497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9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499" svg:width="0.41667in" svg:height="0.4166666666666667in"><draw:image xlink:href="Pictures/4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0" svg:width="0.41667in" svg:height="0.4166666666666667in"><draw:image xlink:href="Pictures/4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2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501" svg:width="0.41667in" svg:height="0.4166666666666667in"><draw:image xlink:href="Pictures/5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2" svg:width="0.41667in" svg:height="0.4166666666666667in"><draw:image xlink:href="Pictures/5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5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503" svg:width="0.41667in" svg:height="0.4166666666666667in"><draw:image xlink:href="Pictures/5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4" svg:width="0.41667in" svg:height="0.4166666666666667in"><draw:image xlink:href="Pictures/50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8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505" svg:width="0.41667in" svg:height="0.4166666666666667in"><draw:image xlink:href="Pictures/5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6" svg:width="0.41667in" svg:height="0.4166666666666667in"><draw:image xlink:href="Pictures/5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1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507" svg:width="0.41667in" svg:height="0.4166666666666667in"><draw:image xlink:href="Pictures/5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8" svg:width="0.41667in" svg:height="0.4166666666666667in"><draw:image xlink:href="Pictures/50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4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509" svg:width="0.41667in" svg:height="0.4166666666666667in"><draw:image xlink:href="Pictures/5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0" svg:width="0.41667in" svg:height="0.4166666666666667in"><draw:image xlink:href="Pictures/50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7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511" svg:width="0.41667in" svg:height="0.4166666666666667in"><draw:image xlink:href="Pictures/5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2" svg:width="0.41667in" svg:height="0.4166666666666667in"><draw:image xlink:href="Pictures/511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0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513" svg:width="0.41667in" svg:height="0.4166666666666667in"><draw:image xlink:href="Pictures/5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4" svg:width="0.41667in" svg:height="0.4166666666666667in"><draw:image xlink:href="Pictures/513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3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515" svg:width="0.41667in" svg:height="0.4166666666666667in"><draw:image xlink:href="Pictures/5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6" svg:width="0.41667in" svg:height="0.4166666666666667in"><draw:image xlink:href="Pictures/515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6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517" svg:width="0.41667in" svg:height="0.4166666666666667in"><draw:image xlink:href="Pictures/5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8" svg:width="0.41667in" svg:height="0.4166666666666667in"><draw:image xlink:href="Pictures/517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9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519" svg:width="0.41667in" svg:height="0.4166666666666667in"><draw:image xlink:href="Pictures/5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0" svg:width="0.41667in" svg:height="0.4166666666666667in"><draw:image xlink:href="Pictures/519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2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521" svg:width="0.41667in" svg:height="0.4166666666666667in"><draw:image xlink:href="Pictures/5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2" svg:width="0.41667in" svg:height="0.4166666666666667in"><draw:image xlink:href="Pictures/52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523" svg:width="0.41667in" svg:height="0.4166666666666667in"><draw:image xlink:href="Pictures/5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4" svg:width="0.41667in" svg:height="0.4166666666666667in"><draw:image xlink:href="Pictures/523.svg" xlink:type="simple" xlink:show="embed" xlink:actuate="onLoad"/></draw:frame></text:p>
          </table:table-cell>
          <table:table-cell table:style-name="TableRowCell" office:value-type="string">
            <text:p text:style-name="Table_20_Contents">Layout,EditLayout,LayoutFinished,DBEditLayou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8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525" svg:width="0.41667in" svg:height="0.4166666666666667in"><draw:image xlink:href="Pictures/5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6" svg:width="0.41667in" svg:height="0.4166666666666667in"><draw:image xlink:href="Pictures/525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1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527" svg:width="0.41667in" svg:height="0.4166666666666667in"><draw:image xlink:href="Pictures/5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8" svg:width="0.41667in" svg:height="0.4166666666666667in"><draw:image xlink:href="Pictures/52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529" svg:width="0.41667in" svg:height="0.4166666666666667in"><draw:image xlink:href="Pictures/5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0" svg:width="0.41667in" svg:height="0.4166666666666667in"><draw:image xlink:href="Pictures/529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7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531" svg:width="0.41667in" svg:height="0.4166666666666667in"><draw:image xlink:href="Pictures/5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2" svg:width="0.41667in" svg:height="0.4166666666666667in"><draw:image xlink:href="Pictures/531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0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533" svg:width="0.41667in" svg:height="0.4166666666666667in"><draw:image xlink:href="Pictures/5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4" svg:width="0.41667in" svg:height="0.4166666666666667in"><draw:image xlink:href="Pictures/533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535" svg:width="0.41667in" svg:height="0.4166666666666667in"><draw:image xlink:href="Pictures/5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6" svg:width="0.41667in" svg:height="0.4166666666666667in"><draw:image xlink:href="Pictures/53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537" svg:width="0.41667in" svg:height="0.4166666666666667in"><draw:image xlink:href="Pictures/5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8" svg:width="0.41667in" svg:height="0.4166666666666667in"><draw:image xlink:href="Pictures/53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9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539" svg:width="0.41667in" svg:height="0.4166666666666667in"><draw:image xlink:href="Pictures/5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0" svg:width="0.41667in" svg:height="0.4166666666666667in"><draw:image xlink:href="Pictures/53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2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541" svg:width="0.41667in" svg:height="0.4166666666666667in"><draw:image xlink:href="Pictures/5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2" svg:width="0.41667in" svg:height="0.4166666666666667in"><draw:image xlink:href="Pictures/54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5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543" svg:width="0.41667in" svg:height="0.4166666666666667in"><draw:image xlink:href="Pictures/5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4" svg:width="0.41667in" svg:height="0.4166666666666667in"><draw:image xlink:href="Pictures/543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8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545" svg:width="0.41667in" svg:height="0.4166666666666667in"><draw:image xlink:href="Pictures/5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6" svg:width="0.41667in" svg:height="0.4166666666666667in"><draw:image xlink:href="Pictures/545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547" svg:width="0.41667in" svg:height="0.4166666666666667in"><draw:image xlink:href="Pictures/5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8" svg:width="0.41667in" svg:height="0.4166666666666667in"><draw:image xlink:href="Pictures/547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Add</text:span></text:a></text:p>
          </table:table-cell>
          <table:table-cell table:style-name="TableRowCell" office:value-type="string">
            <text:p text:style-name="Table_20_Contents"><draw:frame draw:name="img549" svg:width="0.41667in" svg:height="0.4166666666666667in"><draw:image xlink:href="Pictures/5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0" svg:width="0.41667in" svg:height="0.4166666666666667in"><draw:image xlink:href="Pictures/549.svg" xlink:type="simple" xlink:show="embed" xlink:actuate="onLoad"/></draw:frame></text:p>
          </table:table-cell>
          <table:table-cell table:style-name="TableRowCell" office:value-type="string">
            <text:p text:style-name="Table_20_Contents">Measure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7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551" svg:width="0.41667in" svg:height="0.4166666666666667in"><draw:image xlink:href="Pictures/5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2" svg:width="0.41667in" svg:height="0.4166666666666667in"><draw:image xlink:href="Pictures/55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0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553" svg:width="0.41667in" svg:height="0.4166666666666667in"><draw:image xlink:href="Pictures/5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4" svg:width="0.41667in" svg:height="0.4166666666666667in"><draw:image xlink:href="Pictures/553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3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555" svg:width="0.41667in" svg:height="0.4166666666666667in"><draw:image xlink:href="Pictures/5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6" svg:width="0.41667in" svg:height="0.4166666666666667in"><draw:image xlink:href="Pictures/55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557" svg:width="0.41667in" svg:height="0.4166666666666667in"><draw:image xlink:href="Pictures/5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8" svg:width="0.41667in" svg:height="0.4166666666666667in"><draw:image xlink:href="Pictures/557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559" svg:width="0.41667in" svg:height="0.4166666666666667in"><draw:image xlink:href="Pictures/5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0" svg:width="0.41667in" svg:height="0.4166666666666667in"><draw:image xlink:href="Pictures/559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561" svg:width="0.41667in" svg:height="0.4166666666666667in"><draw:image xlink:href="Pictures/5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2" svg:width="0.41667in" svg:height="0.4166666666666667in"><draw:image xlink:href="Pictures/561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563" svg:width="0.41667in" svg:height="0.4166666666666667in"><draw:image xlink:href="Pictures/5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4" svg:width="0.41667in" svg:height="0.4166666666666667in"><draw:image xlink:href="Pictures/563.svg" xlink:type="simple" xlink:show="embed" xlink:actuate="onLoad"/></draw:frame></text:p>
          </table:table-cell>
          <table:table-cell table:style-name="TableRowCell" office:value-type="string">
            <text:p text:style-name="Table_20_Contents">NavGoto,NavRestart,DBSta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565" svg:width="0.41667in" svg:height="0.4166666666666667in"><draw:image xlink:href="Pictures/5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6" svg:width="0.41667in" svg:height="0.4166666666666667in"><draw:image xlink:href="Pictures/565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567" svg:width="0.41667in" svg:height="0.4166666666666667in"><draw:image xlink:href="Pictures/5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8" svg:width="0.41667in" svg:height="0.4166666666666667in"><draw:image xlink:href="Pictures/567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569" svg:width="0.41667in" svg:height="0.4166666666666667in"><draw:image xlink:href="Pictures/5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0" svg:width="0.41667in" svg:height="0.4166666666666667in"><draw:image xlink:href="Pictures/569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7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571" svg:width="0.41667in" svg:height="0.4166666666666667in"><draw:image xlink:href="Pictures/5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2" svg:width="0.41667in" svg:height="0.4166666666666667in"><draw:image xlink:href="Pictures/571.svg" xlink:type="simple" xlink:show="embed" xlink:actuate="onLoad"/></draw:frame></text:p>
          </table:table-cell>
          <table:table-cell table:style-name="TableRowCell" office:value-type="string">
            <text:p text:style-name="Table_20_Contents">NavTo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0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573" svg:width="0.41667in" svg:height="0.4166666666666667in"><draw:image xlink:href="Pictures/5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4" svg:width="0.41667in" svg:height="0.4166666666666667in"><draw:image xlink:href="Pictures/573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3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575" svg:width="0.41667in" svg:height="0.4166666666666667in"><draw:image xlink:href="Pictures/5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6" svg:width="0.41667in" svg:height="0.4166666666666667in"><draw:image xlink:href="Pictures/575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577" svg:width="0.41667in" svg:height="0.4166666666666667in"><draw:image xlink:href="Pictures/5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8" svg:width="0.41667in" svg:height="0.4166666666666667in"><draw:image xlink:href="Pictures/577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579" svg:width="0.41667in" svg:height="0.4166666666666667in"><draw:image xlink:href="Pictures/5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0" svg:width="0.41667in" svg:height="0.4166666666666667in"><draw:image xlink:href="Pictures/579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581" svg:width="0.41667in" svg:height="0.4166666666666667in"><draw:image xlink:href="Pictures/5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2" svg:width="0.41667in" svg:height="0.4166666666666667in"><draw:image xlink:href="Pictures/581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583" svg:width="0.41667in" svg:height="0.4166666666666667in"><draw:image xlink:href="Pictures/5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4" svg:width="0.41667in" svg:height="0.4166666666666667in"><draw:image xlink:href="Pictures/583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585" svg:width="0.41667in" svg:height="0.4166666666666667in"><draw:image xlink:href="Pictures/5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6" svg:width="0.41667in" svg:height="0.4166666666666667in"><draw:image xlink:href="Pictures/585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587" svg:width="0.41667in" svg:height="0.4166666666666667in"><draw:image xlink:href="Pictures/5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8" svg:width="0.41667in" svg:height="0.4166666666666667in"><draw:image xlink:href="Pictures/587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589" svg:width="0.41667in" svg:height="0.4166666666666667in"><draw:image xlink:href="Pictures/5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0" svg:width="0.41667in" svg:height="0.4166666666666667in"><draw:image xlink:href="Pictures/589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591" svg:width="0.41667in" svg:height="0.4166666666666667in"><draw:image xlink:href="Pictures/5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2" svg:width="0.41667in" svg:height="0.4166666666666667in"><draw:image xlink:href="Pictures/591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0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593" svg:width="0.41667in" svg:height="0.4166666666666667in"><draw:image xlink:href="Pictures/5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4" svg:width="0.41667in" svg:height="0.4166666666666667in"><draw:image xlink:href="Pictures/593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3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595" svg:width="0.41667in" svg:height="0.4166666666666667in"><draw:image xlink:href="Pictures/5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6" svg:width="0.41667in" svg:height="0.4166666666666667in"><draw:image xlink:href="Pictures/595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6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597" svg:width="0.41667in" svg:height="0.4166666666666667in"><draw:image xlink:href="Pictures/5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8" svg:width="0.41667in" svg:height="0.4166666666666667in"><draw:image xlink:href="Pictures/597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9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599" svg:width="0.41667in" svg:height="0.4166666666666667in"><draw:image xlink:href="Pictures/5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0" svg:width="0.41667in" svg:height="0.4166666666666667in"><draw:image xlink:href="Pictures/599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2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601" svg:width="0.41667in" svg:height="0.4166666666666667in"><draw:image xlink:href="Pictures/6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2" svg:width="0.41667in" svg:height="0.4166666666666667in"><draw:image xlink:href="Pictures/601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5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603" svg:width="0.41667in" svg:height="0.4166666666666667in"><draw:image xlink:href="Pictures/6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4" svg:width="0.41667in" svg:height="0.4166666666666667in"><draw:image xlink:href="Pictures/603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8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605" svg:width="0.41667in" svg:height="0.4166666666666667in"><draw:image xlink:href="Pictures/6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6" svg:width="0.41667in" svg:height="0.4166666666666667in"><draw:image xlink:href="Pictures/6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1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607" svg:width="0.41667in" svg:height="0.4166666666666667in"><draw:image xlink:href="Pictures/6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8" svg:width="0.41667in" svg:height="0.4166666666666667in"><draw:image xlink:href="Pictures/607.svg" xlink:type="simple" xlink:show="embed" xlink:actuate="onLoad"/></draw:frame></text:p>
          </table:table-cell>
          <table:table-cell table:style-name="TableRowCell" office:value-type="string">
            <text:p text:style-name="Table_20_Contents">CreateFile,DBAdd,DBNew,DBNewRoute,DBAddSu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4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609" svg:width="0.41667in" svg:height="0.4166666666666667in"><draw:image xlink:href="Pictures/6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0" svg:width="0.41667in" svg:height="0.4166666666666667in"><draw:image xlink:href="Pictures/609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7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611" svg:width="0.41667in" svg:height="0.4166666666666667in"><draw:image xlink:href="Pictures/6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2" svg:width="0.41667in" svg:height="0.4166666666666667in"><draw:image xlink:href="Pictures/611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0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613" svg:width="0.41667in" svg:height="0.4166666666666667in"><draw:image xlink:href="Pictures/6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4" svg:width="0.41667in" svg:height="0.4166666666666667in"><draw:image xlink:href="Pictures/61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3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615" svg:width="0.41667in" svg:height="0.4166666666666667in"><draw:image xlink:href="Pictures/6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6" svg:width="0.41667in" svg:height="0.4166666666666667in"><draw:image xlink:href="Pictures/61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6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617" svg:width="0.41667in" svg:height="0.4166666666666667in"><draw:image xlink:href="Pictures/6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8" svg:width="0.41667in" svg:height="0.4166666666666667in"><draw:image xlink:href="Pictures/617.svg" xlink:type="simple" xlink:show="embed" xlink:actuate="onLoad"/></draw:frame></text:p>
          </table:table-cell>
          <table:table-cell table:style-name="TableRowCell" office:value-type="string">
            <text:p text:style-name="Table_20_Contents">ReloadUI,DBReload,DBRestart,DBAutoRe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9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619" svg:width="0.41667in" svg:height="0.4166666666666667in"><draw:image xlink:href="Pictures/6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0" svg:width="0.41667in" svg:height="0.4166666666666667in"><draw:image xlink:href="Pictures/619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2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621" svg:width="0.41667in" svg:height="0.4166666666666667in"><draw:image xlink:href="Pictures/6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2" svg:width="0.41667in" svg:height="0.4166666666666667in"><draw:image xlink:href="Pictures/621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5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623" svg:width="0.41667in" svg:height="0.4166666666666667in"><draw:image xlink:href="Pictures/6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4" svg:width="0.41667in" svg:height="0.4166666666666667in"><draw:image xlink:href="Pictures/623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8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625" svg:width="0.41667in" svg:height="0.4166666666666667in"><draw:image xlink:href="Pictures/6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6" svg:width="0.41667in" svg:height="0.4166666666666667in"><draw:image xlink:href="Pictures/62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627" svg:width="0.41667in" svg:height="0.4166666666666667in"><draw:image xlink:href="Pictures/6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8" svg:width="0.41667in" svg:height="0.4166666666666667in"><draw:image xlink:href="Pictures/627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4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629" svg:width="0.41667in" svg:height="0.4166666666666667in"><draw:image xlink:href="Pictures/6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0" svg:width="0.41667in" svg:height="0.4166666666666667in"><draw:image xlink:href="Pictures/629.svg" xlink:type="simple" xlink:show="embed" xlink:actuate="onLoad"/></draw:frame></text:p>
          </table:table-cell>
          <table:table-cell table:style-name="TableRowCell" office:value-type="string">
            <text:p text:style-name="Table_20_Contents">Route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7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631" svg:width="0.41667in" svg:height="0.4166666666666667in"><draw:image xlink:href="Pictures/6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2" svg:width="0.41667in" svg:height="0.4166666666666667in"><draw:image xlink:href="Pictures/631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0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633" svg:width="0.41667in" svg:height="0.4166666666666667in"><draw:image xlink:href="Pictures/6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4" svg:width="0.41667in" svg:height="0.4166666666666667in"><draw:image xlink:href="Pictures/63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3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635" svg:width="0.41667in" svg:height="0.4166666666666667in"><draw:image xlink:href="Pictures/6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6" svg:width="0.41667in" svg:height="0.4166666666666667in"><draw:image xlink:href="Pictures/635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6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637" svg:width="0.41667in" svg:height="0.4166666666666667in"><draw:image xlink:href="Pictures/6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8" svg:width="0.41667in" svg:height="0.4166666666666667in"><draw:image xlink:href="Pictures/637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9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639" svg:width="0.41667in" svg:height="0.4166666666666667in"><draw:image xlink:href="Pictures/6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0" svg:width="0.41667in" svg:height="0.4166666666666667in"><draw:image xlink:href="Pictures/639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2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641" svg:width="0.41667in" svg:height="0.4166666666666667in"><draw:image xlink:href="Pictures/6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2" svg:width="0.41667in" svg:height="0.4166666666666667in"><draw:image xlink:href="Pictures/641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5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643" svg:width="0.41667in" svg:height="0.4166666666666667in"><draw:image xlink:href="Pictures/6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4" svg:width="0.41667in" svg:height="0.4166666666666667in"><draw:image xlink:href="Pictures/643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8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645" svg:width="0.41667in" svg:height="0.4166666666666667in"><draw:image xlink:href="Pictures/6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6" svg:width="0.41667in" svg:height="0.4166666666666667in"><draw:image xlink:href="Pictures/645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1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647" svg:width="0.41667in" svg:height="0.4166666666666667in"><draw:image xlink:href="Pictures/6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8" svg:width="0.41667in" svg:height="0.4166666666666667in"><draw:image xlink:href="Pictures/647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4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649" svg:width="0.41667in" svg:height="0.4166666666666667in"><draw:image xlink:href="Pictures/6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0" svg:width="0.41667in" svg:height="0.4166666666666667in"><draw:image xlink:href="Pictures/649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7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651" svg:width="0.41667in" svg:height="0.4166666666666667in"><draw:image xlink:href="Pictures/6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2" svg:width="0.41667in" svg:height="0.4166666666666667in"><draw:image xlink:href="Pictures/651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0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653" svg:width="0.41667in" svg:height="0.4166666666666667in"><draw:image xlink:href="Pictures/6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4" svg:width="0.41667in" svg:height="0.4166666666666667in"><draw:image xlink:href="Pictures/653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3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655" svg:width="0.41667in" svg:height="0.4166666666666667in"><draw:image xlink:href="Pictures/6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6" svg:width="0.41667in" svg:height="0.4166666666666667in"><draw:image xlink:href="Pictures/655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57" svg:width="0.41667in" svg:height="0.4166666666666667in"><draw:image xlink:href="Pictures/6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8" svg:width="0.41667in" svg:height="0.4166666666666667in"><draw:image xlink:href="Pictures/657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9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659" svg:width="0.41667in" svg:height="0.4166666666666667in"><draw:image xlink:href="Pictures/6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0" svg:width="0.41667in" svg:height="0.4166666666666667in"><draw:image xlink:href="Pictures/659.svg" xlink:type="simple" xlink:show="embed" xlink:actuate="onLoad"/></draw:frame></text:p>
          </table:table-cell>
          <table:table-cell table:style-name="TableRowCell" office:value-type="string">
            <text:p text:style-name="Table_20_Contents">Status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2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661" svg:width="0.41667in" svg:height="0.4166666666666667in"><draw:image xlink:href="Pictures/6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2" svg:width="0.41667in" svg:height="0.4166666666666667in"><draw:image xlink:href="Pictures/661.svg" xlink:type="simple" xlink:show="embed" xlink:actuate="onLoad"/></draw:frame></text:p>
          </table:table-cell>
          <table:table-cell table:style-name="TableRowCell" office:value-type="string">
            <text:p text:style-name="Table_20_Contents">Status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5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663" svg:width="0.41667in" svg:height="0.4166666666666667in"><draw:image xlink:href="Pictures/6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4" svg:width="0.41667in" svg:height="0.4166666666666667in"><draw:image xlink:href="Pictures/663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8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665" svg:width="0.41667in" svg:height="0.4166666666666667in"><draw:image xlink:href="Pictures/6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6" svg:width="0.41667in" svg:height="0.4166666666666667in"><draw:image xlink:href="Pictures/665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1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667" svg:width="0.41667in" svg:height="0.4166666666666667in"><draw:image xlink:href="Pictures/6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8" svg:width="0.41667in" svg:height="0.4166666666666667in"><draw:image xlink:href="Pictures/66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4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669" svg:width="0.41667in" svg:height="0.4166666666666667in"><draw:image xlink:href="Pictures/6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0" svg:width="0.41667in" svg:height="0.4166666666666667in"><draw:image xlink:href="Pictures/66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7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671" svg:width="0.41667in" svg:height="0.4166666666666667in"><draw:image xlink:href="Pictures/6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2" svg:width="0.41667in" svg:height="0.4166666666666667in"><draw:image xlink:href="Pictures/671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0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673" svg:width="0.41667in" svg:height="0.4166666666666667in"><draw:image xlink:href="Pictures/6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4" svg:width="0.41667in" svg:height="0.4166666666666667in"><draw:image xlink:href="Pictures/673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3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675" svg:width="0.41667in" svg:height="0.4166666666666667in"><draw:image xlink:href="Pictures/6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6" svg:width="0.41667in" svg:height="0.4166666666666667in"><draw:image xlink:href="Pictures/675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6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677" svg:width="0.41667in" svg:height="0.4166666666666667in"><draw:image xlink:href="Pictures/6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8" svg:width="0.41667in" svg:height="0.4166666666666667in"><draw:image xlink:href="Pictures/677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DBShow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9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679" svg:width="0.41667in" svg:height="0.4166666666666667in"><draw:image xlink:href="Pictures/6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0" svg:width="0.41667in" svg:height="0.4166666666666667in"><draw:image xlink:href="Pictures/679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2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681" svg:width="0.41667in" svg:height="0.4166666666666667in"><draw:image xlink:href="Pictures/6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2" svg:width="0.41667in" svg:height="0.4166666666666667in"><draw:image xlink:href="Pictures/681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5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683" svg:width="0.41667in" svg:height="0.4166666666666667in"><draw:image xlink:href="Pictures/6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4" svg:width="0.41667in" svg:height="0.4166666666666667in"><draw:image xlink:href="Pictures/683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8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685" svg:width="0.41667in" svg:height="0.4166666666666667in"><draw:image xlink:href="Pictures/6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6" svg:width="0.41667in" svg:height="0.4166666666666667in"><draw:image xlink:href="Pictures/685.svg" xlink:type="simple" xlink:show="embed" xlink:actuate="onLoad"/></draw:frame></text:p>
          </table:table-cell>
          <table:table-cell table:style-name="TableRowCell" office:value-type="string">
            <text:p text:style-name="Table_20_Contents">WpGot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1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687" svg:width="0.41667in" svg:height="0.4166666666666667in"><draw:image xlink:href="Pictures/6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8" svg:width="0.41667in" svg:height="0.4166666666666667in"><draw:image xlink:href="Pictures/687.svg" xlink:type="simple" xlink:show="embed" xlink:actuate="onLoad"/></draw:frame></text:p>
          </table:table-cell>
          <table:table-cell table:style-name="TableRowCell" office:value-type="string">
            <text:p text:style-name="Table_20_Contents">WpLoc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4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689" svg:width="0.41667in" svg:height="0.4166666666666667in"><draw:image xlink:href="Pictures/6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0" svg:width="0.41667in" svg:height="0.4166666666666667in"><draw:image xlink:href="Pictures/689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7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691" svg:width="0.41667in" svg:height="0.4166666666666667in"><draw:image xlink:href="Pictures/6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2" svg:width="0.41667in" svg:height="0.4166666666666667in"><draw:image xlink:href="Pictures/691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0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693" svg:width="0.41667in" svg:height="0.4166666666666667in"><draw:image xlink:href="Pictures/6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4" svg:width="0.41667in" svg:height="0.4166666666666667in"><draw:image xlink:href="Pictures/693.svg" xlink:type="simple" xlink:show="embed" xlink:actuate="onLoad"/></draw:frame></text:p>
          </table:table-cell>
          <table:table-cell table:style-name="TableRowCell" office:value-type="string">
            <text:p text:style-name="Table_20_Contents">Wp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3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695" svg:width="0.41667in" svg:height="0.4166666666666667in"><draw:image xlink:href="Pictures/6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6" svg:width="0.41667in" svg:height="0.4166666666666667in"><draw:image xlink:href="Pictures/695.svg" xlink:type="simple" xlink:show="embed" xlink:actuate="onLoad"/></draw:frame></text:p>
          </table:table-cell>
          <table:table-cell table:style-name="TableRowCell" office:value-type="string">
            <text:p text:style-name="Table_20_Contents">Stop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6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697" svg:width="0.41667in" svg:height="0.4166666666666667in"><draw:image xlink:href="Pictures/6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8" svg:width="0.41667in" svg:height="0.4166666666666667in"><draw:image xlink:href="Pictures/697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9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699" svg:width="0.41667in" svg:height="0.4166666666666667in"><draw:image xlink:href="Pictures/6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00" svg:width="0.41667in" svg:height="0.4166666666666667in"><draw:image xlink:href="Pictures/699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22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701" svg:width="0.41667in" svg:height="0.4166666666666667in"><draw:image xlink:href="Pictures/7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02" svg:width="0.41667in" svg:height="0.4166666666666667in"><draw:image xlink:href="Pictures/701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7-15T08:28:08Z</meta:creation-date>
    <dc:date>2026-07-15T08:28:08Z</dc:date>
  </office:meta>
</office:document-meta>
</file>