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6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3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0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9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2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28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5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1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7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0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2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6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8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2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7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0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57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5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3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53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1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01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ColorUn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1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9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8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7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7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1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2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7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9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3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9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2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1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6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678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5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7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9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7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9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3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5" office:name=""><text:span text:style-name="Definition"><text:span text:style-name="T1">DB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9" office:name=""><text:span text:style-name="Definition"><text:span text:style-name="T1">DB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+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3" office:name=""><text:span text:style-name="Definition"><text:span text:style-name="T1">DB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1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5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0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6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6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8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7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1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6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9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0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3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2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4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5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<text:span text:style-name="T1">DB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8" office:name=""><text:span text:style-name="Definition">To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9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2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7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2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8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83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8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2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9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5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8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1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4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7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0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3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6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5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2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13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1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ma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7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7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0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48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63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2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0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5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0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84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5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1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9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4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4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6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7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4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29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9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8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1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4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1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8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3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62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82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06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7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7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3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5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8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1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26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27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0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7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6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8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DBColorUnset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45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DBMeasure,DB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DB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DBRoutePoints,DBToRoute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NavOverlays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AddonConfigView,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1T17:28:46Z</meta:creation-date>
    <dc:date>2026-05-11T17:28:46Z</dc:date>
  </office:meta>
</office:document-meta>
</file>